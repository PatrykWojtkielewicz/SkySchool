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405AC9ACFCC5196A552.png" manifest:media-type="image/png"/>
  <manifest:file-entry manifest:full-path="Pictures/1000000000000450000002D2B06A4AAE0A85BB10.jpg" manifest:media-type="image/jpeg"/>
  <manifest:file-entry manifest:full-path="Pictures/100000000000039000000503CDE1FBD7A398D1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ext_20_body_20__28_user_29_">
      <style:paragraph-properties fo:text-align="center" style:justify-single-word="false"/>
      <style:text-properties style:font-name="Aptos" fo:language="pl" fo:country="PL"/>
    </style:style>
    <style:style style:name="P2" style:family="paragraph" style:parent-style-name="Text_20_body_20__28_user_29_">
      <style:text-properties style:font-name="Aptos" fo:language="pl" fo:country="PL" fo:font-weight="bold" style:font-weight-asian="bold" style:font-weight-complex="bold"/>
    </style:style>
    <style:style style:name="P3" style:family="paragraph" style:parent-style-name="Text_20_body_20__28_user_29_">
      <style:text-properties style:font-name="Aptos" fo:language="pl" fo:country="PL"/>
    </style:style>
    <style:style style:name="P4" style:family="paragraph" style:parent-style-name="Text_20_body_20__28_user_29_">
      <style:paragraph-properties fo:text-align="center" style:justify-single-word="false"/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P5" style:family="paragraph" style:parent-style-name="Text_20_body_20__28_user_29_"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ptos" fo:font-size="16pt" fo:language="pl" fo:country="PL" fo:font-weight="bold" style:font-name-asian="Aptos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7" style:family="paragraph" style:parent-style-name="Text_20_body_20__28_user_29_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8" style:family="paragraph" style:parent-style-name="Text_20_body_20__28_user_29_">
      <style:paragraph-properties fo:margin-left="0.5in" fo:margin-right="0in" fo:text-indent="0in" style:auto-text-indent="false">
        <style:tab-stops/>
      </style:paragraph-properties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9" style:family="paragraph" style:parent-style-name="Text_20_body_20__28_user_29_">
      <style:paragraph-properties fo:margin-left="3.939in" fo:margin-right="0in" fo:text-indent="0.4925in" style:auto-text-indent="false">
        <style:tab-stops/>
      </style:paragraph-properties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P10" style:family="paragraph" style:parent-style-name="Text_20_body_20__28_user_29_"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P11" style:family="paragraph" style:parent-style-name="Text_20_body_20__28_user_29_">
      <style:paragraph-properties fo:margin-left="0.5in" fo:margin-right="0in" fo:margin-top="0in" fo:margin-bottom="0in" style:contextual-spacing="false" fo:text-indent="0in" style:auto-text-indent="false">
        <style:tab-stops/>
      </style:paragraph-properties>
      <style:text-properties style:font-name="Aptos" fo:font-size="14pt" fo:language="pl" fo:country="PL" style:font-size-asian="14pt" style:font-size-complex="15pt"/>
    </style:style>
    <style:style style:name="P12" style:family="paragraph" style:parent-style-name="Text_20_body_20__28_user_29_">
      <style:text-properties style:font-name="Aptos" fo:font-size="14pt" fo:language="pl" fo:country="PL" style:font-size-asian="14pt" style:font-size-complex="15pt"/>
    </style:style>
    <style:style style:name="P13" style:family="paragraph" style:parent-style-name="Text_20_body_20__28_user_29_">
      <style:paragraph-properties fo:margin-top="0in" fo:margin-bottom="0in" style:contextual-spacing="false">
        <style:tab-stops>
          <style:tab-stop style:position="1in"/>
        </style:tab-stops>
      </style:paragraph-properties>
      <style:text-properties style:font-name="Aptos" fo:font-size="14pt" fo:language="pl" fo:country="PL" style:font-size-asian="14pt" style:font-size-complex="15pt"/>
    </style:style>
    <style:style style:name="P14" style:family="paragraph" style:parent-style-name="Text_20_body_20__28_user_29_">
      <style:paragraph-properties fo:margin-left="3.939in" fo:margin-right="0in" fo:text-indent="0.4925in" style:auto-text-indent="false">
        <style:tab-stops/>
      </style:paragraph-properties>
    </style:style>
    <style:style style:name="P15" style:family="paragraph" style:parent-style-name="Text_20_body_20__28_user_29_">
      <style:paragraph-properties fo:margin-left="0.4925in" fo:margin-right="0in" fo:margin-top="0.0835in" fo:margin-bottom="0in" style:contextual-spacing="false" fo:text-indent="0in" style:auto-text-indent="false">
        <style:tab-stops/>
      </style:paragraph-properties>
    </style:style>
    <style:style style:name="P16" style:family="paragraph" style:parent-style-name="Text_20_body_20__28_user_29_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</style:style>
    <style:style style:name="P17" style:family="paragraph" style:parent-style-name="Nagłówek_20_1" style:master-page-name="MP0">
      <style:paragraph-properties fo:text-align="center" style:justify-single-word="false" style:page-number="auto" fo:break-before="page"/>
      <style:text-properties style:font-name="Aptos" fo:font-size="24pt" fo:language="pl" fo:country="PL" style:font-size-asian="24pt" style:font-size-complex="21pt"/>
    </style:style>
    <style:style style:name="P18" style:family="paragraph" style:parent-style-name="Nagłówek_20_2">
      <style:text-properties style:font-name="Aptos" fo:language="pl" fo:country="PL"/>
    </style:style>
    <style:style style:name="P19" style:family="paragraph" style:parent-style-name="Nagłówek_20_3">
      <style:text-properties style:font-name="Aptos" fo:language="pl" fo:country="PL"/>
    </style:style>
    <style:style style:name="P20" style:family="paragraph" style:parent-style-name="Text_20_body_20__28_user_29_" style:list-style-name="WWNum1">
      <style:text-properties style:font-name="Aptos" fo:language="pl" fo:country="PL"/>
    </style:style>
    <style:style style:name="P21" style:family="paragraph" style:parent-style-name="Text_20_body_20__28_user_29_" style:list-style-name="WWNum2">
      <style:text-properties style:font-name="Aptos" fo:language="pl" fo:country="PL"/>
    </style:style>
    <style:style style:name="P22" style:family="paragraph" style:parent-style-name="Text_20_body_20__28_user_29_" style:list-style-name="WWNum3">
      <style:text-properties style:font-name="Aptos" fo:language="pl" fo:country="PL"/>
    </style:style>
    <style:style style:name="P23" style:family="paragraph" style:parent-style-name="Text_20_body_20__28_user_29_" style:list-style-name="WWNum4">
      <style:text-properties style:font-name="Aptos" fo:language="pl" fo:country="PL"/>
    </style:style>
    <style:style style:name="P24" style:family="paragraph" style:parent-style-name="Text_20_body_20__28_user_29_" style:list-style-name="WWNum5">
      <style:text-properties style:font-name="Aptos" fo:language="pl" fo:country="PL"/>
    </style:style>
    <style:style style:name="P25" style:family="paragraph" style:parent-style-name="Text_20_body_20__28_user_29_" style:list-style-name="WWNum6">
      <style:text-properties style:font-name="Aptos" fo:language="pl" fo:country="PL"/>
    </style:style>
    <style:style style:name="P26" style:family="paragraph" style:parent-style-name="Text_20_body_20__28_user_29_" style:list-style-name="WWNum7">
      <style:text-properties style:font-name="Aptos" fo:language="pl" fo:country="PL"/>
    </style:style>
    <style:style style:name="P27" style:family="paragraph" style:parent-style-name="Text_20_body_20__28_user_29_" style:list-style-name="WWNum8">
      <style:text-properties style:font-name="Aptos" fo:language="pl" fo:country="PL"/>
    </style:style>
    <style:style style:name="P28" style:family="paragraph" style:parent-style-name="Text_20_body_20__28_user_29_" style:list-style-name="WWNum9">
      <style:text-properties style:font-name="Aptos" fo:language="pl" fo:country="PL"/>
    </style:style>
    <style:style style:name="P29" style:family="paragraph" style:parent-style-name="Text_20_body_20__28_user_29_" style:list-style-name="WWNum10">
      <style:text-properties style:font-name="Aptos" fo:language="pl" fo:country="PL"/>
    </style:style>
    <style:style style:name="P30" style:family="paragraph" style:parent-style-name="Text_20_body_20__28_user_29_" style:list-style-name="WWNum11">
      <style:text-properties style:font-name="Aptos" fo:language="pl" fo:country="PL"/>
    </style:style>
    <style:style style:name="P31" style:family="paragraph" style:parent-style-name="Text_20_body_20__28_user_29_" style:list-style-name="WWNum12">
      <style:text-properties style:font-name="Aptos" fo:language="pl" fo:country="PL"/>
    </style:style>
    <style:style style:name="P32" style:family="paragraph" style:parent-style-name="Text_20_body_20__28_user_29_" style:list-style-name="WWNum13">
      <style:text-properties style:font-name="Aptos" fo:language="pl" fo:country="PL"/>
    </style:style>
    <style:style style:name="P33" style:family="paragraph" style:parent-style-name="Text_20_body_20__28_user_29_" style:list-style-name="WWNum14">
      <style:text-properties style:font-name="Aptos" fo:language="pl" fo:country="PL"/>
    </style:style>
    <style:style style:name="P34" style:family="paragraph" style:parent-style-name="Text_20_body_20__28_user_29_" style:list-style-name="WWNum15">
      <style:text-properties style:font-name="Aptos" fo:language="pl" fo:country="PL"/>
    </style:style>
    <style:style style:name="P35" style:family="paragraph" style:parent-style-name="Text_20_body_20__28_user_29_" style:list-style-name="WWNum16">
      <style:text-properties style:font-name="Aptos" fo:language="pl" fo:country="PL"/>
    </style:style>
    <style:style style:name="P36" style:family="paragraph" style:parent-style-name="Text_20_body_20__28_user_29_" style:list-style-name="WWNum17">
      <style:text-properties style:font-name="Aptos" fo:language="pl" fo:country="PL"/>
    </style:style>
    <style:style style:name="P37" style:family="paragraph" style:parent-style-name="Text_20_body_20__28_user_29_" style:list-style-name="WWNum18">
      <style:text-properties style:font-name="Aptos" fo:language="pl" fo:country="PL"/>
    </style:style>
    <style:style style:name="P38" style:family="paragraph" style:parent-style-name="Text_20_body_20__28_user_29_" style:list-style-name="WWNum25">
      <style:text-properties style:font-name="Aptos" fo:language="pl" fo:country="PL"/>
    </style:style>
    <style:style style:name="P39" style:family="paragraph" style:parent-style-name="Text_20_body_20__28_user_29_" style:list-style-name="WWNum26">
      <style:text-properties style:font-name="Aptos" fo:language="pl" fo:country="PL"/>
    </style:style>
    <style:style style:name="P40" style:family="paragraph" style:parent-style-name="Text_20_body_20__28_user_29_" style:list-style-name="WWNum27">
      <style:text-properties style:font-name="Aptos" fo:language="pl" fo:country="PL"/>
    </style:style>
    <style:style style:name="P41" style:family="paragraph" style:parent-style-name="Text_20_body_20__28_user_29_" style:list-style-name="WWNum28">
      <style:text-properties style:font-name="Aptos" fo:language="pl" fo:country="PL"/>
    </style:style>
    <style:style style:name="P42" style:family="paragraph" style:parent-style-name="Text_20_body_20__28_user_29_" style:list-style-name="WWNum29">
      <style:text-properties style:font-name="Aptos" fo:language="pl" fo:country="PL" fo:font-weight="bold" style:font-weight-asian="bold" style:font-weight-complex="bold"/>
    </style:style>
    <style:style style:name="P43" style:family="paragraph" style:parent-style-name="Text_20_body_20__28_user_29_" style:list-style-name="WWNum19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44" style:family="paragraph" style:parent-style-name="Text_20_body_20__28_user_29_" style:list-style-name="WWNum31">
      <style:text-properties style:font-name="Aptos" fo:font-size="14pt" fo:language="pl" fo:country="PL" style:font-size-asian="14pt" style:font-size-complex="14pt"/>
    </style:style>
    <style:style style:name="P45" style:family="paragraph" style:parent-style-name="Text_20_body_20__28_user_29_" style:list-style-name="WWNum32">
      <style:text-properties style:font-name="Aptos" fo:font-size="14pt" fo:language="pl" fo:country="PL" style:font-size-asian="14pt" style:font-size-complex="14pt"/>
    </style:style>
    <style:style style:name="P46" style:family="paragraph" style:parent-style-name="Text_20_body_20__28_user_29_" style:list-style-name="WWNum34">
      <style:text-properties style:font-name="Aptos" fo:font-size="14pt" fo:language="pl" fo:country="PL" style:font-size-asian="14pt" style:font-size-complex="14pt"/>
    </style:style>
    <style:style style:name="P47" style:family="paragraph" style:parent-style-name="Text_20_body_20__28_user_29_" style:list-style-name="L2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  <style:text-properties style:font-name="Aptos" fo:font-size="14pt" fo:language="pl" fo:country="PL" style:font-size-asian="14pt" style:font-size-complex="15pt"/>
    </style:style>
    <style:style style:name="P48" style:family="paragraph" style:parent-style-name="Text_20_body_20__28_user_29_" style:list-style-name="L2">
      <style:paragraph-properties fo:margin-left="1in" fo:margin-right="0in" fo:margin-top="0in" fo:margin-bottom="0.0693in" style:contextual-spacing="false" fo:text-indent="0in" style:auto-text-indent="false">
        <style:tab-stops>
          <style:tab-stop style:position="0in"/>
        </style:tab-stops>
      </style:paragraph-properties>
      <style:text-properties style:font-name="Aptos" fo:font-size="14pt" fo:language="pl" fo:country="PL" style:font-size-asian="14pt" style:font-size-complex="15pt"/>
    </style:style>
    <style:style style:name="P49" style:family="paragraph" style:parent-style-name="Text_20_body_20__28_user_29_" style:list-style-name="L3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  <style:text-properties style:font-name="Aptos" fo:font-size="14pt" fo:language="pl" fo:country="PL" style:font-size-asian="14pt" style:font-size-complex="15pt"/>
    </style:style>
    <style:style style:name="P50" style:family="paragraph" style:parent-style-name="Text_20_body_20__28_user_29_" style:list-style-name="L3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Aptos" fo:font-size="14pt" fo:language="pl" fo:country="PL" style:font-size-asian="14pt" style:font-size-complex="15pt"/>
    </style:style>
    <style:style style:name="P51" style:family="paragraph" style:parent-style-name="Text_20_body_20__28_user_29_" style:list-style-name="L3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  <style:text-properties style:font-name="Aptos" fo:font-size="14pt" style:font-size-asian="14pt" style:font-size-complex="15pt"/>
    </style:style>
    <style:style style:name="P52" style:family="paragraph" style:parent-style-name="Text_20_body_20__28_user_29_" style:list-style-name="WWNum29">
      <style:text-properties style:font-name="Aptos" fo:font-size="11pt" fo:language="pl" fo:country="PL" fo:font-weight="bold" style:font-size-asian="11pt" style:font-weight-asian="bold" style:font-size-complex="11pt" style:font-weight-complex="bold"/>
    </style:style>
    <style:style style:name="P53" style:family="paragraph" style:parent-style-name="Text_20_body_20__28_user_29_" style:list-style-name="WWNum20">
      <style:text-properties style:font-name="Aptos" fo:font-size="11pt" fo:language="pl" fo:country="PL" style:font-size-asian="11pt" style:font-size-complex="11pt"/>
    </style:style>
    <style:style style:name="P54" style:family="paragraph" style:parent-style-name="Text_20_body_20__28_user_29_" style:list-style-name="WWNum21">
      <style:text-properties style:font-name="Aptos" fo:font-size="11pt" fo:language="pl" fo:country="PL" style:font-size-asian="11pt" style:font-size-complex="11pt"/>
    </style:style>
    <style:style style:name="P55" style:family="paragraph" style:parent-style-name="Text_20_body_20__28_user_29_" style:list-style-name="WWNum22">
      <style:text-properties style:font-name="Aptos" fo:font-size="11pt" fo:language="pl" fo:country="PL" style:font-size-asian="11pt" style:font-size-complex="11pt"/>
    </style:style>
    <style:style style:name="P56" style:family="paragraph" style:parent-style-name="Text_20_body_20__28_user_29_" style:list-style-name="WWNum23">
      <style:text-properties style:font-name="Aptos" fo:font-size="11pt" fo:language="pl" fo:country="PL" style:font-size-asian="11pt" style:font-size-complex="11pt"/>
    </style:style>
    <style:style style:name="P57" style:family="paragraph" style:parent-style-name="Text_20_body_20__28_user_29_" style:list-style-name="WWNum24">
      <style:text-properties style:font-name="Aptos" fo:font-size="11pt" fo:language="pl" fo:country="PL" style:font-size-asian="11pt" style:font-size-complex="11pt"/>
    </style:style>
    <style:style style:name="P58" style:family="paragraph" style:parent-style-name="Text_20_body_20__28_user_29_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ptos" fo:font-size="16pt" fo:language="pl" fo:country="PL" fo:font-weight="bold" officeooo:paragraph-rsid="000e3dde" style:font-size-asian="16pt" style:font-weight-asian="bold" style:font-size-complex="16pt" style:font-weight-complex="bold"/>
    </style:style>
    <style:style style:name="P59" style:family="paragraph" style:parent-style-name="Text_20_body_20__28_user_29_">
      <style:paragraph-properties fo:text-align="center" style:justify-single-word="false"/>
      <style:text-properties style:font-name="Aptos" fo:font-size="16pt" fo:language="pl" fo:country="PL" fo:font-weight="bold" officeooo:paragraph-rsid="000e3dde" style:font-size-asian="16pt" style:font-weight-asian="bold" style:font-size-complex="16pt" style:font-weight-complex="bold"/>
    </style:style>
    <style:style style:name="P60" style:family="paragraph" style:parent-style-name="Text_20_body_20__28_user_29_">
      <style:paragraph-properties fo:text-align="start" style:justify-single-word="false"/>
      <style:text-properties style:font-name="Aptos" fo:font-size="16pt" fo:language="pl" fo:country="PL" fo:font-weight="normal" officeooo:rsid="000ef755" officeooo:paragraph-rsid="000ef755" style:font-size-asian="16pt" style:font-weight-asian="normal" style:font-size-complex="16pt" style:font-weight-complex="normal"/>
    </style:style>
    <style:style style:name="P61" style:family="paragraph" style:parent-style-name="Text_20_body_20__28_user_29_">
      <style:paragraph-properties fo:text-align="end" style:justify-single-word="false"/>
      <style:text-properties style:font-name="Aptos" fo:font-size="16pt" fo:language="pl" fo:country="PL" fo:font-style="italic" fo:font-weight="normal" officeooo:rsid="000ef755" officeooo:paragraph-rsid="000ef755" style:font-size-asian="16pt" style:font-style-asian="italic" style:font-weight-asian="normal" style:font-size-complex="16pt" style:font-style-complex="italic" style:font-weight-complex="normal"/>
    </style:style>
    <style:style style:name="P62" style:family="paragraph" style:parent-style-name="Text_20_body_20__28_user_29_" style:list-style-name="WWNum23"/>
    <style:style style:name="P63" style:family="paragraph" style:parent-style-name="Text_20_body_20__28_user_29_" style:list-style-name="WWNum30"/>
    <style:style style:name="P64" style:family="paragraph" style:parent-style-name="Text_20_body_20__28_user_29_" style:list-style-name="WWNum33"/>
    <style:style style:name="P65" style:family="paragraph" style:parent-style-name="Text_20_body_20__28_user_29_" style:list-style-name="L1">
      <style:paragraph-properties fo:margin-left="0.4465in" fo:margin-right="0in" fo:text-indent="0in" style:auto-text-indent="false">
        <style:tab-stops/>
      </style:paragraph-properties>
    </style:style>
    <style:style style:name="P66" style:family="paragraph" style:parent-style-name="Text_20_body_20__28_user_29_" style:list-style-name="L1">
      <style:paragraph-properties fo:margin-left="0.4465in" fo:margin-right="0in" fo:margin-top="0.0835in" fo:margin-bottom="0.0835in" style:contextual-spacing="false" fo:text-indent="0in" style:auto-text-indent="false">
        <style:tab-stops/>
      </style:paragraph-properties>
    </style:style>
    <style:style style:name="P67" style:family="paragraph" style:parent-style-name="Text_20_body_20__28_user_29_" style:list-style-name="L1">
      <style:paragraph-properties fo:margin-left="0.4465in" fo:margin-right="0in" fo:margin-top="0.1665in" fo:margin-bottom="0.0835in" style:contextual-spacing="false" fo:text-indent="0in" style:auto-text-indent="false">
        <style:tab-stops/>
      </style:paragraph-properties>
    </style:style>
    <style:style style:name="P68" style:family="paragraph" style:parent-style-name="Text_20_body_20__28_user_29_" style:list-style-name="L3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</style:style>
    <style:style style:name="P69" style:family="paragraph" style:parent-style-name="Text_20_body_20__28_user_29_" style:list-style-name="L2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</style:style>
    <style:style style:name="P70" style:family="paragraph" style:parent-style-name="Text_20_body_20__28_user_29_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</style:style>
    <style:style style:name="P71" style:family="paragraph" style:parent-style-name="Text_20_body_20__28_user_29_" style:list-style-name="L1">
      <style:paragraph-properties fo:margin-left="0.4465in" fo:margin-right="0in" fo:margin-top="0.0835in" fo:margin-bottom="0.0835in" style:contextual-spacing="false" fo:text-indent="0in" style:auto-text-indent="false">
        <style:tab-stops>
          <style:tab-stop style:position="0.5535in"/>
        </style:tab-stops>
      </style:paragraph-properties>
    </style:style>
    <style:style style:name="P72" style:family="paragraph" style:parent-style-name="Text_20_body_20__28_user_29_">
      <style:text-properties officeooo:paragraph-rsid="000e3dde"/>
    </style:style>
    <style:style style:name="P73" style:family="paragraph">
      <loext:graphic-properties draw:fill="none"/>
    </style:style>
    <style:style style:name="T1" style:family="text">
      <style:text-properties style:font-name="Aptos" fo:language="pl" fo:country="PL"/>
    </style:style>
    <style:style style:name="T2" style:family="text">
      <style:text-properties style:font-name="Aptos" fo:font-size="11pt" fo:language="pl" fo:country="PL" style:font-size-asian="11pt" style:font-size-complex="11pt"/>
    </style:style>
    <style:style style:name="T3" style:family="text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T4" style:family="text">
      <style:text-properties style:font-name="Aptos" fo:font-size="14pt" fo:language="pl" fo:country="PL" fo:font-weight="bold" style:font-size-asian="14pt" style:font-weight-asian="bold" style:font-size-complex="15pt" style:font-weight-complex="bold"/>
    </style:style>
    <style:style style:name="T5" style:family="text">
      <style:text-properties style:font-name="Aptos" fo:font-size="14pt" fo:language="pl" fo:country="PL" style:font-size-asian="14pt" style:font-size-complex="14pt"/>
    </style:style>
    <style:style style:name="T6" style:family="text">
      <style:text-properties style:font-name="Aptos" fo:font-size="14pt" fo:language="pl" fo:country="PL" style:font-size-asian="14pt" style:font-size-complex="15pt"/>
    </style:style>
    <style:style style:name="T7" style:family="text">
      <style:text-properties style:font-name="Aptos" fo:font-size="14pt" style:font-size-asian="14pt" style:font-size-complex="15pt"/>
    </style:style>
    <style:style style:name="T8" style:family="text">
      <style:text-properties style:font-name="Aptos" fo:font-size="14pt" fo:font-weight="bold" style:font-size-asian="14pt" style:font-weight-asian="bold" style:font-size-complex="15pt" style:font-weight-complex="bold"/>
    </style:style>
    <style:style style:name="T9" style:family="text"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T10" style:family="text">
      <style:text-properties officeooo:rsid="000e3d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0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70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7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0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70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7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7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7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7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7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7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09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4" svg:x="0in" svg:y="0in" svg:width="7.2681in" svg:height="10.2244in" draw:z-index="6">
        <draw:image xlink:href="Pictures/100000000000039000000503CDE1FBD7A398D1C0.png" xlink:type="simple" xlink:show="embed" xlink:actuate="onLoad" draw:mime-type="image/png"/>
      </draw:frame>
      <text:h text:style-name="P17" text:outline-level="1">SkySchool</text:h>
      <text:p text:style-name="P1"/>
      <text:p text:style-name="P2">Skład grupy:</text:p>
      <text:list xml:id="list884043947" text:style-name="WWNum1">
        <text:list-item text:start-value="0">
          <text:p text:style-name="P20">Sandra Dzieniszewska</text:p>
        </text:list-item>
        <text:list-item>
          <text:p text:style-name="P20">Hubert Milewski</text:p>
        </text:list-item>
        <text:list-item>
          <text:p text:style-name="P20">Patryk Wojtkielewicz</text:p>
        </text:list-item>
      </text:list>
      <text:p text:style-name="P2">Opis projektu</text:p>
      <text:p text:style-name="P3">Celem aplikacji internetowej jest zarządzanie sekcją spadochronową na lotnisku. Docelowo, każdy pracownik sekcji będzie miał dostęp do panelu w którym może zarządzać sekcją. Funkcjonalność aplikacji będzie pokrywać m.in.:</text:p>
      <text:list xml:id="list1827605465" text:style-name="WWNum2">
        <text:list-item text:start-value="0">
          <text:p text:style-name="P21">Grafik pracowników</text:p>
        </text:list-item>
        <text:list-item>
          <text:p text:style-name="P21">Zarządzanie wylotami</text:p>
        </text:list-item>
        <text:list-item>
          <text:p text:style-name="P21">Kontrola uprawnień skoczków oraz pilotów</text:p>
        </text:list-item>
        <text:list-item>
          <text:p text:style-name="P21">Organizacja wydarzeń</text:p>
        </text:list-item>
        <text:list-item>
          <text:p text:style-name="P21">Organizacja kursów i szkoleń</text:p>
        </text:list-item>
        <text:list-item>
          <text:p text:style-name="P21">Przechowywanie informacji dotyczących stanów spadochronów</text:p>
        </text:list-item>
      </text:list>
      <text:p text:style-name="P3">Dodatkowo, aplikacja będzie udostępniała interfejs który wyświetlony na układalni będzie informować skoczków o nadchodzących wylotach oraz przewidywanym czasie oczekiwania.</text:p>
      <text:p text:style-name="P2">Elementy interfesju</text:p>
      <text:list xml:id="list750006968" text:style-name="WWNum3">
        <text:list-item text:start-value="0">
          <text:p text:style-name="P22">„Dashboard” – podsumowanie wszystkich kluczowych informacji na dzień ze skokami</text:p>
        </text:list-item>
        <text:list-item>
          <text:p text:style-name="P22">Dodawanie skoczków, wylotów, osób, kursów, szkoleń, spadochronów itd.</text:p>
        </text:list-item>
        <text:list-item>
          <text:p text:style-name="P22">Logowanie i rejestracja</text:p>
        </text:list-item>
        <text:list-item>
          <text:p text:style-name="P22">Interfejs podsumuwujący najbliższe wyloty do wyświetlenia w układalni</text:p>
        </text:list-item>
      </text:list>
      <text:p text:style-name="P2">Korzyści mierzalne</text:p>
      <text:list xml:id="list427560582" text:style-name="WWNum4">
        <text:list-item text:start-value="0">
          <text:p text:style-name="P23">Lepsza organizacja czasem i pieniędzmi skoczków, pracowników oraz aeroklubu</text:p>
        </text:list-item>
        <text:list-item>
          <text:p text:style-name="P23">Sprawniejsze przygotowanie skoczków przed wylotem</text:p>
        </text:list-item>
      </text:list>
      <text:p text:style-name="P2">Korzyści niemierzalne</text:p>
      <text:list xml:id="list1725445993" text:style-name="WWNum5">
        <text:list-item text:start-value="0">
          <text:p text:style-name="P24">Zwiększone bezpieczeństwo na strefie</text:p>
        </text:list-item>
        <text:list-item>
          <text:p text:style-name="P24">Ułatwione poruszanie się po strefie dla nowych skoczków</text:p>
        </text:list-item>
      </text:list>
      <text:p text:style-name="P3"/>
      <text:h text:style-name="P18" text:outline-level="2"><text:soft-page-break/>SŁOWNIK POJĘĆ</text:h>
      <text:h text:style-name="P19" text:outline-level="3">Organizacja skoków</text:h>
      <text:list xml:id="list4263959225" text:style-name="WWNum6">
        <text:list-item text:start-value="0">
          <text:p text:style-name="P25">Skok – opuszczenie statku powietrznego</text:p>
        </text:list-item>
        <text:list-item>
          <text:p text:style-name="P25">Wysokość skoku – wysokość z której wyskakujemy</text:p>
        </text:list-item>
        <text:list-item>
          <text:p text:style-name="P25">Wysokość otwarcia – wysokość na jakiej rozpoczynamy otwarcie spadochronu</text:p>
        </text:list-item>
        <text:list-item>
          <text:p text:style-name="P25">Wysokość zawiśnięcia – wysokość na jakiej spadochron w pełni się otworzy</text:p>
        </text:list-item>
        <text:list-item>
          <text:p text:style-name="P25">Wysokość awaryjna – wysokość na jakiej decydujemy, czy lądujemy na spadochronie jaki mamy nad główą czy przesiadamy się na zapasowy</text:p>
        </text:list-item>
        <text:list-item>
          <text:p text:style-name="P25">Separacja – czas liczony w sekundach pomiędzy wyskokiem poszczególnych skoczków / grup skoczków</text:p>
        </text:list-item>
        <text:list-item>
          <text:p text:style-name="P25">Strefa zrzutu (Drop zone, DZ) – miejsce przeznaczone do lądowania</text:p>
        </text:list-item>
        <text:list-item>
          <text:p text:style-name="P25">Strefa oczekiwania – miejsce w którym zbijamy wysokość po pomyślnym otwarciu spadochronu</text:p>
        </text:list-item>
        <text:list-item>
          <text:p text:style-name="P25">Runda – “pattern” który wykonujemy przed lądowaniem. Na 300, 200 oraz 100m wykonujemy zakręt 90 stopni w lewo / prawo w celu ustawienia się pod wiatr I uniknięcia kolizji z innymi skoczkami</text:p>
        </text:list-item>
      </text:list>
      <text:h text:style-name="P19" text:outline-level="3">Budowa spadochronu</text:h>
      <text:list xml:id="list3902451788" text:style-name="WWNum7">
        <text:list-item text:start-value="0">
          <text:p text:style-name="P26">Czasza – materiał służący do spowolnienia upadku spadochroniarza</text:p>
        </text:list-item>
        <text:list-item>
          <text:p text:style-name="P26">Spadochron główny – czasza używana w 99% przypadków</text:p>
        </text:list-item>
        <text:list-item>
          <text:p text:style-name="P26">Spadochron zapasowy – czasza używana w 1% przypadków</text:p>
        </text:list-item>
        <text:list-item>
          <text:p text:style-name="P26">Paczka – opakowanie do którego chowamy czaszę</text:p>
        </text:list-item>
        <text:list-item>
          <text:p text:style-name="P26">Kontener – opakowanie do którego chowamy paczkę</text:p>
        </text:list-item>
        <text:list-item>
          <text:p text:style-name="P26">Uprząż – uprząż którą nakłada skoczek, do niej przyszyty jest kontener</text:p>
        </text:list-item>
        <text:list-item>
          <text:p text:style-name="P26">Pilocik – “spadochronik” służący do wyciągnięcia paczki z kontenera. Uchwyt pilocika znajduje się na plecach z prawej strony, w okolicach bioder</text:p>
        </text:list-item>
        <text:list-item>
          <text:p text:style-name="P26">Linki – łączą taśmy nośne z czaszą</text:p>
        </text:list-item>
        <text:list-item>
          <text:p text:style-name="P26">Taśmy nośne – łączą linki z systemem 3 kółek</text:p>
        </text:list-item>
        <text:list-item>
          <text:p text:style-name="P26">System 3 kółek – sposób mocowania czaszy spadochronu głównego pozwalający na łatwe niezawodne wypięcie go w razie awarii.</text:p>
        </text:list-item>
        <text:list-item>
          <text:p text:style-name="P26">Uchwyty – znajdują się w okolicach brzucha, prawy służy do wypięcia czaszy głównej, lewy służy do otwarcia czaszy zapasowej</text:p>
        </text:list-item>
      </text:list>
      <text:p text:style-name="P3"/>
      <text:p text:style-name="P3"/>
      <text:h text:style-name="P19" text:outline-level="3">Rodzaje skoków</text:h>
      <text:list xml:id="list2372557541" text:style-name="WWNum8">
        <text:list-item text:start-value="0">
          <text:p text:style-name="P27">Tandem – skok z instruktorem</text:p>
        </text:list-item>
        <text:list-item>
          <text:p text:style-name="P27">Solo – skok w pojedynkę</text:p>
        </text:list-item>
        <text:list-item>
          <text:p text:style-name="P27"><text:soft-page-break/>RW – skok w grupie, wszyscy spadają na brzuchu</text:p>
        </text:list-item>
        <text:list-item>
          <text:p text:style-name="P27">FF – skok w grupie, wszyscy spadają na siedząco lub głową do dołu</text:p>
        </text:list-item>
        <text:list-item>
          <text:p text:style-name="P27">TRACK – skok w grupie, wszyscy przemieszczają się w danym kierunku</text:p>
        </text:list-item>
        <text:list-item>
          <text:p text:style-name="P27">Wingsuit – skok solo / w grupie, skoczkowie ubrani są w Wingsuity</text:p>
        </text:list-item>
        <text:list-item>
          <text:p text:style-name="P27">Static line – skok solo z natychmiastowym otwarciem zainicijowanym przez linę zamocowaną do statku powietrznego</text:p>
        </text:list-item>
      </text:list>
      <text:h text:style-name="P19" text:outline-level="3">Role na lotnisku</text:h>
      <text:list xml:id="list2466351411" text:style-name="WWNum9">
        <text:list-item text:start-value="0">
          <text:p text:style-name="P28">Kierownik skoków – odpowiedzialny za poprawny przebieg skoków</text:p>
        </text:list-item>
        <text:list-item>
          <text:p text:style-name="P28">Układacz – osoba układająca spadochrony główne</text:p>
        </text:list-item>
        <text:list-item>
          <text:p text:style-name="P28">Rigger – mechanik spadochronowy, odpowiedzialny za układanie spadochronu zapasowego oraz naprawy</text:p>
        </text:list-item>
        <text:list-item>
          <text:p text:style-name="P28">Instruktor AFF – instruktor z uprawnieniami na szkolenie przeprowadzanie szkoleń AFF</text:p>
        </text:list-item>
        <text:list-item>
          <text:p text:style-name="P28">Instruktor SL – instruktor z uprawnieniami na szkolenie przeprowadzanie szkoleń SL</text:p>
        </text:list-item>
        <text:list-item>
          <text:p text:style-name="P28">Instruktor – osoba w uprawnieniami instruktora</text:p>
        </text:list-item>
        <text:list-item>
          <text:p text:style-name="P28">Kamerzysta – skoczek wyskakujący obok tandemu, nagrywając go</text:p>
        </text:list-item>
        <text:list-item>
          <text:p text:style-name="P28">Spotter – wyznaczony skoczek w samolocie odpowiedzialny za upewnienie się, czy znajdujemy się w miejscu zrzutu</text:p>
        </text:list-item>
        <text:list-item>
          <text:p text:style-name="P28">Wyrzucający – wyznaczony skoczek odpowiedzialny za prawidłowe opuszczenie statku powietrznego przez skoczków</text:p>
        </text:list-item>
      </text:list>
      <text:h text:style-name="P19" text:outline-level="3">Procedury</text:h>
      <text:list xml:id="list1902889853" text:style-name="WWNum10">
        <text:list-item text:start-value="0">
          <text:p text:style-name="P29">Otwarcie – proces otwarcia głównego spadochronu</text:p>
        </text:list-item>
        <text:list-item>
          <text:p text:style-name="P29">Cutaway – proces odczepienia głównego spadochronu</text:p>
        </text:list-item>
        <text:list-item>
          <text:p text:style-name="P29">RSL – system otwierający spadochron zapasowy przy pomocy spadochronu głównego</text:p>
        </text:list-item>
        <text:list-item>
          <text:p text:style-name="P29">MARD – modyfikacja RSL</text:p>
        </text:list-item>
        <text:list-item>
          <text:p text:style-name="P29">Automat – (ang. Automatic Activation Device) komputer umieszczony w kontenerze który bada prędkość opadania skoczka I aktualną wysokość. W razie wykrycia nie otwarcia spadochronu poniżej podanej wysokości automat samodzielnie otwiera spadochron zapasowy</text:p>
        </text:list-item>
        <text:list-item>
          <text:p text:style-name="P29">Procedura awayjna – proces postępowania w przypadku wystąpienia awarii.</text:p>
        </text:list-item>
        <text:list-item>
          <text:p text:style-name="P29">Gear check – kontrola przed skokiem</text:p>
        </text:list-item>
        <text:list-item>
          <text:p text:style-name="P29">Briefing – omówienie wylotu</text:p>
        </text:list-item>
      </text:list>
      <text:p text:style-name="P3"/>
      <text:h text:style-name="P19" text:outline-level="3"><text:soft-page-break/>Parametry</text:h>
      <text:list xml:id="list1331462884" text:style-name="WWNum11">
        <text:list-item text:start-value="0">
          <text:p text:style-name="P30">Wysokość – wysokość nad poziomem ziemi (AGL) mierzona w metrach</text:p>
        </text:list-item>
        <text:list-item>
          <text:p text:style-name="P30">Prędkość opadania – prędkość z jaką się spada. Po osiągnięciu prędkości krytycznej, dla skoczka na brzuchu wynosi około 50 m/s, w przypadku skoku FF może być bliższa 80 m/s</text:p>
        </text:list-item>
        <text:list-item>
          <text:p text:style-name="P30">Wing Loading (WL) – stosunek masy skoczka (masa osoby + ubrań + sprzętu + spadochronu) do powierzchni czaszy spadochronu głównego, wyrażony w proporcji funtów do stóp kwadratowych (lbs/ft sq)</text:p>
        </text:list-item>
      </text:list>
      <text:h text:style-name="P19" text:outline-level="3">Inne</text:h>
      <text:list xml:id="list451787437" text:style-name="WWNum12">
        <text:list-item text:start-value="0">
          <text:p text:style-name="P31">Książka skoków – miejsce w którym dokumentujemy skoki</text:p>
        </text:list-item>
        <text:list-item>
          <text:p text:style-name="P31">Licencja – uprawnienia skoczka, w Polsce PJ, w USA USPA</text:p>
        </text:list-item>
      </text:list>
      <text:p text:style-name="Text_20_body_20__28_user_29_"><draw:connector text:anchor-type="paragraph" draw:z-index="3" draw:name="Łącznik prosty 1" draw:style-name="gr1" draw:text-style-name="P73" draw:type="line" svg:x1="-0.7311in" svg:y1="0.1654in" svg:x2="7.9642in" svg:y2="0.1654in" svg:d="M-1857 420h22086" svg:viewBox="0 0 22087 2"><text:p/></draw:connector><text:span text:style-name="Domyślna_20_czcionka_20_akapitu"><text:span text:style-name="T1"/></text:span></text:p>
      <text:p text:style-name="P4">OPIS AKTORÓW</text:p>
      <text:p text:style-name="P2">1. Kierownik skoków (Manifest / Jumpmaster)</text:p>
      <text:p text:style-name="P3">Jest to główny aktor systemu, posiadający najszerszy zakres uprawnień. Odpowiada za koordynację całości działań na strefie.</text:p>
      <text:list xml:id="list1785518926" text:style-name="WWNum13">
        <text:list-item text:start-value="0">
          <text:p text:style-name="P32">Główne zadania: Zarządzanie grafikiem personelu, dodawanie nowych skoczków, planowanie i tworzenie wylotów, przypisywanie skoczków do konkretnych lotów oraz prowadzenie briefingów.</text:p>
        </text:list-item>
        <text:list-item>
          <text:p text:style-name="P32">Powiązania: Ma dostęp do modułów zarządzania personelem, wylotami oraz szkoleniami.</text:p>
        </text:list-item>
      </text:list>
      <text:p text:style-name="P2">2. Skoczek (Skydiver)</text:p>
      <text:p text:style-name="P3">Użytkownik końcowy, dla którego świadczone są usługi strefy.</text:p>
      <text:list xml:id="list1551428749" text:style-name="WWNum14">
        <text:list-item text:start-value="0">
          <text:p text:style-name="P33">Główne zadania: Rejestracja na szkolenia oraz udział w kursach i szkoleniach organizowanych przez strefę.</text:p>
        </text:list-item>
        <text:list-item>
          <text:p text:style-name="P33">Ważna funkcja: Musi przejść proces Logowania, aby system zidentyfikował jego uprawnienia i status.</text:p>
        </text:list-item>
      </text:list>
      <text:p text:style-name="P2">3. Pilot</text:p>
      <text:p text:style-name="P3">Aktor operacyjny odpowiedzialny za techniczny aspekt wylotu.</text:p>
      <text:list xml:id="list1272532539" text:style-name="WWNum15">
        <text:list-item text:start-value="0">
          <text:p text:style-name="P34">Główne zadania: Interaguje z systemem w zakresie monitorowania stanu wylotu. Dzięki temu wie, kiedy wylot jest gotowy, ilu skoczków jest na pokładzie i jakie są parametry zrzutu.</text:p>
        </text:list-item>
      </text:list>
      <text:p text:style-name="P2">4. Rigger (Mechanik spadochronowy)</text:p>
      <text:p text:style-name="P3">Specjalista odpowiedzialny za bezpieczeństwo i stan techniczny sprzętu.</text:p>
      <text:list xml:id="list2457648123" text:style-name="WWNum16">
        <text:list-item text:start-value="0">
          <text:p text:style-name="P35">Główne zadania: Wykonuje kontrolę stanu spadochronu oraz przeprowadza procedurę Gear check (sprawdzenie sprzętu przed skokiem). Może również zajmować się układaniem spadochronów (podobnie jak układacz).</text:p>
        </text:list-item>
      </text:list>
      <text:p text:style-name="P2">5. Układacz (Packer)</text:p>
      <text:p text:style-name="P3"><text:soft-page-break/>Osoba odpowiedzialna za przygotowanie spadochronów do ponownego użycia.</text:p>
      <text:list xml:id="list558766496" text:style-name="WWNum17">
        <text:list-item text:start-value="0">
          <text:p text:style-name="P36">Główne zadania: Jego główną interakcją z systemem jest układanie spadochronu. Podobnie jak Rigger i Skoczek, może zgłaszać usterki sprzętu, co jest oznaczone relacją &lt;&lt;extend&gt;&gt;.</text:p>
        </text:list-item>
      </text:list>
      <text:p text:style-name="P2">6. System wyświetlania informacji</text:p>
      <text:p text:style-name="P3">Jest to aktor niebędący człowiekiem (system zewnętrzny, np. monitor w hangarze lub zewnętrzna aplikacja).</text:p>
      <text:list xml:id="list1222708126" text:style-name="WWNum18">
        <text:list-item text:start-value="0">
          <text:p text:style-name="P37">Główne zadania: Odpowiada za wyświetlanie wylotów w układalni. Pobiera dane z modułu "Zarządzanie wylotami", aby informować skoczków i personel o zbliżających się startach.</text:p>
        </text:list-item>
      </text:list>
      <text:p text:style-name="P5"/>
      <text:p text:style-name="P4">DIAGRAM PRZYPADKÓW UŻYCIA</text:p>
      <text:p text:style-name="P5"/>
      <text:p text:style-name="Text_20_body_20__28_user_29_"><draw:frame draw:style-name="fr3" draw:name="Obraz 4" text:anchor-type="as-char" svg:y="0in" svg:width="7.2681in" style:rel-width="scale" svg:height="4.7535in" style:rel-height="scale" draw:z-index="0"><draw:image xlink:href="Pictures/1000000000000450000002D2B06A4AAE0A85BB10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6">OPISY PRZYPADKÓW UŻYCIA</text:p>
      <text:p text:style-name="P6"><text:soft-page-break/></text:p>
      <text:list xml:id="list2817112069" text:style-name="WWNum19">
        <text:list-item text:start-value="1">
          <text:p text:style-name="P43">UKŁADANIE SPADOCHRONU</text:p>
        </text:list-item>
      </text:list>
      <text:list xml:id="list1474851942" text:style-name="WWNum29">
        <text:list-item text:start-value="1">
          <text:p text:style-name="P52">Uczestniczący aktorzy:</text:p>
        </text:list-item>
      </text:list>
      <text:list xml:id="list3114307282" text:style-name="WWNum20">
        <text:list-item text:start-value="0">
          <text:p text:style-name="P53">Układacz (inicjuje proces) – osoba odpowiedzialna za fizyczne złożenie czaszy i wprowadzenie danych do systemu.</text:p>
        </text:list-item>
        <text:list-item>
          <text:p text:style-name="P53">Rigger (aktor wspierający) – nadzoruje stan techniczny i interweniuje w sytuacjach wymagających naprawy.</text:p>
        </text:list-item>
      </text:list>
      <text:list xml:id="list185202808876043" text:style-name="WWNum29">
        <text:list-item>
          <text:p text:style-name="P52">Podstawowy ciąg zdarzeń:</text:p>
        </text:list-item>
      </text:list>
      <text:list xml:id="list2720560446" text:style-name="WWNum21">
        <text:list-item text:start-value="1">
          <text:p text:style-name="P54">Logowanie: Układacz loguje się do systemu (proces zawiera w sobie przypadek użycia "Logowanie").</text:p>
        </text:list-item>
        <text:list-item>
          <text:p text:style-name="P54">Wybór sprzętu: Układacz wybiera konkretny spadochron do ułożenia z listy dostępnego sprzętu.</text:p>
        </text:list-item>
        <text:list-item>
          <text:p text:style-name="P54">Weryfikacja: System automatycznie sprawdza, czy spadochron nie wymaga przeglądu technicznego (proces rozszerzony o przypadek "Kontrola stanu spadochronu").</text:p>
        </text:list-item>
        <text:list-item>
          <text:p text:style-name="P54">Praca fizyczna: Układacz przystępuje do fizycznego układania czaszy spadochronu.</text:p>
        </text:list-item>
        <text:list-item>
          <text:p text:style-name="P54">Potwierdzenie: Po zakończeniu układania, Układacz wprowadza do systemu potwierdzenie wykonania pracy.</text:p>
        </text:list-item>
        <text:list-item>
          <text:p text:style-name="P54">Rejestracja danych: System zapisuje datę, godzinę oraz identyfikator Układacza w karcie technicznej sprzętu.</text:p>
        </text:list-item>
        <text:list-item>
          <text:p text:style-name="P54">Aktualizacja statusu: System zmienia status spadochronu na "Gotowy do skoku".</text:p>
        </text:list-item>
      </text:list>
      <text:list xml:id="list185202399573035" text:style-name="WWNum29">
        <text:list-item>
          <text:p text:style-name="P52">Alternatywne ciągi zdarzeń:</text:p>
        </text:list-item>
      </text:list>
      <text:list xml:id="list904544244" text:style-name="WWNum22">
        <text:list-item text:start-value="0">
          <text:p text:style-name="P55">Wykrycie usterki (rozszerzenie kroku 4): Jeśli w trakcie układania Układacz stwierdzi uszkodzenie lub zużycie materiału, wywołuje przypadek "Zgłaszanie usterki spadochronu". System blokuje wtedy możliwość oznaczenia sprzętu jako gotowy i zmienia jego status na "W naprawie".</text:p>
        </text:list-item>
        <text:list-item>
          <text:p text:style-name="P55">Negatywny wynik kontroli (krok 3): Jeśli system stwierdzi przekroczenie terminu ważności przeglądu, odmawia rejestracji ułożenia i wyświetla komunikat o konieczności przekazania sprzętu Riggerowi.</text:p>
        </text:list-item>
      </text:list>
      <text:list xml:id="list185203531835249" text:style-name="WWNum29">
        <text:list-item>
          <text:p text:style-name="P52">Zależności czasowe:</text:p>
        </text:list-item>
      </text:list>
      <text:list xml:id="list4026112170" text:style-name="WWNum23">
        <text:list-item text:start-value="0">
          <text:p text:style-name="P62"><text:span text:style-name="Domyślna_20_czcionka_20_akapitu"><text:span text:style-name="T2">Częstotliwość: od 10 do 50 razy dziennie w zależności od intensywności skoków.</text:span></text:span></text:p>
        </text:list-item>
        <text:list-item>
          <text:p text:style-name="P62"><text:span text:style-name="Domyślna_20_czcionka_20_akapitu"><text:span text:style-name="T2">Przewidywane spiętrzenia: dni weekendowe oraz podczas sprzyjających warunków atmosferycznych, bezpośrednio po zakończeniu serii skoków (wylotów)".</text:span></text:span></text:p>
        </text:list-item>
        <text:list-item>
          <text:p text:style-name="P56">Typowy czas realizacji: 15 – 20 minut</text:p>
        </text:list-item>
        <text:list-item>
          <text:p text:style-name="P62"><text:span text:style-name="Domyślna_20_czcionka_20_akapitu"><text:span text:style-name="T2">Maksymalny czas realizacji: 40 minut (w przypadku skomplikowanego układania lub problemów technicznych)</text:span></text:span></text:p>
        </text:list-item>
      </text:list>
      <text:list xml:id="list185202180831824" text:style-name="WWNum29">
        <text:list-item>
          <text:p text:style-name="P52">Wartości uzyskane przez aktorów:</text:p>
        </text:list-item>
      </text:list>
      <text:list xml:id="list131694268" text:style-name="WWNum24">
        <text:list-item text:start-value="0">
          <text:p text:style-name="P57">Gwarancja prawidłowego zarejestrowania przygotowania sprzętu w systemie.</text:p>
        </text:list-item>
        <text:list-item>
          <text:p text:style-name="P57">Możliwość przypisania spadochronu do konkretnego wylotu przez Kierownika skoków.</text:p>
        </text:list-item>
        <text:list-item>
          <text:p text:style-name="P57">Zachowanie pełnej i ciągłej dokumentacji technicznej spadochronu.</text:p>
        </text:list-item>
      </text:list>
      <text:p text:style-name="P9"><text:soft-page-break/>wykonała: Sandra Dzieniszewska</text:p>
      <text:list xml:id="list185202102959815" text:style-name="WWNum19">
        <text:list-item>
          <text:p text:style-name="P43">PLANOWANIE I TWORZENIE WYLOTÓW.</text:p>
        </text:list-item>
      </text:list>
      <text:p text:style-name="P2">1. Uczestniczący aktorzy:</text:p>
      <text:list xml:id="list880357321" text:style-name="WWNum25">
        <text:list-item text:start-value="0">
          <text:p text:style-name="P38">Kierownik skoków</text:p>
        </text:list-item>
      </text:list>
      <text:p text:style-name="P2">2. Podstawowy ciąg zdarzeń:</text:p>
      <text:list xml:id="list3279829335" text:style-name="WWNum26">
        <text:list-item text:start-value="0">
          <text:p text:style-name="P39">Kierownik skoków wybiera funkcję tworzenia nowego wylotu w module „Zarządzanie wylotami”.</text:p>
        </text:list-item>
        <text:list-item>
          <text:p text:style-name="P39">System otwiera formularz lotu.</text:p>
        </text:list-item>
        <text:list-item>
          <text:p text:style-name="P39">Kierownik definiuje parametry techniczne wylotu (np. numer lotu, godzina).</text:p>
        </text:list-item>
        <text:list-item>
          <text:p text:style-name="P39">Po zakończeniu przypisywania osób, Kierownik zatwierdza utworzenie wylotu.</text:p>
        </text:list-item>
        <text:list-item>
          <text:p text:style-name="P39">System zapisuje gotowy plan wylotu w bazie danych</text:p>
        </text:list-item>
        <text:list-item>
          <text:p text:style-name="P39">Kierownik skoków omawia ze skoczkami jak będzie przebiegać wylot (rozszerzenie przypadku „Prowadzenie briefingu”)</text:p>
        </text:list-item>
      </text:list>
      <text:p text:style-name="P2">3. Alternatywne ciągi zdarzeń:</text:p>
      <text:list xml:id="list2136319461" text:style-name="WWNum27">
        <text:list-item text:start-value="0">
          <text:p text:style-name="P40">a) Przerwanie tworzenia wylotu:</text:p>
          <text:list>
            <text:list-item>
              <text:p text:style-name="P40">Kierownik skoków rezygnuje z tworzenia lotu przed jego zatwierdzeniem.</text:p>
            </text:list-item>
            <text:list-item>
              <text:p text:style-name="P40">System usuwa wprowadzone dane i nie tworzy rekordu wylotu.</text:p>
            </text:list-item>
          </text:list>
        </text:list-item>
        <text:list-item>
          <text:p text:style-name="P40">b) Błąd walidacji danych wylotu:</text:p>
          <text:list>
            <text:list-item>
              <text:p text:style-name="P40">Kierownik wprowadza błędne dane (np. godzina z przeszłości).</text:p>
            </text:list-item>
            <text:list-item>
              <text:p text:style-name="P40">System wyświetla komunikat o błędzie i prosi o poprawę parametrów przed przejściem do przypisywania skoczków.</text:p>
            </text:list-item>
          </text:list>
        </text:list-item>
      </text:list>
      <text:p text:style-name="P2">4. Zależności czasowe:</text:p>
      <text:list xml:id="list3678787402" text:style-name="WWNum28">
        <text:list-item text:start-value="0">
          <text:p text:style-name="P41">Częstotliwość wykonania: Od 5 do 30 razy dziennie (zależnie od intensywności skoków).</text:p>
        </text:list-item>
        <text:list-item>
          <text:p text:style-name="P41">Przewidywane spiętrzenia: Poranek oraz okresy po przerwach pogodowych.</text:p>
        </text:list-item>
        <text:list-item>
          <text:p text:style-name="P41">Typowy czas realizacji: 1-2 minuty.</text:p>
        </text:list-item>
        <text:list-item>
          <text:p text:style-name="P41">Maksymalny czas realizacji: 5-10 minut.</text:p>
        </text:list-item>
      </text:list>
      <text:list xml:id="list185203773627418" text:style-name="WWNum29">
        <text:list-item>
          <text:p text:style-name="P42">Wartości uzyskiwane przez aktorów:</text:p>
        </text:list-item>
      </text:list>
      <text:list xml:id="list185202236780106" text:style-name="WWNum28">
        <text:list-item>
          <text:p text:style-name="P41">Gwarancja zarejestrowania każdego wylotu w systemie</text:p>
        </text:list-item>
        <text:list-item>
          <text:p text:style-name="P41">Możliwość łatwego sprawdzenia składu danego wylotu</text:p>
        </text:list-item>
        <text:list-item>
          <text:p text:style-name="P41">Sprawne uaktualnianie listy planowanych lotów</text:p>
        </text:list-item>
      </text:list>
      <text:p text:style-name="P7"/>
      <text:p text:style-name="P9">wykonał: Hubert Milewski</text:p>
      <text:p text:style-name="P9"><text:soft-page-break/></text:p>
      <text:p text:style-name="P10"/>
      <text:p text:style-name="P7">3) GEAR CHECK (KONTROLA SPADOCHRONU)</text:p>
      <text:p text:style-name="P7">1. Uczestniczący aktorzy:</text:p>
      <text:list xml:id="list2284240635" text:style-name="WWNum30">
        <text:list-item text:start-value="0">
          <text:p text:style-name="P63"><text:span text:style-name="Domyślna_20_czcionka_20_akapitu"><text:span text:style-name="T3">Aktor główny:</text:span></text:span><text:span text:style-name="Domyślna_20_czcionka_20_akapitu"><text:span text:style-name="T5"> Kierownik skoków</text:span></text:span></text:p>
        </text:list-item>
        <text:list-item>
          <text:p text:style-name="P63"><text:span text:style-name="Domyślna_20_czcionka_20_akapitu"><text:span text:style-name="T3">Aktorzy wspierający:</text:span></text:span><text:span text:style-name="Domyślna_20_czcionka_20_akapitu"><text:span text:style-name="T5"> Skoczek, Rigger, Układacz</text:span></text:span></text:p>
        </text:list-item>
      </text:list>
      <text:p text:style-name="P7">2. Podstawowy ciąg zdarzeń:</text:p>
      <text:list xml:id="list208753377" text:style-name="WWNum31">
        <text:list-item text:start-value="0">
          <text:p text:style-name="P44">Skoczek zgłasza się do kontroli sprzętu przed planowanym wylotem.</text:p>
        </text:list-item>
        <text:list-item>
          <text:p text:style-name="P44">Kierownik skoków inicjuje funkcję Gear Check w systemie.</text:p>
        </text:list-item>
        <text:list-item>
          <text:p text:style-name="P44">Kierownik skoków dokonuje fizycznego sprawdzenia: kompletności wyposażenia (spadochron, wysokościomierz, kask, nóż), ustawienia automatu AAD, poprawności zapięć i regulacji uprzęży oraz aktualności przeglądu.</text:p>
        </text:list-item>
        <text:list-item>
          <text:p text:style-name="P44">System rejestruje fakt wykonania kontroli w bazie danych.</text:p>
        </text:list-item>
        <text:list-item>
          <text:p text:style-name="P44">W przypadku pozytywnego wyniku weryfikacji – Gear Check zostaje zakończony sukcesem i dopuszczeniem skoczka.</text:p>
        </text:list-item>
      </text:list>
      <text:p text:style-name="P7">3. Alternatywne ciągi zdarzeń:</text:p>
      <text:p text:style-name="P8">a) Wykrycie nieprawidłowości:</text:p>
      <text:list xml:id="list2117806129" text:style-name="WWNum32">
        <text:list-item>
          <text:list>
            <text:list-item>
              <text:p text:style-name="P45">Kierownik wykrywa usterkę podczas kontroli.</text:p>
            </text:list-item>
            <text:list-item>
              <text:p text:style-name="P45">System uruchamia rozszerzenie przypadku „Zgłaszanie usterki spadochronu”.</text:p>
            </text:list-item>
            <text:list-item>
              <text:p text:style-name="P45">Sprzęt zostaje oznaczony jako niedopuszczony do skoku, a skoczek skierowany do Riggera lub Układacza.</text:p>
            </text:list-item>
            <text:list-item>
              <text:p text:style-name="P45">Po usunięciu usterki ponawiany jest scenariusz podstawowy.</text:p>
            </text:list-item>
          </text:list>
        </text:list-item>
      </text:list>
      <text:p text:style-name="P8">b) Brak ważnego przeglądu:</text:p>
      <text:list xml:id="list185429877050237" text:continue-numbering="true" text:style-name="WWNum32">
        <text:list-item>
          <text:list>
            <text:list-item>
              <text:p text:style-name="P45">Kierownik zauważa brak ważności przeglądu sprzętu.</text:p>
            </text:list-item>
            <text:list-item>
              <text:p text:style-name="P45">Sprzęt zostaje oznaczony jako niedopuszczony do skoku.</text:p>
            </text:list-item>
            <text:list-item>
              <text:p text:style-name="P45">Skoczek zostaje skierowany do Riggera lub Układacza.</text:p>
            </text:list-item>
            <text:list-item>
              <text:p text:style-name="P45">Po wykonaniu przeglądu ponawiany jest scenariusz podstawowy.</text:p>
            </text:list-item>
          </text:list>
        </text:list-item>
      </text:list>
      <text:p text:style-name="P8">c) Awaria systemu:</text:p>
      <text:list xml:id="list185428159438754" text:continue-numbering="true" text:style-name="WWNum32">
        <text:list-item>
          <text:list>
            <text:list-item>
              <text:p text:style-name="P45">Podczas rejestracji występuje błąd systemu.</text:p>
            </text:list-item>
            <text:list-item>
              <text:p text:style-name="P45"><text:soft-page-break/>Kontrola zostaje przeprowadzona manualnie.</text:p>
            </text:list-item>
            <text:list-item>
              <text:p text:style-name="P45">Dane są wprowadzane do systemu po jego przywróceniu, po czym następuje powrót do scenariusza podstawowego.</text:p>
            </text:list-item>
          </text:list>
        </text:list-item>
      </text:list>
      <text:p text:style-name="P7">4. Zależności czasowe:</text:p>
      <text:list xml:id="list1792614328" text:style-name="WWNum33">
        <text:list-item text:start-value="0">
          <text:p text:style-name="P64"><text:span text:style-name="Domyślna_20_czcionka_20_akapitu"><text:span text:style-name="T3">Częstotliwość wykonania:</text:span></text:span><text:span text:style-name="Domyślna_20_czcionka_20_akapitu"><text:span text:style-name="T5"> Od 1 do 300 operacji dziennie (przed każdym skokiem każdego skoczka).</text:span></text:span></text:p>
        </text:list-item>
        <text:list-item>
          <text:p text:style-name="P64"><text:span text:style-name="Domyślna_20_czcionka_20_akapitu"><text:span text:style-name="T3">Przewidywane spiętrzenia:</text:span></text:span><text:span text:style-name="Domyślna_20_czcionka_20_akapitu"><text:span text:style-name="T5"> Przed każdym wylotem, podczas wydarzeń oraz przy działaniu więcej niż jednego samolotu.</text:span></text:span></text:p>
        </text:list-item>
        <text:list-item>
          <text:p text:style-name="P64"><text:span text:style-name="Domyślna_20_czcionka_20_akapitu"><text:span text:style-name="T3">Typowy czas realizacji:</text:span></text:span><text:span text:style-name="Domyślna_20_czcionka_20_akapitu"><text:span text:style-name="T5"> 2 minuty na osobę.</text:span></text:span></text:p>
        </text:list-item>
        <text:list-item>
          <text:p text:style-name="P64"><text:span text:style-name="Domyślna_20_czcionka_20_akapitu"><text:span text:style-name="T3">Maksymalny czas realizacji:</text:span></text:span><text:span text:style-name="Domyślna_20_czcionka_20_akapitu"><text:span text:style-name="T5"> 10 minut na osobę (w przypadku usterki czas zależny od naprawy).</text:span></text:span></text:p>
        </text:list-item>
      </text:list>
      <text:p text:style-name="P7">5. Wartości uzyskiwane przez aktorów:</text:p>
      <text:list xml:id="list908656928" text:style-name="WWNum34">
        <text:list-item text:start-value="0">
          <text:p text:style-name="P46">Pewność procedur bezpieczeństwa i minimalizacja ryzyka wypadków (Kierownik skoków).</text:p>
        </text:list-item>
        <text:list-item>
          <text:p text:style-name="P46">Udokumentowanie wykonania kontroli oraz formalne dopuszczenie do skoku (Kierownik skoków, Skoczek).</text:p>
        </text:list-item>
        <text:list-item>
          <text:p text:style-name="P46">Pewność poprawnego przygotowania sprzętu i zwiększone bezpieczeństwo (Skoczek).</text:p>
        </text:list-item>
        <text:list-item>
          <text:p text:style-name="P46">Informacja o stanie technicznym sprzętu i możliwość szybkiej reakcji na usterki (Rigger/Układacz).</text:p>
        </text:list-item>
      </text:list>
      <text:p text:style-name="P10"/>
      <text:p text:style-name="P9">wykonał: Patryk Wojtkielewicz</text:p>
      <text:p text:style-name="P14"/>
      <text:p text:style-name="Text_20_body_20__28_user_29_"><draw:connector text:anchor-type="paragraph" draw:z-index="1" draw:name="Łącznik prosty 2" draw:style-name="gr1" draw:text-style-name="P73" draw:type="line" svg:x1="-0.7311in" svg:y1="0.1654in" svg:x2="7.9642in" svg:y2="0.1654in" svg:d="M-1857 420h22086" svg:viewBox="0 0 22087 2"><text:p/></draw:connector></text:p>
      <text:p text:style-name="Text_20_body_20__28_user_29_"/>
      <text:p text:style-name="P4">DIAGRAM KLAS</text:p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4"/>
      <text:p text:style-name="Text_20_body_20__28_user_29_"><draw:frame draw:style-name="fr2" draw:name="Image1" text:anchor-type="paragraph" svg:width="7.2681in" style:rel-width="scale" svg:height="5.7929in" style:rel-height="scale" draw:z-index="2"><draw:image xlink:href="Pictures/100000010000050B00000405AC9ACFCC5196A552.png" xlink:type="simple" xlink:show="embed" xlink:actuate="onLoad" draw:mime-type="image/png"/></draw:frame><text:span text:style-name="Domyślna_20_czcionka_20_akapitu"><text:span text:style-name="T9"/></text:span></text:p>
      <text:list xml:id="list1246534079" text:style-name="L1">
        <text:list-item>
          <text:p text:style-name="P65"><text:span text:style-name="Domyślna_20_czcionka_20_akapitu"><text:span text:style-name="T4">GearCheck - </text:span></text:span><text:span text:style-name="Domyślna_20_czcionka_20_akapitu"><text:span text:style-name="T6">Reprezentuje kontrolę techniczną spadochronu.</text:span></text:span></text:p>
        </text:list-item>
      </text:list>
      <text:p text:style-name="P11">Atrybuty:</text:p>
      <text:list xml:id="list3120168015" text:style-name="L2">
        <text:list-item>
          <text:p text:style-name="P47">id: int </text:p>
        </text:list-item>
        <text:list-item>
          <text:p text:style-name="P47">data: Date </text:p>
        </text:list-item>
        <text:list-item>
          <text:p text:style-name="P47">wynik: String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2391654900" text:style-name="L3">
        <text:list-item>
          <text:p text:style-name="P49">wykonajCheck(): void – przeprowadza kontrolę spadochronu</text:p>
        </text:list-item>
      </text:list>
      <text:p text:style-name="P12"/>
      <text:list xml:id="list185202285427806" text:style-name="L1">
        <text:list-item>
          <text:p text:style-name="P66"><text:span text:style-name="Domyślna_20_czcionka_20_akapitu"><text:span text:style-name="T4">Grafik - </text:span></text:span><text:span text:style-name="Domyślna_20_czcionka_20_akapitu"><text:span text:style-name="T6">Reprezentuje harmonogram przypisań użytkowników.</text:span></text:span></text:p>
        </text:list-item>
      </text:list>
      <text:p text:style-name="P11">Atrybuty:</text:p>
      <text:list xml:id="list185203841759606" text:style-name="L2">
        <text:list-item>
          <text:p text:style-name="P47">id: int </text:p>
        </text:list-item>
        <text:list-item>
          <text:p text:style-name="P48"><text:soft-page-break/>data: Date 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2214292591" text:style-name="L3">
        <text:list-item>
          <text:p text:style-name="P68"><text:span text:style-name="Domyślna_20_czcionka_20_akapitu"><text:span text:style-name="T7">przypiszUżytkownika(użytkownik: Użytkownik): void</text:span></text:span></text:p>
        </text:list-item>
        <text:list-item>
          <text:p text:style-name="P68"><text:span text:style-name="Domyślna_20_czcionka_20_akapitu"><text:span text:style-name="T7">usuńUżytkownika(użytkownik: Użytkownik): void</text:span></text:span></text:p>
        </text:list-item>
      </text:list>
      <text:list xml:id="list185203656020928" text:style-name="L1">
        <text:list-item>
          <text:p text:style-name="P66"><text:span text:style-name="Domyślna_20_czcionka_20_akapitu"><text:span text:style-name="T4">KierownikSkoków - </text:span></text:span><text:span text:style-name="Domyślna_20_czcionka_20_akapitu"><text:span text:style-name="T6">Odpowiada za zarządzanie operacjami skoków.</text:span></text:span></text:p>
        </text:list-item>
      </text:list>
      <text:p text:style-name="P16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2131768687" text:style-name="L3">
        <text:list-item>
          <text:p text:style-name="P49">zarządzajGrafikiem(): void</text:p>
        </text:list-item>
        <text:list-item>
          <text:p text:style-name="P49">planujWylot(data: Date): Wylot</text:p>
        </text:list-item>
        <text:list-item>
          <text:p text:style-name="P49">przypiszSkoczka(wylot: Wylot, skoczek: Skoczek): void</text:p>
        </text:list-item>
        <text:list-item>
          <text:p text:style-name="P49">monitorujWylot(wylot: Wylot): void</text:p>
        </text:list-item>
      </text:list>
      <text:list xml:id="list185203172094393" text:style-name="L1">
        <text:list-item>
          <text:p text:style-name="P71"><text:span text:style-name="Domyślna_20_czcionka_20_akapitu"><text:span text:style-name="T4">Pilot - </text:span></text:span><text:span text:style-name="Domyślna_20_czcionka_20_akapitu"><text:span text:style-name="T6">Użytkownik odpowiedzialny za wykonanie lotu</text:span></text:span></text:p>
        </text:list-item>
      </text:list>
      <text:p text:style-name="P11">Atrybuty:</text:p>
      <text:list xml:id="list185203312387612" text:style-name="L2">
        <text:list-item>
          <text:p text:style-name="P69"><text:span text:style-name="Domyślna_20_czcionka_20_akapitu"><text:span text:style-name="T7">licencja: String – numer licencji pilota</text:span></text:span>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3148043388" text:style-name="L3">
        <text:list-item>
          <text:p text:style-name="P50">wykonajWylot(wylot: Wylot):</text:p>
        </text:list-item>
      </text:list>
      <text:list xml:id="list185202064596219" text:style-name="L1">
        <text:list-item>
          <text:p text:style-name="P66"><text:span text:style-name="Domyślna_20_czcionka_20_akapitu"><text:span text:style-name="T4">PlanWylotu - </text:span></text:span><text:span text:style-name="Domyślna_20_czcionka_20_akapitu"><text:span text:style-name="T6">Zarządza planowaniem wylotów</text:span></text:span></text:p>
        </text:list-item>
      </text:list>
      <text:p text:style-name="P11">Atrybuty:</text:p>
      <text:list xml:id="list185202863726221" text:style-name="L2">
        <text:list-item>
          <text:p text:style-name="P47">id: int </text:p>
        </text:list-item>
        <text:list-item>
          <text:p text:style-name="P47">dataUtworzenia: Date </text:p>
        </text:list-item>
        <text:list-item>
          <text:p text:style-name="P47">wynik: String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2070464222" text:style-name="L3">
        <text:list-item>
          <text:p text:style-name="P49">utwórzWylot(data: Date): Wylot</text:p>
        </text:list-item>
        <text:list-item>
          <text:p text:style-name="P49">usuńWylot</text:p>
        </text:list-item>
      </text:list>
      <text:list xml:id="list185203318486997" text:style-name="L1">
        <text:list-item>
          <text:p text:style-name="P66"><text:span text:style-name="Domyślna_20_czcionka_20_akapitu"><text:span text:style-name="T4">Rejestracja - </text:span></text:span><text:span text:style-name="Domyślna_20_czcionka_20_akapitu"><text:span text:style-name="T6">Reprezentuje zapis skoczka na szkolenie</text:span></text:span></text:p>
        </text:list-item>
      </text:list>
      <text:p text:style-name="P11">Atrybuty:</text:p>
      <text:list xml:id="list185201921728560" text:style-name="L2">
        <text:list-item>
          <text:p text:style-name="P47">id: int </text:p>
        </text:list-item>
        <text:list-item>
          <text:p text:style-name="P47">dataRejestracji: Date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3449195630" text:style-name="L3">
        <text:list-item>
          <text:p text:style-name="P49">anuluj(): void</text:p>
        </text:list-item>
      </text:list>
      <text:list xml:id="list185202596572998" text:style-name="L1">
        <text:list-item>
          <text:p text:style-name="P66"><text:span text:style-name="Domyślna_20_czcionka_20_akapitu"><text:span text:style-name="T4">Rigger - </text:span></text:span><text:span text:style-name="Domyślna_20_czcionka_20_akapitu"><text:span text:style-name="T6">Odpowiada za kontrolę i przygotowanie spadochronów</text:span></text:span>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2974517806" text:style-name="L3">
        <text:list-item>
          <text:p text:style-name="P49">sprawdźSpadochron(spadochron: Spadochron): GearCheck</text:p>
        </text:list-item>
        <text:list-item>
          <text:p text:style-name="P49">potwierdźZłożenie(spadochron: Spadochron): void</text:p>
        </text:list-item>
      </text:list>
      <text:p text:style-name="P13"/>
      <text:p text:style-name="P13"><text:soft-page-break/></text:p>
      <text:p text:style-name="P13"/>
      <text:list xml:id="list185203217052466" text:style-name="L1">
        <text:list-item>
          <text:p text:style-name="P66"><text:span text:style-name="Domyślna_20_czcionka_20_akapitu"><text:span text:style-name="T8">Skoczek - </text:span></text:span><text:span text:style-name="Domyślna_20_czcionka_20_akapitu"><text:span text:style-name="T7">Użytkownik wykonujący skok</text:span></text:span></text:p>
        </text:list-item>
      </text:list>
      <text:p text:style-name="P11">Atrybuty:</text:p>
      <text:list xml:id="list185203893937402" text:style-name="L2">
        <text:list-item>
          <text:p text:style-name="P47">licencja: String</text:p>
        </text:list-item>
        <text:list-item>
          <text:p text:style-name="P47">statusUprawnień: String – określa czy skoczek może wykonywać skoki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2021440111" text:style-name="L3">
        <text:list-item>
          <text:p text:style-name="P49">zapiszNaSzkolenie(szkolenie: Szkolenie): void</text:p>
        </text:list-item>
        <text:list-item>
          <text:p text:style-name="P49">sprawdźUprawnienia(): boolean</text:p>
        </text:list-item>
      </text:list>
      <text:list xml:id="list185203104151416" text:style-name="L1">
        <text:list-item>
          <text:p text:style-name="P67"><text:span text:style-name="Domyślna_20_czcionka_20_akapitu"><text:span text:style-name="T4">Spadochron - </text:span></text:span><text:span text:style-name="Domyślna_20_czcionka_20_akapitu"><text:span text:style-name="T6">Reprezentuje sprzęt do skoków</text:span></text:span></text:p>
        </text:list-item>
      </text:list>
      <text:p text:style-name="P11">Atrybuty:</text:p>
      <text:list xml:id="list185203130173517" text:style-name="L2">
        <text:list-item>
          <text:p text:style-name="P47">id: int </text:p>
        </text:list-item>
        <text:list-item>
          <text:p text:style-name="P47">typ: String</text:p>
        </text:list-item>
        <text:list-item>
          <text:p text:style-name="P47">stan: StatusSpadochronu</text:p>
        </text:list-item>
        <text:list-item>
          <text:p text:style-name="P47">dataOstatniejKontroli: Date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3303352810" text:style-name="L3">
        <text:list-item>
          <text:p text:style-name="P49">sprawdźStan(): StatusSpadochronu</text:p>
        </text:list-item>
        <text:list-item>
          <text:p text:style-name="P49">oznaczJakoUszkodzony(): void</text:p>
        </text:list-item>
      </text:list>
      <text:list xml:id="list185202250886892" text:style-name="L1">
        <text:list-item>
          <text:p text:style-name="P67"><text:span text:style-name="Domyślna_20_czcionka_20_akapitu"><text:span text:style-name="T4">SystemWyświetlania - </text:span></text:span><text:span text:style-name="Domyślna_20_czcionka_20_akapitu"><text:span text:style-name="T6">Odpowiada za wyświetlanie danych o wylotach</text:span></text:span>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3241632641" text:style-name="L3">
        <text:list-item>
          <text:p text:style-name="P49">wyświetlWyloty(wyloty: List&lt;Wylot&gt;): void</text:p>
        </text:list-item>
      </text:list>
      <text:list xml:id="list185203942233127" text:style-name="L1">
        <text:list-item>
          <text:p text:style-name="P67"><text:span text:style-name="Domyślna_20_czcionka_20_akapitu"><text:span text:style-name="T4">Szkolenie - </text:span></text:span><text:span text:style-name="Domyślna_20_czcionka_20_akapitu"><text:span text:style-name="T6">Reprezentuje szkolenie dla skoczków</text:span></text:span></text:p>
        </text:list-item>
      </text:list>
      <text:p text:style-name="P11">Atrybuty:</text:p>
      <text:list xml:id="list185202006201229" text:style-name="L2">
        <text:list-item>
          <text:p text:style-name="P47">id: int </text:p>
        </text:list-item>
        <text:list-item>
          <text:p text:style-name="P47">nazwa: string</text:p>
        </text:list-item>
        <text:list-item>
          <text:p text:style-name="P47">data: Date </text:p>
        </text:list-item>
        <text:list-item>
          <text:p text:style-name="P47">opis: String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2209370961" text:style-name="L3">
        <text:list-item>
          <text:p text:style-name="P49">dodajUczestnika(skoczek: Skoczek): void</text:p>
        </text:list-item>
        <text:list-item>
          <text:p text:style-name="P49">usuńUczestnika(skoczek: Skoczek): void</text:p>
        </text:list-item>
      </text:list>
      <text:list xml:id="list185203873832307" text:style-name="L1">
        <text:list-item>
          <text:p text:style-name="P67"><text:span text:style-name="Domyślna_20_czcionka_20_akapitu"><text:span text:style-name="T4">Układacz - </text:span></text:span><text:span text:style-name="Domyślna_20_czcionka_20_akapitu"><text:span text:style-name="T6">Odpowiada za składanie spadochronów</text:span></text:span>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3230743263" text:style-name="L3">
        <text:list-item>
          <text:p text:style-name="P49">ułóżSpadochron(spadochron: Spadochron): void</text:p>
        </text:list-item>
      </text:list>
      <text:p text:style-name="P13"><text:soft-page-break/></text:p>
      <text:p text:style-name="P13"/>
      <text:p text:style-name="P13"/>
      <text:list xml:id="list185202790826055" text:style-name="L1">
        <text:list-item>
          <text:p text:style-name="P66"><text:span text:style-name="Domyślna_20_czcionka_20_akapitu"><text:span text:style-name="T8">Usterka - </text:span></text:span><text:span text:style-name="Domyślna_20_czcionka_20_akapitu"><text:span text:style-name="T7">Reprezentuje problem techniczny sprzętu</text:span></text:span></text:p>
        </text:list-item>
      </text:list>
      <text:p text:style-name="P11">Atrybuty:</text:p>
      <text:list xml:id="list185202423760048" text:style-name="L2">
        <text:list-item>
          <text:p text:style-name="P47">id: int </text:p>
        </text:list-item>
        <text:list-item>
          <text:p text:style-name="P47">opis: String</text:p>
        </text:list-item>
        <text:list-item>
          <text:p text:style-name="P47">status: StatusUsterki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3106711566" text:style-name="L3">
        <text:list-item>
          <text:p text:style-name="P49">zgłoś(): void</text:p>
        </text:list-item>
        <text:list-item>
          <text:p text:style-name="P49">oznaczJakoNaprawiona(): void</text:p>
        </text:list-item>
      </text:list>
      <text:list xml:id="list185202409375306" text:style-name="L1">
        <text:list-item>
          <text:p text:style-name="P66"><text:span text:style-name="Domyślna_20_czcionka_20_akapitu"><text:span text:style-name="T4">Użytkownik - </text:span></text:span><text:span text:style-name="Domyślna_20_czcionka_20_akapitu"><text:span text:style-name="T6">Klasa bazowa dla wszystkich użytkowników systemu</text:span></text:span></text:p>
        </text:list-item>
      </text:list>
      <text:p text:style-name="P11">Atrybuty:</text:p>
      <text:list xml:id="list185202089139138" text:style-name="L2">
        <text:list-item>
          <text:p text:style-name="P47">id: int </text:p>
        </text:list-item>
        <text:list-item>
          <text:p text:style-name="P47">imię: String</text:p>
        </text:list-item>
        <text:list-item>
          <text:p text:style-name="P47">nazwisko: String</text:p>
        </text:list-item>
        <text:list-item>
          <text:p text:style-name="P47">login: String</text:p>
        </text:list-item>
        <text:list-item>
          <text:p text:style-name="P47">hashHasła: String – przechowuje zaszyfrowane hasło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2428526646" text:style-name="L3">
        <text:list-item>
          <text:p text:style-name="P51">zaloguj(login: String, hashHasła: String): boolean</text:p>
        </text:list-item>
        <text:list-item>
          <text:p text:style-name="P49">wyloguj(): void</text:p>
        </text:list-item>
      </text:list>
      <text:list xml:id="list185202000800398" text:style-name="L1">
        <text:list-item>
          <text:p text:style-name="P66"><text:span text:style-name="Domyślna_20_czcionka_20_akapitu"><text:span text:style-name="T4">Wylot - </text:span></text:span><text:span text:style-name="Domyślna_20_czcionka_20_akapitu"><text:span text:style-name="T7">Reprezentuje pojedynczy lot/skok</text:span></text:span></text:p>
        </text:list-item>
      </text:list>
      <text:p text:style-name="P11">Atrybuty:</text:p>
      <text:list xml:id="list185203564954102" text:style-name="L2">
        <text:list-item>
          <text:p text:style-name="P47">id: int </text:p>
        </text:list-item>
        <text:list-item>
          <text:p text:style-name="P47">data: Date </text:p>
        </text:list-item>
        <text:list-item>
          <text:p text:style-name="P47">status: StatusWylotu</text:p>
        </text:list-item>
      </text:list>
      <text:p text:style-name="P15"><text:span text:style-name="Domyślna_20_czcionka_20_akapitu"><text:span text:style-name="T6">Metody</text:span></text:span><text:span text:style-name="Domyślna_20_czcionka_20_akapitu"><text:span text:style-name="T4">:</text:span></text:span></text:p>
      <text:list xml:id="list185203760416270" text:style-name="L3">
        <text:list-item>
          <text:p text:style-name="P49">dodajSkoczka(skoczek: Skoczek): void</text:p>
        </text:list-item>
        <text:list-item>
          <text:p text:style-name="P49">usuńSkoczka(skoczek: Skoczek): void</text:p>
        </text:list-item>
        <text:list-item>
          <text:p text:style-name="P68"><text:span text:style-name="Domyślna_20_czcionka_20_akapitu"><text:span text:style-name="T6">zmieńStatus(status: StatusWylotu): void</text:span></text:span></text:p>
        </text:list-item>
      </text:list>
      <text:p text:style-name="P70"><text:span text:style-name="Domyślna_20_czcionka_20_akapitu"><text:span text:style-name="T6"/></text:span></text:p>
      <text:p text:style-name="P72"><draw:connector text:anchor-type="paragraph" draw:z-index="4" draw:name="Łącznik prosty 3" draw:style-name="gr1" draw:text-style-name="P73" draw:type="line" svg:x1="-0.7311in" svg:y1="0.1654in" svg:x2="7.9642in" svg:y2="0.1654in" svg:d="M-1857 420h22086" svg:viewBox="0 0 22087 2"><text:p/></draw:connector></text:p>
      <text:p text:style-name="P72"/>
      <text:p text:style-name="P59">DIAGRAM <text:span text:style-name="T10">CZYNNOŚCI</text:span></text:p>
      <text:p text:style-name="P59"/>
      <text:p text:style-name="P60"><text:soft-page-break/>Diagram czynności Gear Check</text:p>
      <text:p text:style-name="P61"><text:soft-page-break/>wykonał: Patryk Wojtkielewicz</text:p>
      <text:p text:style-name="P59"/>
      <text:p text:style-name="P59"/>
      <text:p text:style-name="P72"><draw:connector text:anchor-type="paragraph" draw:z-index="5" draw:name="Łącznik prosty 4" draw:style-name="gr1" draw:text-style-name="P73" draw:type="line" svg:x1="-0.7311in" svg:y1="0.1654in" svg:x2="7.9642in" svg:y2="0.1654in" svg:d="M-1857 420h22086" svg:viewBox="0 0 22087 2"><text:p/></draw:connector></text:p>
      <text:p text:style-name="P72"/>
      <text:p text:style-name="P59">DIAGRAM <text:span text:style-name="T10">INTERAKCJI</text:span></text:p>
      <text:p text:style-name="P59"/>
      <text:p text:style-name="P58"><text:span text:style-name="Domyślna_20_czcionka_20_akapitu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agłówek_20_1" style:display-name="Nagłówek 1" style:family="paragraph" style:parent-style-name="Heading" style:next-style-name="Text_20_body_20__28_user_29_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agłówek_20_2" style:display-name="Nagłówek 2" style:family="paragraph" style:parent-style-name="Heading" style:next-style-name="Text_20_body_20__28_user_29_" style:default-outline-level="2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Nagłówek_20_3" style:display-name="Nagłówek 3" style:family="paragraph" style:parent-style-name="Heading" style:next-style-name="Text_20_body_20__28_user_29_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_20__28_user_29_">
      <style:paragraph-properties fo:hyphenation-ladder-count="no-limit"/>
      <style:text-properties fo:hyphenate="false" loext:hyphenation-no-caps="false"/>
    </style:style>
    <style:style style:name="Legenda" style:family="paragraph" style:parent-style-name="Standard_20__28_user_29_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0.5in" fo:margin-right="0in" fo:margin-top="0in" fo:margin-bottom="0.111in" style:contextual-spacing="true" fo:line-height="115%" fo:hyphenation-ladder-count="no-limit" fo:text-indent="0in" style:auto-text-indent="false" style:vertical-align="auto">
        <style:tab-stops/>
      </style:paragraph-properties>
      <style:text-properties style:font-name="Aptos" fo:font-family="Aptos" style:font-family-generic="swiss" style:font-pitch="variable" fo:language="pl" fo:country="PL" style:font-name-asian="Aptos" style:font-family-asian="Aptos" style:font-family-generic-asian="swiss" style:font-pitch-asian="variable" style:language-asian="en" style:country-asian="US" style:language-complex="ar" style:country-complex="SA" fo:hyphenate="true" loext:hyphenation-no-caps="false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1" style:display-name="ListLabel 10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4" style:display-name="ListLabel 10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7" style:display-name="ListLabel 10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/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weight="bold" style:font-weight-asian="bold" style:font-weight-complex="bold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4" style:display-name="WW_CharLFO1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7" style:display-name="WW_CharLFO1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fo:font-size="10pt" style:font-size-asian="10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8LVL2" style:display-name="WW_CharLFO18LVL2" style:family="text">
      <style:text-properties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4LVL2" style:display-name="WW_CharLFO24LVL2" style:family="text">
      <style:text-properties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4" style:display-name="WW_CharLFO2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5" style:display-name="WW_CharLFO2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7" style:display-name="WW_CharLFO2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8" style:display-name="WW_CharLFO2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6LVL2" style:display-name="WW_CharLFO26LVL2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4" style:display-name="WW_CharLFO2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5" style:display-name="WW_CharLFO2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7" style:display-name="WW_CharLFO2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8" style:display-name="WW_CharLFO2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2" style:display-name="WW_CharLFO28LVL2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4" style:display-name="WW_CharLFO2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5" style:display-name="WW_CharLFO2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7" style:display-name="WW_CharLFO2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8" style:display-name="WW_CharLFO2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9LVL2" style:display-name="WW_CharLFO29LVL2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4" style:display-name="WW_CharLFO2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5" style:display-name="WW_CharLFO2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7" style:display-name="WW_CharLFO2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8" style:display-name="WW_CharLFO2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1" style:display-name="WW_CharLFO30LVL1" style:family="text">
      <style:text-properties fo:font-weight="bold" style:font-weight-asian="bold" style:font-weight-complex="bold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1LVL2" style:display-name="WW_CharLFO31LVL2" style:family="text">
      <style:text-properties fo:font-size="10pt" style:font-size-asian="10pt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4" style:display-name="WW_CharLFO3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5" style:display-name="WW_CharLFO3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7" style:display-name="WW_CharLFO3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8" style:display-name="WW_CharLFO3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2LVL2" style:display-name="WW_CharLFO32LVL2" style:family="text">
      <style:text-properties fo:font-size="10pt" style:font-size-asian="10pt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4" style:display-name="WW_CharLFO3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5" style:display-name="WW_CharLFO3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7" style:display-name="WW_CharLFO3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8" style:display-name="WW_CharLFO3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3LVL2" style:display-name="WW_CharLFO33LVL2" style:family="text">
      <style:text-properties fo:font-size="10pt" style:font-size-asian="10pt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4" style:display-name="WW_CharLFO3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5" style:display-name="WW_CharLFO3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7" style:display-name="WW_CharLFO3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8" style:display-name="WW_CharLFO3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4LVL2" style:display-name="WW_CharLFO34LVL2" style:family="text">
      <style:text-properties fo:font-size="10pt" style:font-size-asian="10pt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4" style:display-name="WW_CharLFO3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5" style:display-name="WW_CharLFO3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7" style:display-name="WW_CharLFO3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8" style:display-name="WW_CharLFO3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5LVL2" style:display-name="WW_CharLFO35LVL2" style:family="text">
      <style:text-properties fo:font-size="10pt" style:font-size-asian="10pt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4" style:display-name="WW_CharLFO3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5" style:display-name="WW_CharLFO3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7" style:display-name="WW_CharLFO3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8" style:display-name="WW_CharLFO3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1" style:display-name="WW_CharLFO7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0LVL2" style:display-name="WW_CharLFO7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0LVL3" style:display-name="WW_CharLFO7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4" style:display-name="WW_CharLFO7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5" style:display-name="WW_CharLFO7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6" style:display-name="WW_CharLFO7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7" style:display-name="WW_CharLFO7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8" style:display-name="WW_CharLFO7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9" style:display-name="WW_CharLFO7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1" style:display-name="WW_CharLFO7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1LVL2" style:display-name="WW_CharLFO7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1LVL3" style:display-name="WW_CharLFO7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4" style:display-name="WW_CharLFO7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5" style:display-name="WW_CharLFO7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6" style:display-name="WW_CharLFO7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7" style:display-name="WW_CharLFO7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8" style:display-name="WW_CharLFO7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9" style:display-name="WW_CharLFO7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7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7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7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7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7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7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9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9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9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9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WW_5f_CharLFO30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Inga Dzieniszewska</meta:initial-creator>
    <meta:creation-date>2026-05-07T10:59:00Z</meta:creation-date>
    <dc:date>2026-05-16T18:54:27.584222405</dc:date>
    <meta:editing-cycles>9</meta:editing-cycles>
    <meta:editing-duration>PT1H5M25S</meta:editing-duration>
    <meta:document-statistic meta:table-count="0" meta:image-count="3" meta:object-count="0" meta:page-count="15" meta:paragraph-count="300" meta:word-count="2135" meta:character-count="15583" meta:non-whitespace-character-count="13896"/>
    <meta:user-defined meta:name="AppVersion">16.0000</meta:user-defined>
    <meta:template xlink:type="simple" xlink:actuate="onRequest" xlink:title="" xlink:href="../DiagramKlas.odt/Normal.dotm"/>
  </office:meta>
</office:document-meta>
</file>