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B00000405AC9ACFCC5196A552.png" manifest:media-type="image/png"/>
  <manifest:file-entry manifest:full-path="Pictures/1000000000000450000002D2B06A4AAE0A85BB10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/>
    <style:font-face style:name="Aptos1" svg:font-family="Aptos" style:font-family-generic="swiss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Text_20_body_20__28_user_29_">
      <style:paragraph-properties fo:margin-left="0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0in"/>
        </style:tab-stops>
      </style:paragraph-properties>
      <style:text-properties style:font-name="Aptos1" fo:font-size="16pt" fo:language="pl" fo:country="PL" fo:font-weight="bold" officeooo:paragraph-rsid="000e3dde" style:font-size-asian="16pt" style:font-weight-asian="bold" style:font-size-complex="16pt" style:font-weight-complex="bold"/>
    </style:style>
    <style:style style:name="P2" style:family="paragraph" style:parent-style-name="Text_20_body_20__28_user_29_">
      <style:paragraph-properties fo:margin-left="0.4925in" fo:margin-right="0in" fo:margin-top="0.0835in" fo:margin-bottom="0in" style:contextual-spacing="false" fo:text-indent="0in" style:auto-text-indent="false">
        <style:tab-stops/>
      </style:paragraph-properties>
    </style:style>
    <style:style style:name="P3" style:family="paragraph" style:parent-style-name="Text_20_body_20__28_user_29_">
      <style:paragraph-properties fo:margin-left="0.4925in" fo:margin-right="0in" fo:margin-top="0in" fo:margin-bottom="0in" style:contextual-spacing="false" fo:text-indent="0in" style:auto-text-indent="false">
        <style:tab-stops/>
      </style:paragraph-properties>
    </style:style>
    <style:style style:name="P4" style:family="paragraph" style:parent-style-name="Text_20_body_20__28_user_29_">
      <style:paragraph-properties fo:margin-left="1in" fo:margin-right="0in" fo:margin-top="0in" fo:margin-bottom="0in" style:contextual-spacing="false" fo:text-indent="0in" style:auto-text-indent="false">
        <style:tab-stops>
          <style:tab-stop style:position="0in"/>
        </style:tab-stops>
      </style:paragraph-properties>
    </style:style>
    <style:style style:name="P5" style:family="paragraph" style:parent-style-name="Standard">
      <style:paragraph-properties fo:text-align="start" style:justify-single-word="false"/>
      <style:text-properties style:font-name="Aptos" fo:font-size="12pt" fo:language="pl" fo:country="PL" fo:font-weight="bold" officeooo:rsid="0029d048" officeooo:paragraph-rsid="0029d048" style:font-name-asian="Aptos1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6" style:family="paragraph" style:parent-style-name="Text_20_body">
      <style:text-properties style:font-name="Aptos" fo:font-weight="bold" style:font-weight-asian="bold" style:font-weight-complex="bold"/>
    </style:style>
    <style:style style:name="P7" style:family="paragraph" style:parent-style-name="Nagłówek_20_1" style:master-page-name="MP0">
      <style:paragraph-properties fo:text-align="center" style:justify-single-word="false" style:page-number="auto" fo:break-before="page"/>
    </style:style>
    <style:style style:name="P8" style:family="paragraph" style:parent-style-name="Nagłówek_20_3">
      <style:text-properties style:font-name="Aptos" fo:font-size="12pt" fo:language="pl" fo:country="PL" style:font-size-asian="12pt" style:font-size-complex="12pt"/>
    </style:style>
    <style:style style:name="P9" style:family="paragraph" style:parent-style-name="Text_20_body_20__28_user_29_">
      <style:text-properties style:font-name="Aptos1" fo:language="pl" fo:country="PL" fo:font-weight="normal" officeooo:rsid="0014df46" officeooo:paragraph-rsid="0014df46" style:font-weight-asian="normal" style:font-weight-complex="normal"/>
    </style:style>
    <style:style style:name="P10" style:family="paragraph" style:parent-style-name="Text_20_body_20__28_user_29_" style:list-style-name="WWNum29"/>
    <style:style style:name="P11" style:family="paragraph" style:parent-style-name="Text_20_body_20__28_user_29_" style:list-style-name="WWNum23"/>
    <style:style style:name="P12" style:family="paragraph" style:parent-style-name="Text_20_body_20__28_user_29_" style:list-style-name="WWNum30"/>
    <style:style style:name="P13" style:family="paragraph" style:parent-style-name="Text_20_body_20__28_user_29_" style:list-style-name="WWNum33"/>
    <style:style style:name="P14" style:family="paragraph" style:parent-style-name="Text_20_body_20__28_user_29_" style:list-style-name="L1">
      <style:paragraph-properties fo:margin-left="0.4465in" fo:margin-right="0in" fo:text-indent="0in" style:auto-text-indent="false">
        <style:tab-stops/>
      </style:paragraph-properties>
    </style:style>
    <style:style style:name="P15" style:family="paragraph" style:parent-style-name="Text_20_body_20__28_user_29_" style:list-style-name="L1">
      <style:paragraph-properties fo:margin-left="0.4465in" fo:margin-right="0in" fo:margin-top="0.0835in" fo:margin-bottom="0.0835in" style:contextual-spacing="false" fo:text-indent="0in" style:auto-text-indent="false">
        <style:tab-stops/>
      </style:paragraph-properties>
    </style:style>
    <style:style style:name="P16" style:family="paragraph" style:parent-style-name="Text_20_body_20__28_user_29_" style:list-style-name="L1">
      <style:paragraph-properties fo:margin-left="0.4465in" fo:margin-right="0in" fo:margin-top="0.1665in" fo:margin-bottom="0.0835in" style:contextual-spacing="false" fo:text-indent="0in" style:auto-text-indent="false">
        <style:tab-stops/>
      </style:paragraph-properties>
    </style:style>
    <style:style style:name="P17" style:family="paragraph" style:parent-style-name="Text_20_body_20__28_user_29_" style:list-style-name="L3">
      <style:paragraph-properties fo:margin-left="1in" fo:margin-right="0in" fo:margin-top="0in" fo:margin-bottom="0in" style:contextual-spacing="false" fo:text-indent="0in" style:auto-text-indent="false">
        <style:tab-stops>
          <style:tab-stop style:position="0in"/>
        </style:tab-stops>
      </style:paragraph-properties>
    </style:style>
    <style:style style:name="P18" style:family="paragraph" style:parent-style-name="Text_20_body_20__28_user_29_" style:list-style-name="L2">
      <style:paragraph-properties fo:margin-left="1in" fo:margin-right="0in" fo:margin-top="0in" fo:margin-bottom="0in" style:contextual-spacing="false" fo:text-indent="0in" style:auto-text-indent="false">
        <style:tab-stops>
          <style:tab-stop style:position="0in"/>
        </style:tab-stops>
      </style:paragraph-properties>
    </style:style>
    <style:style style:name="P19" style:family="paragraph" style:parent-style-name="Text_20_body_20__28_user_29_" style:list-style-name="L1">
      <style:paragraph-properties fo:margin-left="0.4465in" fo:margin-right="0in" fo:margin-top="0.0835in" fo:margin-bottom="0.0835in" style:contextual-spacing="false" fo:text-indent="0in" style:auto-text-indent="false">
        <style:tab-stops>
          <style:tab-stop style:position="0.5535in"/>
        </style:tab-stops>
      </style:paragraph-properties>
    </style:style>
    <style:style style:name="P20" style:family="paragraph" style:parent-style-name="Text_20_body_20__28_user_29_">
      <style:paragraph-properties fo:text-align="center" style:justify-single-word="false"/>
    </style:style>
    <style:style style:name="P21" style:family="paragraph" style:parent-style-name="Text_20_body_20__28_user_29_">
      <style:paragraph-properties fo:text-align="start" style:justify-single-word="false"/>
      <style:text-properties style:font-name="Aptos" fo:language="pl" fo:country="PL" fo:font-weight="bold" officeooo:rsid="00114174" officeooo:paragraph-rsid="00114174" style:font-weight-asian="bold" style:font-weight-complex="bold"/>
    </style:style>
    <style:style style:name="P22" style:family="paragraph" style:parent-style-name="Text_20_body_20__28_user_29_">
      <style:text-properties style:font-name="Aptos" fo:language="pl" fo:country="PL" fo:font-weight="bold" officeooo:rsid="00114174" officeooo:paragraph-rsid="0014df46" style:font-weight-asian="bold" style:font-weight-complex="bold"/>
    </style:style>
    <style:style style:name="P23" style:family="paragraph" style:parent-style-name="Text_20_body_20__28_user_29_">
      <style:paragraph-properties fo:text-align="center" style:justify-single-word="false"/>
      <style:text-properties style:font-name="Aptos" fo:language="pl" fo:country="PL" fo:font-weight="bold" officeooo:rsid="0011eb67" officeooo:paragraph-rsid="0011f3a2" style:font-weight-asian="bold" style:font-weight-complex="bold"/>
    </style:style>
    <style:style style:name="P24" style:family="paragraph" style:parent-style-name="Text_20_body_20__28_user_29_">
      <style:text-properties style:font-name="Aptos" fo:language="pl" fo:country="PL" fo:font-weight="bold" style:font-weight-asian="bold" style:font-weight-complex="bold"/>
    </style:style>
    <style:style style:name="P25" style:family="paragraph" style:parent-style-name="Text_20_body_20__28_user_29_">
      <style:text-properties style:font-name="Aptos" fo:language="pl" fo:country="PL" fo:font-weight="bold" officeooo:rsid="0014df46" officeooo:paragraph-rsid="0014df46" style:font-weight-asian="bold" style:font-weight-complex="bold"/>
    </style:style>
    <style:style style:name="P26" style:family="paragraph" style:parent-style-name="Text_20_body_20__28_user_29_">
      <style:text-properties style:font-name="Aptos" fo:language="pl" fo:country="PL" fo:font-weight="bold" officeooo:paragraph-rsid="001a3f10" style:font-weight-asian="bold" style:font-weight-complex="bold"/>
    </style:style>
    <style:style style:name="P27" style:family="paragraph" style:parent-style-name="Text_20_body_20__28_user_29_" style:list-style-name="WWNum29">
      <style:text-properties style:font-name="Aptos" fo:language="pl" fo:country="PL" fo:font-weight="bold" style:font-weight-asian="bold" style:font-weight-complex="bold"/>
    </style:style>
    <style:style style:name="P28" style:family="paragraph" style:parent-style-name="Text_20_body_20__28_user_29_">
      <style:paragraph-properties fo:text-align="center" style:justify-single-word="false"/>
      <style:text-properties style:font-name="Aptos" fo:language="pl" fo:country="PL" style:text-underline-style="solid" style:text-underline-width="auto" style:text-underline-color="font-color" fo:font-weight="normal" officeooo:rsid="0011f3a2" officeooo:paragraph-rsid="0011f3a2" style:font-weight-asian="normal" style:font-weight-complex="normal"/>
    </style:style>
    <style:style style:name="P29" style:family="paragraph" style:parent-style-name="Text_20_body_20__28_user_29_">
      <style:paragraph-properties fo:text-align="center" style:justify-single-word="false"/>
      <style:text-properties style:font-name="Aptos" fo:language="pl" fo:country="PL" style:text-underline-style="solid" style:text-underline-width="auto" style:text-underline-color="font-color" fo:font-weight="normal" officeooo:rsid="0013c6b4" officeooo:paragraph-rsid="0013c6b4" style:font-weight-asian="normal" style:font-weight-complex="normal"/>
    </style:style>
    <style:style style:name="P30" style:family="paragraph" style:parent-style-name="Text_20_body_20__28_user_29_">
      <style:paragraph-properties fo:text-align="center" style:justify-single-word="false"/>
      <style:text-properties style:font-name="Aptos" fo:language="pl" fo:country="PL" style:text-underline-style="solid" style:text-underline-width="auto" style:text-underline-color="font-color" fo:font-weight="normal" officeooo:rsid="001463e5" officeooo:paragraph-rsid="001463e5" style:font-weight-asian="normal" style:font-weight-complex="normal"/>
    </style:style>
    <style:style style:name="P31" style:family="paragraph" style:parent-style-name="Text_20_body_20__28_user_29_" style:list-style-name="WWNum1">
      <style:text-properties style:font-name="Aptos" fo:language="pl" fo:country="PL"/>
    </style:style>
    <style:style style:name="P32" style:family="paragraph" style:parent-style-name="Text_20_body_20__28_user_29_" style:list-style-name="WWNum1">
      <style:text-properties style:font-name="Aptos" fo:language="pl" fo:country="PL" officeooo:paragraph-rsid="0014df46"/>
    </style:style>
    <style:style style:name="P33" style:family="paragraph" style:parent-style-name="Text_20_body_20__28_user_29_" style:list-style-name="WWNum1">
      <style:text-properties style:font-name="Aptos" fo:language="pl" fo:country="PL" fo:font-weight="normal" officeooo:rsid="00114174" officeooo:paragraph-rsid="0014df46" style:font-weight-asian="normal" style:font-weight-complex="normal"/>
    </style:style>
    <style:style style:name="P34" style:family="paragraph" style:parent-style-name="Text_20_body_20__28_user_29_">
      <style:text-properties style:font-name="Aptos" fo:language="pl" fo:country="PL"/>
    </style:style>
    <style:style style:name="P35" style:family="paragraph" style:parent-style-name="Text_20_body_20__28_user_29_" style:list-style-name="WWNum2">
      <style:text-properties style:font-name="Aptos" fo:language="pl" fo:country="PL"/>
    </style:style>
    <style:style style:name="P36" style:family="paragraph" style:parent-style-name="Text_20_body_20__28_user_29_" style:list-style-name="WWNum3">
      <style:text-properties style:font-name="Aptos" fo:language="pl" fo:country="PL"/>
    </style:style>
    <style:style style:name="P37" style:family="paragraph" style:parent-style-name="Text_20_body_20__28_user_29_" style:list-style-name="WWNum4">
      <style:text-properties style:font-name="Aptos" fo:language="pl" fo:country="PL"/>
    </style:style>
    <style:style style:name="P38" style:family="paragraph" style:parent-style-name="Text_20_body_20__28_user_29_" style:list-style-name="WWNum5">
      <style:text-properties style:font-name="Aptos" fo:language="pl" fo:country="PL"/>
    </style:style>
    <style:style style:name="P39" style:family="paragraph" style:parent-style-name="Text_20_body_20__28_user_29_" style:list-style-name="WWNum6">
      <style:text-properties style:font-name="Aptos" fo:language="pl" fo:country="PL"/>
    </style:style>
    <style:style style:name="P40" style:family="paragraph" style:parent-style-name="Text_20_body_20__28_user_29_" style:list-style-name="WWNum7">
      <style:text-properties style:font-name="Aptos" fo:language="pl" fo:country="PL"/>
    </style:style>
    <style:style style:name="P41" style:family="paragraph" style:parent-style-name="Text_20_body_20__28_user_29_" style:list-style-name="WWNum8">
      <style:text-properties style:font-name="Aptos" fo:language="pl" fo:country="PL"/>
    </style:style>
    <style:style style:name="P42" style:family="paragraph" style:parent-style-name="Text_20_body_20__28_user_29_" style:list-style-name="WWNum9">
      <style:text-properties style:font-name="Aptos" fo:language="pl" fo:country="PL"/>
    </style:style>
    <style:style style:name="P43" style:family="paragraph" style:parent-style-name="Text_20_body_20__28_user_29_" style:list-style-name="WWNum10">
      <style:text-properties style:font-name="Aptos" fo:language="pl" fo:country="PL"/>
    </style:style>
    <style:style style:name="P44" style:family="paragraph" style:parent-style-name="Text_20_body_20__28_user_29_" style:list-style-name="WWNum11">
      <style:text-properties style:font-name="Aptos" fo:language="pl" fo:country="PL"/>
    </style:style>
    <style:style style:name="P45" style:family="paragraph" style:parent-style-name="Text_20_body_20__28_user_29_" style:list-style-name="WWNum12">
      <style:text-properties style:font-name="Aptos" fo:language="pl" fo:country="PL"/>
    </style:style>
    <style:style style:name="P46" style:family="paragraph" style:parent-style-name="Text_20_body_20__28_user_29_" style:list-style-name="WWNum25">
      <style:text-properties style:font-name="Aptos" fo:language="pl" fo:country="PL"/>
    </style:style>
    <style:style style:name="P47" style:family="paragraph" style:parent-style-name="Text_20_body_20__28_user_29_" style:list-style-name="WWNum26">
      <style:text-properties style:font-name="Aptos" fo:language="pl" fo:country="PL"/>
    </style:style>
    <style:style style:name="P48" style:family="paragraph" style:parent-style-name="Text_20_body_20__28_user_29_" style:list-style-name="WWNum27">
      <style:text-properties style:font-name="Aptos" fo:language="pl" fo:country="PL"/>
    </style:style>
    <style:style style:name="P49" style:family="paragraph" style:parent-style-name="Text_20_body_20__28_user_29_" style:list-style-name="WWNum28">
      <style:text-properties style:font-name="Aptos" fo:language="pl" fo:country="PL"/>
    </style:style>
    <style:style style:name="P50" style:family="paragraph" style:parent-style-name="Text_20_body_20__28_user_29_">
      <style:paragraph-properties fo:text-align="center" style:justify-single-word="false"/>
      <style:text-properties style:font-name="Aptos" fo:language="pl" fo:country="PL"/>
    </style:style>
    <style:style style:name="P51" style:family="paragraph" style:parent-style-name="Text_20_body_20__28_user_29_">
      <style:paragraph-properties fo:text-align="center" style:justify-single-word="false"/>
      <style:text-properties style:font-name="Aptos" fo:font-size="16pt" fo:language="pl" fo:country="PL" fo:font-weight="bold" style:font-size-asian="16pt" style:font-weight-asian="bold" style:font-size-complex="16pt" style:font-weight-complex="bold"/>
    </style:style>
    <style:style style:name="P52" style:family="paragraph" style:parent-style-name="Text_20_body_20__28_user_29_">
      <style:paragraph-properties fo:text-align="center" style:justify-single-word="false"/>
      <style:text-properties style:font-name="Aptos" fo:font-size="16pt" fo:language="pl" fo:country="PL" fo:font-weight="bold" officeooo:paragraph-rsid="000e3dde" style:font-size-asian="16pt" style:font-weight-asian="bold" style:font-size-complex="16pt" style:font-weight-complex="bold"/>
    </style:style>
    <style:style style:name="P53" style:family="paragraph" style:parent-style-name="Text_20_body_20__28_user_29_">
      <style:text-properties style:font-name="Aptos" fo:font-size="16pt" fo:language="pl" fo:country="PL" fo:font-weight="bold" style:font-size-asian="16pt" style:font-weight-asian="bold" style:font-size-complex="16pt" style:font-weight-complex="bold"/>
    </style:style>
    <style:style style:name="P54" style:family="paragraph" style:parent-style-name="Text_20_body_20__28_user_29_">
      <style:text-properties style:font-name="Aptos" fo:font-size="16pt" fo:language="pl" fo:country="PL" fo:font-weight="bold" officeooo:rsid="001f00c0" officeooo:paragraph-rsid="001f00c0" style:font-size-asian="16pt" style:font-weight-asian="bold" style:font-size-complex="16pt" style:font-weight-complex="bold"/>
    </style:style>
    <style:style style:name="P55" style:family="paragraph" style:parent-style-name="Text_20_body_20__28_user_29_">
      <style:text-properties style:font-name="Aptos"/>
    </style:style>
    <style:style style:name="P56" style:family="paragraph" style:parent-style-name="Text_20_body_20__28_user_29_" style:list-style-name="WWNum19">
      <style:text-properties style:font-name="Aptos" fo:font-size="14pt" fo:language="pl" fo:country="PL" fo:font-weight="bold" style:font-size-asian="14pt" style:font-weight-asian="bold" style:font-size-complex="14pt" style:font-weight-complex="bold"/>
    </style:style>
    <style:style style:name="P57" style:family="paragraph" style:parent-style-name="Text_20_body_20__28_user_29_">
      <style:text-properties style:font-name="Aptos" fo:font-size="14pt" fo:language="pl" fo:country="PL" fo:font-weight="bold" style:font-size-asian="14pt" style:font-weight-asian="bold" style:font-size-complex="14pt" style:font-weight-complex="bold"/>
    </style:style>
    <style:style style:name="P58" style:family="paragraph" style:parent-style-name="Text_20_body_20__28_user_29_">
      <style:paragraph-properties fo:margin-left="3.939in" fo:margin-right="0in" fo:text-indent="0.4925in" style:auto-text-indent="false">
        <style:tab-stops/>
      </style:paragraph-properties>
      <style:text-properties style:font-name="Aptos" fo:font-size="14pt" fo:language="pl" fo:country="PL" fo:font-style="italic" style:font-size-asian="14pt" style:font-style-asian="italic" style:font-size-complex="14pt" style:font-style-complex="italic"/>
    </style:style>
    <style:style style:name="P59" style:family="paragraph" style:parent-style-name="Text_20_body_20__28_user_29_">
      <style:text-properties style:font-name="Aptos" fo:font-size="14pt" fo:language="pl" fo:country="PL" fo:font-style="italic" style:font-size-asian="14pt" style:font-style-asian="italic" style:font-size-complex="14pt" style:font-style-complex="italic"/>
    </style:style>
    <style:style style:name="P60" style:family="paragraph" style:parent-style-name="Text_20_body_20__28_user_29_" style:list-style-name="WWNum29">
      <style:text-properties style:font-name="Aptos" fo:font-size="11pt" fo:language="pl" fo:country="PL" fo:font-weight="bold" style:font-size-asian="11pt" style:font-weight-asian="bold" style:font-size-complex="11pt" style:font-weight-complex="bold"/>
    </style:style>
    <style:style style:name="P61" style:family="paragraph" style:parent-style-name="Text_20_body_20__28_user_29_" style:list-style-name="WWNum29">
      <style:text-properties style:font-name="Aptos" fo:font-size="11pt" fo:language="pl" fo:country="PL" fo:font-weight="bold" officeooo:paragraph-rsid="002ad670" style:font-size-asian="11pt" style:font-weight-asian="bold" style:font-size-complex="11pt" style:font-weight-complex="bold"/>
    </style:style>
    <style:style style:name="P62" style:family="paragraph" style:parent-style-name="Text_20_body_20__28_user_29_" style:list-style-name="WWNum20">
      <style:text-properties style:font-name="Aptos" fo:font-size="11pt" fo:language="pl" fo:country="PL" style:font-size-asian="11pt" style:font-size-complex="11pt"/>
    </style:style>
    <style:style style:name="P63" style:family="paragraph" style:parent-style-name="Text_20_body_20__28_user_29_" style:list-style-name="WWNum21">
      <style:text-properties style:font-name="Aptos" fo:font-size="11pt" fo:language="pl" fo:country="PL" style:font-size-asian="11pt" style:font-size-complex="11pt"/>
    </style:style>
    <style:style style:name="P64" style:family="paragraph" style:parent-style-name="Text_20_body_20__28_user_29_" style:list-style-name="WWNum21">
      <style:text-properties style:font-name="Aptos" fo:font-size="11pt" fo:language="pl" fo:country="PL" officeooo:paragraph-rsid="002ad670" style:font-size-asian="11pt" style:font-size-complex="11pt"/>
    </style:style>
    <style:style style:name="P65" style:family="paragraph" style:parent-style-name="Text_20_body_20__28_user_29_" style:list-style-name="WWNum22">
      <style:text-properties style:font-name="Aptos" fo:font-size="11pt" fo:language="pl" fo:country="PL" style:font-size-asian="11pt" style:font-size-complex="11pt"/>
    </style:style>
    <style:style style:name="P66" style:family="paragraph" style:parent-style-name="Text_20_body_20__28_user_29_" style:list-style-name="WWNum23">
      <style:text-properties style:font-name="Aptos" fo:font-size="11pt" fo:language="pl" fo:country="PL" style:font-size-asian="11pt" style:font-size-complex="11pt"/>
    </style:style>
    <style:style style:name="P67" style:family="paragraph" style:parent-style-name="Text_20_body_20__28_user_29_" style:list-style-name="WWNum24">
      <style:text-properties style:font-name="Aptos" fo:font-size="11pt" fo:language="pl" fo:country="PL" style:font-size-asian="11pt" style:font-size-complex="11pt"/>
    </style:style>
    <style:style style:name="P68" style:family="paragraph" style:parent-style-name="Text_20_body_20__28_user_29_">
      <style:text-properties style:font-name="Aptos" officeooo:paragraph-rsid="000e3dde"/>
    </style:style>
    <style:style style:name="P69" style:family="paragraph" style:parent-style-name="Text_20_body_20__28_user_29_">
      <style:paragraph-properties fo:text-align="start" style:justify-single-word="false"/>
      <style:text-properties style:font-name="Aptos" fo:font-size="12pt" fo:language="pl" fo:country="PL" fo:font-weight="bold" officeooo:paragraph-rsid="0022cc1e" style:font-size-asian="12pt" style:font-weight-asian="bold" style:font-size-complex="12pt" style:font-weight-complex="bold"/>
    </style:style>
    <style:style style:name="P70" style:family="paragraph" style:parent-style-name="Text_20_body_20__28_user_29_">
      <style:text-properties style:font-name="Aptos" fo:font-size="12pt" fo:language="pl" fo:country="PL" fo:font-weight="bold" style:font-size-asian="12pt" style:font-weight-asian="bold" style:font-size-complex="12pt" style:font-weight-complex="bold"/>
    </style:style>
    <style:style style:name="P71" style:family="paragraph" style:parent-style-name="Text_20_body_20__28_user_29_">
      <style:paragraph-properties fo:margin-left="0.5in" fo:margin-right="0in" fo:text-indent="0in" style:auto-text-indent="false">
        <style:tab-stops/>
      </style:paragraph-properties>
      <style:text-properties style:font-name="Aptos" fo:font-size="12pt" fo:language="pl" fo:country="PL" fo:font-weight="bold" style:font-size-asian="12pt" style:font-weight-asian="bold" style:font-size-complex="12pt" style:font-weight-complex="bold"/>
    </style:style>
    <style:style style:name="P72" style:family="paragraph" style:parent-style-name="Text_20_body_20__28_user_29_">
      <style:paragraph-properties fo:text-align="center" style:justify-single-word="false"/>
      <style:text-properties style:font-name="Aptos" fo:font-size="12pt" fo:language="pl" fo:country="PL" fo:font-weight="bold" officeooo:rsid="002f3b53" officeooo:paragraph-rsid="002f3b53" style:font-size-asian="12pt" style:font-weight-asian="bold" style:font-size-complex="12pt" style:font-weight-complex="bold"/>
    </style:style>
    <style:style style:name="P73" style:family="paragraph" style:parent-style-name="Text_20_body_20__28_user_29_">
      <style:text-properties style:font-name="Aptos" fo:font-size="12pt" fo:language="pl" fo:country="PL" fo:font-weight="bold" officeooo:rsid="0020d8f9" officeooo:paragraph-rsid="0020d8f9" style:font-size-asian="10.5pt" style:font-weight-asian="bold" style:font-size-complex="12pt" style:font-weight-complex="bold"/>
    </style:style>
    <style:style style:name="P74" style:family="paragraph" style:parent-style-name="Text_20_body_20__28_user_29_">
      <style:paragraph-properties fo:text-align="center" style:justify-single-word="false"/>
      <style:text-properties style:font-name="Aptos" fo:font-size="12pt" fo:language="pl" fo:country="PL" fo:font-weight="normal" officeooo:rsid="000ef755" officeooo:paragraph-rsid="000e3dde" style:font-size-asian="12pt" style:font-weight-asian="normal" style:font-size-complex="12pt" style:font-weight-complex="normal"/>
    </style:style>
    <style:style style:name="P75" style:family="paragraph" style:parent-style-name="Text_20_body_20__28_user_29_">
      <style:paragraph-properties fo:text-align="end" style:justify-single-word="false"/>
      <style:text-properties style:font-name="Aptos" fo:font-size="12pt" fo:language="pl" fo:country="PL" fo:font-weight="normal" officeooo:paragraph-rsid="000ef755" style:font-size-asian="12pt" style:font-weight-asian="normal" style:font-size-complex="12pt" style:font-weight-complex="normal"/>
    </style:style>
    <style:style style:name="P76" style:family="paragraph" style:parent-style-name="Text_20_body_20__28_user_29_" style:list-style-name="WWNum31">
      <style:text-properties style:font-name="Aptos" fo:font-size="12pt" fo:language="pl" fo:country="PL" style:font-size-asian="12pt" style:font-size-complex="12pt"/>
    </style:style>
    <style:style style:name="P77" style:family="paragraph" style:parent-style-name="Text_20_body_20__28_user_29_" style:list-style-name="WWNum32">
      <style:text-properties style:font-name="Aptos" fo:font-size="12pt" fo:language="pl" fo:country="PL" style:font-size-asian="12pt" style:font-size-complex="12pt"/>
    </style:style>
    <style:style style:name="P78" style:family="paragraph" style:parent-style-name="Text_20_body_20__28_user_29_" style:list-style-name="WWNum34">
      <style:text-properties style:font-name="Aptos" fo:font-size="12pt" fo:language="pl" fo:country="PL" style:font-size-asian="12pt" style:font-size-complex="12pt"/>
    </style:style>
    <style:style style:name="P79" style:family="paragraph" style:parent-style-name="Text_20_body_20__28_user_29_">
      <style:paragraph-properties fo:margin-left="0.5in" fo:margin-right="0in" fo:margin-top="0in" fo:margin-bottom="0in" style:contextual-spacing="false" fo:text-indent="0in" style:auto-text-indent="false">
        <style:tab-stops/>
      </style:paragraph-properties>
      <style:text-properties style:font-name="Aptos" fo:font-size="12pt" fo:language="pl" fo:country="PL" style:font-size-asian="12pt" style:font-size-complex="12pt"/>
    </style:style>
    <style:style style:name="P80" style:family="paragraph" style:parent-style-name="Text_20_body_20__28_user_29_" style:list-style-name="L2">
      <style:paragraph-properties fo:margin-left="1in" fo:margin-right="0in" fo:margin-top="0in" fo:margin-bottom="0in" style:contextual-spacing="false" fo:text-indent="0in" style:auto-text-indent="false">
        <style:tab-stops>
          <style:tab-stop style:position="0in"/>
        </style:tab-stops>
      </style:paragraph-properties>
      <style:text-properties style:font-name="Aptos" fo:font-size="12pt" fo:language="pl" fo:country="PL" style:font-size-asian="12pt" style:font-size-complex="12pt"/>
    </style:style>
    <style:style style:name="P81" style:family="paragraph" style:parent-style-name="Text_20_body_20__28_user_29_" style:list-style-name="L2">
      <style:paragraph-properties fo:margin-left="1in" fo:margin-right="0in" fo:margin-top="0in" fo:margin-bottom="0.0693in" style:contextual-spacing="false" fo:text-indent="0in" style:auto-text-indent="false">
        <style:tab-stops>
          <style:tab-stop style:position="0in"/>
        </style:tab-stops>
      </style:paragraph-properties>
      <style:text-properties style:font-name="Aptos" fo:font-size="12pt" fo:language="pl" fo:country="PL" style:font-size-asian="12pt" style:font-size-complex="12pt"/>
    </style:style>
    <style:style style:name="P82" style:family="paragraph" style:parent-style-name="Text_20_body_20__28_user_29_" style:list-style-name="L3">
      <style:paragraph-properties fo:margin-left="1in" fo:margin-right="0in" fo:margin-top="0in" fo:margin-bottom="0in" style:contextual-spacing="false" fo:text-indent="0in" style:auto-text-indent="false">
        <style:tab-stops>
          <style:tab-stop style:position="0in"/>
        </style:tab-stops>
      </style:paragraph-properties>
      <style:text-properties style:font-name="Aptos" fo:font-size="12pt" fo:language="pl" fo:country="PL" style:font-size-asian="12pt" style:font-size-complex="12pt"/>
    </style:style>
    <style:style style:name="P83" style:family="paragraph" style:parent-style-name="Text_20_body_20__28_user_29_" style:list-style-name="L3">
      <style:paragraph-properties fo:margin-left="1in" fo:margin-right="0in" fo:text-indent="0in" style:auto-text-indent="false">
        <style:tab-stops>
          <style:tab-stop style:position="0in"/>
        </style:tab-stops>
      </style:paragraph-properties>
      <style:text-properties style:font-name="Aptos" fo:font-size="12pt" fo:language="pl" fo:country="PL" style:font-size-asian="12pt" style:font-size-complex="12pt"/>
    </style:style>
    <style:style style:name="P84" style:family="paragraph" style:parent-style-name="Text_20_body_20__28_user_29_">
      <style:text-properties style:font-name="Aptos" fo:font-size="12pt" fo:language="pl" fo:country="PL" style:font-size-asian="12pt" style:font-size-complex="12pt"/>
    </style:style>
    <style:style style:name="P85" style:family="paragraph" style:parent-style-name="Text_20_body_20__28_user_29_">
      <style:paragraph-properties fo:margin-top="0in" fo:margin-bottom="0in" style:contextual-spacing="false">
        <style:tab-stops>
          <style:tab-stop style:position="1in"/>
        </style:tab-stops>
      </style:paragraph-properties>
      <style:text-properties style:font-name="Aptos" fo:font-size="12pt" fo:language="pl" fo:country="PL" style:font-size-asian="12pt" style:font-size-complex="12pt"/>
    </style:style>
    <style:style style:name="P86" style:family="paragraph" style:parent-style-name="Text_20_body_20__28_user_29_">
      <style:text-properties style:font-name="Aptos" fo:font-size="12pt" fo:language="pl" fo:country="PL" fo:font-style="italic" style:font-size-asian="12pt" style:font-style-asian="italic" style:font-size-complex="12pt" style:font-style-complex="italic"/>
    </style:style>
    <style:style style:name="P87" style:family="paragraph" style:parent-style-name="Text_20_body_20__28_user_29_">
      <style:paragraph-properties fo:margin-left="3.939in" fo:margin-right="0in" fo:text-indent="0.4925in" style:auto-text-indent="false">
        <style:tab-stops/>
      </style:paragraph-properties>
      <style:text-properties style:font-name="Aptos" fo:font-size="12pt" fo:language="pl" fo:country="PL" fo:font-style="italic" style:font-size-asian="12pt" style:font-style-asian="italic" style:font-size-complex="12pt" style:font-style-complex="italic"/>
    </style:style>
    <style:style style:name="P88" style:family="paragraph" style:parent-style-name="Text_20_body_20__28_user_29_">
      <style:paragraph-properties fo:margin-left="3.939in" fo:margin-right="0in" fo:text-indent="0.4925in" style:auto-text-indent="false">
        <style:tab-stops/>
      </style:paragraph-properties>
      <style:text-properties style:font-name="Aptos" fo:font-size="12pt" style:font-size-asian="12pt" style:font-size-complex="12pt"/>
    </style:style>
    <style:style style:name="P89" style:family="paragraph" style:parent-style-name="Text_20_body_20__28_user_29_" style:list-style-name="L3">
      <style:paragraph-properties fo:margin-left="1in" fo:margin-right="0in" fo:margin-top="0in" fo:margin-bottom="0in" style:contextual-spacing="false" fo:text-indent="0in" style:auto-text-indent="false">
        <style:tab-stops>
          <style:tab-stop style:position="0in"/>
        </style:tab-stops>
      </style:paragraph-properties>
      <style:text-properties style:font-name="Aptos" fo:font-size="12pt" style:font-size-asian="12pt" style:font-size-complex="12pt"/>
    </style:style>
    <style:style style:name="P90" style:family="paragraph" style:parent-style-name="Text_20_body_20__28_user_29_">
      <style:text-properties style:font-name="Aptos" fo:font-size="12pt" officeooo:paragraph-rsid="000e3dde" style:font-size-asian="12pt" style:font-size-complex="12pt"/>
    </style:style>
    <style:style style:name="P91" style:family="paragraph" style:parent-style-name="Text_20_body_20__28_user_29_" style:list-style-name="L4">
      <style:text-properties officeooo:paragraph-rsid="0022cc1e"/>
    </style:style>
    <style:style style:name="P92" style:family="paragraph" style:parent-style-name="Text_20_body_20__28_user_29_" style:list-style-name="L4">
      <style:text-properties officeooo:paragraph-rsid="0023195c"/>
    </style:style>
    <style:style style:name="P93" style:family="paragraph" style:parent-style-name="Text_20_body_20__28_user_29_" style:list-style-name="L4">
      <style:text-properties officeooo:paragraph-rsid="0025067a"/>
    </style:style>
    <style:style style:name="P94" style:family="paragraph">
      <loext:graphic-properties draw:fill="none"/>
    </style:style>
    <style:style style:name="T1" style:family="text">
      <style:text-properties style:font-name="Aptos1" fo:language="pl" fo:country="PL" fo:font-weight="bold" style:font-weight-asian="bold" style:font-weight-complex="bold"/>
    </style:style>
    <style:style style:name="T2" style:family="text">
      <style:text-properties officeooo:rsid="000e3dde"/>
    </style:style>
    <style:style style:name="T3" style:family="text">
      <style:text-properties officeooo:rsid="00113f8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1f3a2" style:font-weight-asian="normal" style:font-weight-complex="normal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13c6b4"/>
    </style:style>
    <style:style style:name="T8" style:family="text">
      <style:text-properties officeooo:rsid="00184aa3"/>
    </style:style>
    <style:style style:name="T9" style:family="text">
      <style:text-properties officeooo:rsid="001a3f10"/>
    </style:style>
    <style:style style:name="T10" style:family="text">
      <style:text-properties style:font-name="Aptos"/>
    </style:style>
    <style:style style:name="T11" style:family="text">
      <style:text-properties style:font-name="Aptos" fo:language="pl" fo:country="PL"/>
    </style:style>
    <style:style style:name="T12" style:family="text">
      <style:text-properties style:font-name="Aptos" fo:language="pl" fo:country="PL" fo:font-weight="bold" style:font-weight-asian="bold" style:font-weight-complex="bold"/>
    </style:style>
    <style:style style:name="T13" style:family="text">
      <style:text-properties style:font-name="Aptos" fo:language="pl" fo:country="PL" fo:font-weight="normal" style:font-weight-asian="normal" style:font-weight-complex="normal"/>
    </style:style>
    <style:style style:name="T14" style:family="text">
      <style:text-properties style:font-name="Aptos" fo:font-size="11pt" fo:language="pl" fo:country="PL" style:font-size-asian="11pt" style:font-size-complex="11pt"/>
    </style:style>
    <style:style style:name="T15" style:family="text">
      <style:text-properties style:font-name="Aptos" fo:font-size="11pt" fo:language="pl" fo:country="PL" fo:font-weight="bold" style:font-size-asian="11pt" style:font-weight-asian="bold" style:font-size-complex="11pt" style:font-weight-complex="bold"/>
    </style:style>
    <style:style style:name="T16" style:family="text">
      <style:text-properties style:font-name="Aptos" fo:font-size="14pt" fo:language="pl" fo:country="PL" fo:font-weight="bold" style:font-size-asian="14pt" style:font-weight-asian="bold" style:font-size-complex="14pt" style:font-weight-complex="bold"/>
    </style:style>
    <style:style style:name="T17" style:family="text">
      <style:text-properties style:font-name="Aptos" fo:font-size="14pt" fo:language="pl" fo:country="PL" fo:font-weight="bold" style:font-size-asian="14pt" style:font-weight-asian="bold" style:font-size-complex="15pt" style:font-weight-complex="bold"/>
    </style:style>
    <style:style style:name="T18" style:family="text">
      <style:text-properties style:font-name="Aptos" fo:font-size="14pt" fo:language="pl" fo:country="PL" style:font-size-asian="14pt" style:font-size-complex="14pt"/>
    </style:style>
    <style:style style:name="T19" style:family="text">
      <style:text-properties style:font-name="Aptos" fo:font-size="14pt" fo:language="pl" fo:country="PL" style:font-size-asian="14pt" style:font-size-complex="15pt"/>
    </style:style>
    <style:style style:name="T20" style:family="text">
      <style:text-properties style:font-name="Aptos" fo:font-size="14pt" style:font-size-asian="14pt" style:font-size-complex="15pt"/>
    </style:style>
    <style:style style:name="T21" style:family="text">
      <style:text-properties style:font-name="Aptos" fo:font-size="14pt" fo:font-weight="bold" style:font-size-asian="14pt" style:font-weight-asian="bold" style:font-size-complex="15pt" style:font-weight-complex="bold"/>
    </style:style>
    <style:style style:name="T22" style:family="text">
      <style:text-properties style:font-name="Aptos" fo:font-size="16pt" fo:language="pl" fo:country="PL" fo:font-weight="bold" style:font-size-asian="16pt" style:font-weight-asian="bold" style:font-size-complex="16pt" style:font-weight-complex="bold"/>
    </style:style>
    <style:style style:name="T23" style:family="text">
      <style:text-properties style:font-name="Aptos" fo:font-size="24pt" fo:language="pl" fo:country="PL" style:font-size-asian="24pt" style:font-size-complex="21pt"/>
    </style:style>
    <style:style style:name="T24" style:family="text">
      <style:text-properties style:font-name="Aptos" fo:font-size="12pt" fo:language="pl" fo:country="PL" fo:font-weight="normal" officeooo:rsid="0020d8f9" style:font-size-asian="10.5pt" style:font-weight-asian="normal" style:font-size-complex="12pt" style:font-weight-complex="normal"/>
    </style:style>
    <style:style style:name="T25" style:family="text">
      <style:text-properties style:font-name="Aptos" fo:font-size="12pt" fo:language="pl" fo:country="PL" fo:font-weight="bold" style:font-size-asian="12pt" style:font-weight-asian="bold" style:font-size-complex="12pt" style:font-weight-complex="bold"/>
    </style:style>
    <style:style style:name="T26" style:family="text">
      <style:text-properties style:font-name="Aptos" fo:font-size="12pt" fo:language="pl" fo:country="PL" fo:font-weight="bold" officeooo:rsid="002d84f0" style:font-size-asian="12pt" style:font-weight-asian="bold" style:font-size-complex="12pt" style:font-weight-complex="bold"/>
    </style:style>
    <style:style style:name="T27" style:family="text">
      <style:text-properties style:font-name="Aptos" fo:font-size="12pt" fo:language="pl" fo:country="PL" style:font-size-asian="12pt" style:font-size-complex="12pt"/>
    </style:style>
    <style:style style:name="T28" style:family="text">
      <style:text-properties style:font-name="Aptos" fo:font-size="12pt" style:font-size-asian="12pt" style:font-size-complex="12pt"/>
    </style:style>
    <style:style style:name="T29" style:family="text">
      <style:text-properties style:font-name="Aptos" fo:font-size="12pt" fo:font-weight="bold" style:font-size-asian="12pt" style:font-weight-asian="bold" style:font-size-complex="12pt" style:font-weight-complex="bold"/>
    </style:style>
    <style:style style:name="T30" style:family="text">
      <style:text-properties style:font-name="Aptos" fo:font-weight="bold" style:font-weight-asian="bold" style:font-weight-complex="bold"/>
    </style:style>
    <style:style style:name="T31" style:family="text">
      <style:text-properties officeooo:rsid="001f00c0"/>
    </style:style>
    <style:style style:name="T32" style:family="text">
      <style:text-properties officeooo:rsid="0022cc1e"/>
    </style:style>
    <style:style style:name="T33" style:family="text">
      <style:text-properties fo:font-style="italic" officeooo:rsid="000ef755" style:font-style-asian="italic" style:font-style-complex="italic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70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70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70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70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70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70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70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70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70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71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71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71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71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71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71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71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71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71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width="0.0209in" svg:stroke-color="#000000" svg:stroke-opacity="100%" draw:stroke-linejoin="miter" svg:stroke-linecap="butt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<text:span text:style-name="T23">SkySchool</text:span></text:h>
      <text:p text:style-name="P20"><text:span text:style-name="T23"/></text:p>
      <text:p text:style-name="P23">Politechnika Białostocka</text:p>
      <text:p text:style-name="P23"><text:span text:style-name="T4">Wydział Informatyki, </text:span><text:span text:style-name="T5">Informatyka</text:span></text:p>
      <text:p text:style-name="P28">Przedmiot:<text:span text:style-name="T6"> Inżyniera oprogramowania, </text:span><text:span text:style-name="T7">2 rok studiów</text:span></text:p>
      <text:p text:style-name="P29">Prowadzący:<text:span text:style-name="T6"> dr inż Marcin Czajkowski</text:span></text:p>
      <text:p text:style-name="P30">Data przekazania sprawozdania:<text:span text:style-name="T6"> </text:span></text:p>
      <text:p text:style-name="P30"/>
      <text:p text:style-name="P21"/>
      <text:p text:style-name="P24"><text:span text:style-name="T3">0.1. </text:span>Skład grupy:</text:p>
      <text:list xml:id="list1359460911" text:style-name="WWNum1">
        <text:list-item text:start-value="0">
          <text:p text:style-name="P31">Sandra Dzieniszewska</text:p>
        </text:list-item>
        <text:list-item>
          <text:p text:style-name="P31">Hubert Milewski</text:p>
        </text:list-item>
        <text:list-item>
          <text:p text:style-name="P31">Patryk Wojtkielewicz</text:p>
        </text:list-item>
      </text:list>
      <text:p text:style-name="P22">0.2. Proponowana punktacja:</text:p>
      <text:list xml:id="list170207550336226" text:continue-list="list1359460911" text:style-name="WWNum1">
        <text:list-item text:start-value="0">
          <text:p text:style-name="P32">Sandra Dzieniszewska</text:p>
        </text:list-item>
        <text:list-item>
          <text:p text:style-name="P32">Hubert Milewski</text:p>
        </text:list-item>
        <text:list-item>
          <text:p text:style-name="P33">Patryk Wojtkielewicz</text:p>
        </text:list-item>
      </text:list>
      <text:p text:style-name="P25">0.3 Adres repozytorium:</text:p>
      <text:p text:style-name="P9"><text:a xlink:type="simple" xlink:href="https://github.com/PatrykWojtkielewicz/SkySchool" text:style-name="Internet_20_link" text:visited-style-name="Visited_20_Internet_20_Link"><text:span text:style-name="T10">https://github.com/PatrykWojtkielewicz/SkySchool</text:span></text:a></text:p>
      <text:p text:style-name="P22"/>
      <text:p text:style-name="P26"><text:span text:style-name="T8">1. Treść zadania projektowego</text:span></text:p>
      <text:p text:style-name="P26"><text:span text:style-name="T9">2. Cel budowy projektu</text:span></text:p>
      <text:p text:style-name="P34">Celem aplikacji internetowej jest zarządzanie sekcją spadochronową na lotnisku. Docelowo, każdy pracownik sekcji będzie miał dostęp do panelu w którym może zarządzać sekcją. Funkcjonalność aplikacji będzie pokrywać m.in.:</text:p>
      <text:list xml:id="list583178394" text:style-name="WWNum2">
        <text:list-item text:start-value="0">
          <text:p text:style-name="P35">Grafik pracowników</text:p>
        </text:list-item>
        <text:list-item>
          <text:p text:style-name="P35">Zarządzanie wylotami</text:p>
        </text:list-item>
        <text:list-item>
          <text:p text:style-name="P35">Kontrola uprawnień skoczków oraz pilotów</text:p>
        </text:list-item>
        <text:list-item>
          <text:p text:style-name="P35">Organizacja wydarzeń</text:p>
        </text:list-item>
        <text:list-item>
          <text:p text:style-name="P35">Organizacja kursów i szkoleń</text:p>
        </text:list-item>
        <text:list-item>
          <text:p text:style-name="P35">Przechowywanie informacji dotyczących stanów spadochronów</text:p>
        </text:list-item>
      </text:list>
      <text:p text:style-name="P34"><text:soft-page-break/>Dodatkowo, aplikacja będzie udostępniała interfejs który wyświetlony na układalni będzie informować skoczków o nadchodzących wylotach oraz przewidywanym czasie oczekiwania.</text:p>
      <text:p text:style-name="P24">Elementy interfesju</text:p>
      <text:list xml:id="list380742609" text:style-name="WWNum3">
        <text:list-item text:start-value="0">
          <text:p text:style-name="P36">„Dashboard” – podsumowanie wszystkich kluczowych informacji na dzień ze skokami</text:p>
        </text:list-item>
        <text:list-item>
          <text:p text:style-name="P36">Dodawanie skoczków, wylotów, osób, kursów, szkoleń, spadochronów itd.</text:p>
        </text:list-item>
        <text:list-item>
          <text:p text:style-name="P36">Logowanie i rejestracja</text:p>
        </text:list-item>
        <text:list-item>
          <text:p text:style-name="P36">Interfejs podsumuwujący najbliższe wyloty do wyświetlenia w układalni</text:p>
        </text:list-item>
      </text:list>
      <text:p text:style-name="P24">Korzyści mierzalne</text:p>
      <text:list xml:id="list3522004333" text:style-name="WWNum4">
        <text:list-item text:start-value="0">
          <text:p text:style-name="P37">Lepsza organizacja czasem i pieniędzmi skoczków, pracowników oraz aeroklubu</text:p>
        </text:list-item>
        <text:list-item>
          <text:p text:style-name="P37">Sprawniejsze przygotowanie skoczków przed wylotem</text:p>
        </text:list-item>
      </text:list>
      <text:p text:style-name="P24">Korzyści niemierzalne</text:p>
      <text:list xml:id="list4050012799" text:style-name="WWNum5">
        <text:list-item text:start-value="0">
          <text:p text:style-name="P38">Zwiększone bezpieczeństwo na strefie</text:p>
        </text:list-item>
        <text:list-item>
          <text:p text:style-name="P38">Ułatwione poruszanie się po strefie dla nowych skoczków</text:p>
        </text:list-item>
      </text:list>
      <text:p text:style-name="P34"/>
      <text:p text:style-name="P6"><text:span text:style-name="T31">3. Słownik pojęć</text:span></text:p>
      <text:h text:style-name="P8" text:outline-level="3">Organizacja skoków</text:h>
      <text:list xml:id="list3679902615" text:style-name="WWNum6">
        <text:list-item text:start-value="0">
          <text:p text:style-name="P39">Skok – opuszczenie statku powietrznego</text:p>
        </text:list-item>
        <text:list-item>
          <text:p text:style-name="P39">Wysokość skoku – wysokość z której wyskakujemy</text:p>
        </text:list-item>
        <text:list-item>
          <text:p text:style-name="P39">Wysokość otwarcia – wysokość na jakiej rozpoczynamy otwarcie spadochronu</text:p>
        </text:list-item>
        <text:list-item>
          <text:p text:style-name="P39">Wysokość zawiśnięcia – wysokość na jakiej spadochron w pełni się otworzy</text:p>
        </text:list-item>
        <text:list-item>
          <text:p text:style-name="P39">Wysokość awaryjna – wysokość na jakiej decydujemy, czy lądujemy na spadochronie jaki mamy nad główą czy przesiadamy się na zapasowy</text:p>
        </text:list-item>
        <text:list-item>
          <text:p text:style-name="P39">Separacja – czas liczony w sekundach pomiędzy wyskokiem poszczególnych skoczków / grup skoczków</text:p>
        </text:list-item>
        <text:list-item>
          <text:p text:style-name="P39">Strefa zrzutu (Drop zone, DZ) – miejsce przeznaczone do lądowania</text:p>
        </text:list-item>
        <text:list-item>
          <text:p text:style-name="P39">Strefa oczekiwania – miejsce w którym zbijamy wysokość po pomyślnym otwarciu spadochronu</text:p>
        </text:list-item>
        <text:list-item>
          <text:p text:style-name="P39">Runda – “pattern” który wykonujemy przed lądowaniem. Na 300, 200 oraz 100m wykonujemy zakręt 90 stopni w lewo / prawo w celu ustawienia się pod wiatr I uniknięcia kolizji z innymi skoczkami</text:p>
        </text:list-item>
      </text:list>
      <text:h text:style-name="P8" text:outline-level="3">Budowa spadochronu</text:h>
      <text:list xml:id="list1574935616" text:style-name="WWNum7">
        <text:list-item text:start-value="0">
          <text:p text:style-name="P40">Czasza – materiał służący do spowolnienia upadku spadochroniarza</text:p>
        </text:list-item>
        <text:list-item>
          <text:p text:style-name="P40">Spadochron główny – czasza używana w 99% przypadków</text:p>
        </text:list-item>
        <text:list-item>
          <text:p text:style-name="P40">Spadochron zapasowy – czasza używana w 1% przypadków</text:p>
        </text:list-item>
        <text:list-item>
          <text:p text:style-name="P40"><text:soft-page-break/>Paczka – opakowanie do którego chowamy czaszę</text:p>
        </text:list-item>
        <text:list-item>
          <text:p text:style-name="P40">Kontener – opakowanie do którego chowamy paczkę</text:p>
        </text:list-item>
        <text:list-item>
          <text:p text:style-name="P40">Uprząż – uprząż którą nakłada skoczek, do niej przyszyty jest kontener</text:p>
        </text:list-item>
        <text:list-item>
          <text:p text:style-name="P40">Pilocik – “spadochronik” służący do wyciągnięcia paczki z kontenera. Uchwyt pilocika znajduje się na plecach z prawej strony, w okolicach bioder</text:p>
        </text:list-item>
        <text:list-item>
          <text:p text:style-name="P40">Linki – łączą taśmy nośne z czaszą</text:p>
        </text:list-item>
        <text:list-item>
          <text:p text:style-name="P40">Taśmy nośne – łączą linki z systemem 3 kółek</text:p>
        </text:list-item>
        <text:list-item>
          <text:p text:style-name="P40">System 3 kółek – sposób mocowania czaszy spadochronu głównego pozwalający na łatwe niezawodne wypięcie go w razie awarii.</text:p>
        </text:list-item>
        <text:list-item>
          <text:p text:style-name="P40">Uchwyty – znajdują się w okolicach brzucha, prawy służy do wypięcia czaszy głównej, lewy służy do otwarcia czaszy zapasowej</text:p>
        </text:list-item>
      </text:list>
      <text:p text:style-name="P34"/>
      <text:p text:style-name="P34"/>
      <text:h text:style-name="P8" text:outline-level="3">Rodzaje skoków</text:h>
      <text:list xml:id="list3375039726" text:style-name="WWNum8">
        <text:list-item text:start-value="0">
          <text:p text:style-name="P41">Tandem – skok z instruktorem</text:p>
        </text:list-item>
        <text:list-item>
          <text:p text:style-name="P41">Solo – skok w pojedynkę</text:p>
        </text:list-item>
        <text:list-item>
          <text:p text:style-name="P41">RW – skok w grupie, wszyscy spadają na brzuchu</text:p>
        </text:list-item>
        <text:list-item>
          <text:p text:style-name="P41">FF – skok w grupie, wszyscy spadają na siedząco lub głową do dołu</text:p>
        </text:list-item>
        <text:list-item>
          <text:p text:style-name="P41">TRACK – skok w grupie, wszyscy przemieszczają się w danym kierunku</text:p>
        </text:list-item>
        <text:list-item>
          <text:p text:style-name="P41">Wingsuit – skok solo / w grupie, skoczkowie ubrani są w Wingsuity</text:p>
        </text:list-item>
        <text:list-item>
          <text:p text:style-name="P41">Static line – skok solo z natychmiastowym otwarciem zainicijowanym przez linę zamocowaną do statku powietrznego</text:p>
        </text:list-item>
      </text:list>
      <text:h text:style-name="P8" text:outline-level="3">Role na lotnisku</text:h>
      <text:list xml:id="list1232095997" text:style-name="WWNum9">
        <text:list-item text:start-value="0">
          <text:p text:style-name="P42">Kierownik skoków – odpowiedzialny za poprawny przebieg skoków</text:p>
        </text:list-item>
        <text:list-item>
          <text:p text:style-name="P42">Układacz – osoba układająca spadochrony główne</text:p>
        </text:list-item>
        <text:list-item>
          <text:p text:style-name="P42">Rigger – mechanik spadochronowy, odpowiedzialny za układanie spadochronu zapasowego oraz naprawy</text:p>
        </text:list-item>
        <text:list-item>
          <text:p text:style-name="P42">Instruktor AFF – instruktor z uprawnieniami na szkolenie przeprowadzanie szkoleń AFF</text:p>
        </text:list-item>
        <text:list-item>
          <text:p text:style-name="P42">Instruktor SL – instruktor z uprawnieniami na szkolenie przeprowadzanie szkoleń SL</text:p>
        </text:list-item>
        <text:list-item>
          <text:p text:style-name="P42">Instruktor – osoba w uprawnieniami instruktora</text:p>
        </text:list-item>
        <text:list-item>
          <text:p text:style-name="P42">Kamerzysta – skoczek wyskakujący obok tandemu, nagrywając go</text:p>
        </text:list-item>
        <text:list-item>
          <text:p text:style-name="P42">Spotter – wyznaczony skoczek w samolocie odpowiedzialny za upewnienie się, czy znajdujemy się w miejscu zrzutu</text:p>
        </text:list-item>
        <text:list-item>
          <text:p text:style-name="P42"><text:soft-page-break/>Wyrzucający – wyznaczony skoczek odpowiedzialny za prawidłowe opuszczenie statku powietrznego przez skoczków</text:p>
        </text:list-item>
      </text:list>
      <text:h text:style-name="P8" text:outline-level="3">Procedury</text:h>
      <text:list xml:id="list2865928984" text:style-name="WWNum10">
        <text:list-item text:start-value="0">
          <text:p text:style-name="P43">Otwarcie – proces otwarcia głównego spadochronu</text:p>
        </text:list-item>
        <text:list-item>
          <text:p text:style-name="P43">Cutaway – proces odczepienia głównego spadochronu</text:p>
        </text:list-item>
        <text:list-item>
          <text:p text:style-name="P43">RSL – system otwierający spadochron zapasowy przy pomocy spadochronu głównego</text:p>
        </text:list-item>
        <text:list-item>
          <text:p text:style-name="P43">MARD – modyfikacja RSL</text:p>
        </text:list-item>
        <text:list-item>
          <text:p text:style-name="P43">Automat – (ang. Automatic Activation Device) komputer umieszczony w kontenerze który bada prędkość opadania skoczka I aktualną wysokość. W razie wykrycia nie otwarcia spadochronu poniżej podanej wysokości automat samodzielnie otwiera spadochron zapasowy</text:p>
        </text:list-item>
        <text:list-item>
          <text:p text:style-name="P43">Procedura awayjna – proces postępowania w przypadku wystąpienia awarii.</text:p>
        </text:list-item>
        <text:list-item>
          <text:p text:style-name="P43">Gear check – kontrola przed skokiem</text:p>
        </text:list-item>
        <text:list-item>
          <text:p text:style-name="P43">Briefing – omówienie wylotu</text:p>
        </text:list-item>
      </text:list>
      <text:p text:style-name="P34"/>
      <text:h text:style-name="P8" text:outline-level="3">Parametry</text:h>
      <text:list xml:id="list1505357961" text:style-name="WWNum11">
        <text:list-item text:start-value="0">
          <text:p text:style-name="P44">Wysokość – wysokość nad poziomem ziemi (AGL) mierzona w metrach</text:p>
        </text:list-item>
        <text:list-item>
          <text:p text:style-name="P44">Prędkość opadania – prędkość z jaką się spada. Po osiągnięciu prędkości krytycznej, dla skoczka na brzuchu wynosi około 50 m/s, w przypadku skoku FF może być bliższa 80 m/s</text:p>
        </text:list-item>
        <text:list-item>
          <text:p text:style-name="P44">Wing Loading (WL) – stosunek masy skoczka (masa osoby + ubrań + sprzętu + spadochronu) do powierzchni czaszy spadochronu głównego, wyrażony w proporcji funtów do stóp kwadratowych (lbs/ft sq)</text:p>
        </text:list-item>
      </text:list>
      <text:h text:style-name="P8" text:outline-level="3">Inne</text:h>
      <text:list xml:id="list1268435014" text:style-name="WWNum12">
        <text:list-item text:start-value="0">
          <text:p text:style-name="P45">Książka skoków – miejsce w którym dokumentujemy skoki</text:p>
        </text:list-item>
        <text:list-item>
          <text:p text:style-name="P45">Licencja – uprawnienia skoczka, w Polsce PJ, w USA USPA</text:p>
        </text:list-item>
      </text:list>
      <text:p text:style-name="Text_20_body_20__28_user_29_"><draw:connector text:anchor-type="paragraph" draw:z-index="2" draw:name="Łącznik prosty 1" draw:style-name="gr1" draw:text-style-name="P94" draw:type="line" svg:x1="-0.7311in" svg:y1="0.1654in" svg:x2="7.9642in" svg:y2="0.1654in" svg:d="M-1857 420h22086" svg:viewBox="0 0 22087 2"><text:p/></draw:connector><text:span text:style-name="Domyślna_20_czcionka_20_akapitu"><text:span text:style-name="T11"/></text:span></text:p>
      <text:p text:style-name="P50"/>
      <text:p text:style-name="P54"/>
      <text:p text:style-name="P69"><text:span text:style-name="T31">4.1 </text:span>DIAGRAM PRZYPADKÓW UŻYCIA</text:p>
      <text:p text:style-name="P69"><text:soft-page-break/><draw:frame draw:style-name="fr1" draw:name="Image3" text:anchor-type="as-char" svg:y="0in" svg:width="7.2681in" style:rel-width="scale" svg:height="4.7535in" style:rel-height="scale" draw:z-index="3"><draw:image xlink:href="Pictures/1000000000000450000002D2B06A4AAE0A85BB10.jpg" xlink:type="simple" xlink:show="embed" xlink:actuate="onLoad" draw:mime-type="image/jpeg"/></draw:frame></text:p>
      <text:p text:style-name="P69"/>
      <text:p text:style-name="P73">4.1.1 Opisy tekstowe wszystkich aktoró<text:span text:style-name="T32">w</text:span></text:p>
      <text:list xml:id="list1502947774" text:style-name="L4">
        <text:list-item>
          <text:p text:style-name="P91"><text:span text:style-name="T12">Kierownik skoków (Manifest / Jumpmaster) </text:span><text:span text:style-name="T13">- </text:span><text:span text:style-name="T11">Jest to główny aktor systemu, posiadający najszerszy zakres uprawnień. Odpowiada za koordynację całości działań na strefie.</text:span></text:p>
          <text:list>
            <text:list-item>
              <text:p text:style-name="P91"><text:span text:style-name="T11">Główne zadania: Zarządzanie grafikiem personelu, dodawanie nowych skoczków, planowanie i tworzenie wylotów, przypisywanie skoczków do konkretnych lotów oraz prowadzenie briefingów.</text:span></text:p>
            </text:list-item>
            <text:list-item>
              <text:p text:style-name="P91"><text:span text:style-name="T11">Powiązania: Ma dostęp do modułów zarządzania personelem, wylotami oraz szkoleniami.</text:span></text:p>
            </text:list-item>
          </text:list>
        </text:list-item>
        <text:list-item>
          <text:p text:style-name="P91"><text:span text:style-name="T12">Skoczek (Skydiver) </text:span><text:span text:style-name="T13">- </text:span><text:span text:style-name="T11">Użytkownik końcowy, dla którego świadczone są usługi strefy.</text:span></text:p>
          <text:list>
            <text:list-item>
              <text:p text:style-name="P91"><text:span text:style-name="T11">Główne zadania: Rejestracja na szkolenia oraz udział w kursach i szkoleniach organizowanych przez strefę.</text:span></text:p>
            </text:list-item>
            <text:list-item>
              <text:p text:style-name="P91"><text:span text:style-name="T11">Ważna funkcja: Musi przejść proces Logowania, aby system zidentyfikował jego uprawnienia i status.</text:span></text:p>
            </text:list-item>
          </text:list>
        </text:list-item>
        <text:list-item>
          <text:p text:style-name="P92"><text:span text:style-name="T12">Pilot </text:span><text:span text:style-name="T13">- </text:span><text:span text:style-name="T11">Aktor operacyjny odpowiedzialny za techniczny aspekt wylotu.</text:span></text:p>
          <text:list>
            <text:list-item>
              <text:p text:style-name="P92"><text:span text:style-name="T11">Główne zadania: Interaguje z systemem w zakresie monitorowania stanu wylotu. Dzięki temu wie, kiedy wylot jest gotowy, ilu skoczków jest na pokładzie i jakie są parametry zrzutu.</text:span></text:p>
            </text:list-item>
          </text:list>
        </text:list-item>
        <text:list-item>
          <text:p text:style-name="P92"><text:soft-page-break/><text:span text:style-name="T12">Rigger (Mechanik spadochronowy) </text:span><text:span text:style-name="T13">- </text:span><text:span text:style-name="T11">Specjalista odpowiedzialny za bezpieczeństwo i stan techniczny sprzętu.</text:span></text:p>
          <text:list>
            <text:list-item>
              <text:p text:style-name="P92"><text:span text:style-name="T11">Główne zadania: Wykonuje kontrolę stanu spadochronu oraz przeprowadza procedurę Gear check (sprawdzenie sprzętu przed skokiem). Może również zajmować się układaniem spadochronów (podobnie jak układacz).</text:span></text:p>
            </text:list-item>
          </text:list>
        </text:list-item>
        <text:list-item>
          <text:p text:style-name="P92"><text:span text:style-name="T12">Układacz (Packer) </text:span><text:span text:style-name="T13">- </text:span><text:span text:style-name="T11">Osoba odpowiedzialna za przygotowanie spadochronów do ponownego użycia.</text:span></text:p>
          <text:list>
            <text:list-item>
              <text:p text:style-name="P92"><text:span text:style-name="T11">Główne zadania: Jego główną interakcją z systemem jest układanie spadochronu. Podobnie jak Rigger i Skoczek, może zgłaszać usterki sprzętu, co jest oznaczone relacją &lt;&lt;extend&gt;&gt;.</text:span></text:p>
            </text:list-item>
          </text:list>
        </text:list-item>
        <text:list-item>
          <text:p text:style-name="P93"><text:span text:style-name="T12">System wyświetlania informacji </text:span><text:span text:style-name="T13">- </text:span><text:span text:style-name="T11">Jest to aktor niebędący człowiekiem (system zewnętrzny, np. monitor w hangarze lub zewnętrzna aplikacja).</text:span></text:p>
          <text:list>
            <text:list-item>
              <text:p text:style-name="P93"><text:span text:style-name="T24">Główne zadania: Odpowiada za wyświetlanie wylotów w układalni. Pobiera dane z modułu "Zarządzanie wylotami", aby informować skoczków i personel o zbliżających się startach.</text:span></text:p>
            </text:list-item>
          </text:list>
        </text:list-item>
      </text:list>
      <text:p text:style-name="P55"/>
      <text:p text:style-name="P53"/>
      <text:p text:style-name="P53"/>
      <text:p text:style-name="P53"/>
      <text:p text:style-name="P53"/>
      <text:p text:style-name="P5">4.1.2 Opisy przypadków użycia</text:p>
      <text:list xml:id="list1284521115" text:style-name="WWNum19">
        <text:list-header>
          <text:p text:style-name="P56"/>
        </text:list-header>
        <text:list-item>
          <text:p text:style-name="P56">UKŁADANIE SPADOCHRONU</text:p>
        </text:list-item>
      </text:list>
      <text:list xml:id="list3193908302" text:style-name="WWNum29">
        <text:list-item text:start-value="1">
          <text:p text:style-name="P10"><text:span text:style-name="T15">Uczestniczący aktorzy:</text:span></text:p>
        </text:list-item>
      </text:list>
      <text:list xml:id="list159246840" text:style-name="WWNum20">
        <text:list-item text:start-value="0">
          <text:p text:style-name="P62">Układacz (inicjuje proces) – osoba odpowiedzialna za fizyczne złożenie czaszy i wprowadzenie danych do systemu.</text:p>
        </text:list-item>
        <text:list-item>
          <text:p text:style-name="P62">Rigger (aktor wspierający) – nadzoruje stan techniczny i interweniuje w sytuacjach wymagających naprawy.</text:p>
        </text:list-item>
      </text:list>
      <text:list xml:id="list185202808876043" text:style-name="WWNum29">
        <text:list-item>
          <text:p text:style-name="P60">Podstawowy ciąg zdarzeń:</text:p>
        </text:list-item>
      </text:list>
      <text:list xml:id="list2377539078" text:style-name="WWNum21">
        <text:list-item text:start-value="1">
          <text:p text:style-name="P64">Logowanie: Układacz loguje się do systemu (proces zawiera w sobie przypadek użycia "Logowanie").</text:p>
        </text:list-item>
        <text:list-item>
          <text:p text:style-name="P63">Wybór sprzętu: Układacz wybiera konkretny spadochron do ułożenia z listy dostępnego sprzętu.</text:p>
        </text:list-item>
        <text:list-item>
          <text:p text:style-name="P63">Weryfikacja: System automatycznie sprawdza, czy spadochron nie wymaga przeglądu technicznego (proces rozszerzony o przypadek "Kontrola stanu spadochronu").</text:p>
        </text:list-item>
        <text:list-item>
          <text:p text:style-name="P63">Praca fizyczna: Układacz przystępuje do fizycznego układania czaszy spadochronu.</text:p>
        </text:list-item>
        <text:list-item>
          <text:p text:style-name="P63">Potwierdzenie: Po zakończeniu układania, Układacz wprowadza do systemu potwierdzenie wykonania pracy.</text:p>
        </text:list-item>
        <text:list-item>
          <text:p text:style-name="P63"><text:soft-page-break/>Rejestracja danych: System zapisuje datę, godzinę oraz identyfikator Układacza w karcie technicznej sprzętu.</text:p>
        </text:list-item>
        <text:list-item>
          <text:p text:style-name="P64">Aktualizacja statusu: System zmienia status spadochronu na "Gotowy do skoku".</text:p>
        </text:list-item>
      </text:list>
      <text:list xml:id="list185202399573035" text:style-name="WWNum29">
        <text:list-item>
          <text:p text:style-name="P61">Alternatywne ciągi zdarzeń:</text:p>
        </text:list-item>
      </text:list>
      <text:list xml:id="list699470466" text:style-name="WWNum22">
        <text:list-item text:start-value="0">
          <text:p text:style-name="P65">Wykrycie usterki (rozszerzenie kroku 4): Jeśli w trakcie układania Układacz stwierdzi uszkodzenie lub zużycie materiału, wywołuje przypadek "Zgłaszanie usterki spadochronu". System blokuje wtedy możliwość oznaczenia sprzętu jako gotowy i zmienia jego status na "W naprawie".</text:p>
        </text:list-item>
        <text:list-item>
          <text:p text:style-name="P65">Negatywny wynik kontroli (krok 3): Jeśli system stwierdzi przekroczenie terminu ważności przeglądu, odmawia rejestracji ułożenia i wyświetla komunikat o konieczności przekazania sprzętu Riggerowi.</text:p>
        </text:list-item>
      </text:list>
      <text:list xml:id="list185203531835249" text:style-name="WWNum29">
        <text:list-item>
          <text:p text:style-name="P60">Zależności czasowe:</text:p>
        </text:list-item>
      </text:list>
      <text:list xml:id="list3615340896" text:style-name="WWNum23">
        <text:list-item text:start-value="0">
          <text:p text:style-name="P11"><text:span text:style-name="Domyślna_20_czcionka_20_akapitu"><text:span text:style-name="T14">Częstotliwość: od 10 do 50 razy dziennie w zależności od intensywności skoków.</text:span></text:span></text:p>
        </text:list-item>
        <text:list-item>
          <text:p text:style-name="P11"><text:span text:style-name="Domyślna_20_czcionka_20_akapitu"><text:span text:style-name="T14">Przewidywane spiętrzenia: dni weekendowe oraz podczas sprzyjających warunków atmosferycznych, bezpośrednio po zakończeniu serii skoków (wylotów)".</text:span></text:span></text:p>
        </text:list-item>
        <text:list-item>
          <text:p text:style-name="P66">Typowy czas realizacji: 15 – 20 minut</text:p>
        </text:list-item>
        <text:list-item>
          <text:p text:style-name="P11"><text:span text:style-name="Domyślna_20_czcionka_20_akapitu"><text:span text:style-name="T14">Maksymalny czas realizacji: 40 minut (w przypadku skomplikowanego układania lub problemów technicznych)</text:span></text:span></text:p>
        </text:list-item>
      </text:list>
      <text:list xml:id="list185202180831824" text:style-name="WWNum29">
        <text:list-item>
          <text:p text:style-name="P60">Wartości uzyskane przez aktorów:</text:p>
        </text:list-item>
      </text:list>
      <text:list xml:id="list3694113639" text:style-name="WWNum24">
        <text:list-item text:start-value="0">
          <text:p text:style-name="P67">Gwarancja prawidłowego zarejestrowania przygotowania sprzętu w systemie.</text:p>
        </text:list-item>
        <text:list-item>
          <text:p text:style-name="P67">Możliwość przypisania spadochronu do konkretnego wylotu przez Kierownika skoków.</text:p>
        </text:list-item>
        <text:list-item>
          <text:p text:style-name="P67">Zachowanie pełnej i ciągłej dokumentacji technicznej spadochronu.</text:p>
        </text:list-item>
      </text:list>
      <text:p text:style-name="P58">wykonała: Sandra Dzieniszewska</text:p>
      <text:list xml:id="list185202102959815" text:style-name="WWNum19">
        <text:list-item>
          <text:p text:style-name="P56">PLANOWANIE I TWORZENIE WYLOTÓW.</text:p>
        </text:list-item>
      </text:list>
      <text:p text:style-name="P24">1. Uczestniczący aktorzy:</text:p>
      <text:list xml:id="list2458428762" text:style-name="WWNum25">
        <text:list-item text:start-value="0">
          <text:p text:style-name="P46">Kierownik skoków</text:p>
        </text:list-item>
      </text:list>
      <text:p text:style-name="P24">2. Podstawowy ciąg zdarzeń:</text:p>
      <text:list xml:id="list3842539134" text:style-name="WWNum26">
        <text:list-item text:start-value="0">
          <text:p text:style-name="P47">Kierownik skoków wybiera funkcję tworzenia nowego wylotu w module „Zarządzanie wylotami”.</text:p>
        </text:list-item>
        <text:list-item>
          <text:p text:style-name="P47">System otwiera formularz lotu.</text:p>
        </text:list-item>
        <text:list-item>
          <text:p text:style-name="P47">Kierownik definiuje parametry techniczne wylotu (np. numer lotu, godzina).</text:p>
        </text:list-item>
        <text:list-item>
          <text:p text:style-name="P47">Po zakończeniu przypisywania osób, Kierownik zatwierdza utworzenie wylotu.</text:p>
        </text:list-item>
        <text:list-item>
          <text:p text:style-name="P47">System zapisuje gotowy plan wylotu w bazie danych</text:p>
        </text:list-item>
        <text:list-item>
          <text:p text:style-name="P47">Kierownik skoków omawia ze skoczkami jak będzie przebiegać wylot (rozszerzenie przypadku „Prowadzenie briefingu”)</text:p>
        </text:list-item>
      </text:list>
      <text:p text:style-name="P24">3. Alternatywne ciągi zdarzeń:</text:p>
      <text:list xml:id="list601416608" text:style-name="WWNum27">
        <text:list-item text:start-value="0">
          <text:p text:style-name="P48">a) Przerwanie tworzenia wylotu:</text:p>
          <text:list>
            <text:list-item>
              <text:p text:style-name="P48"><text:soft-page-break/>Kierownik skoków rezygnuje z tworzenia lotu przed jego zatwierdzeniem.</text:p>
            </text:list-item>
            <text:list-item>
              <text:p text:style-name="P48">System usuwa wprowadzone dane i nie tworzy rekordu wylotu.</text:p>
            </text:list-item>
          </text:list>
        </text:list-item>
        <text:list-item>
          <text:p text:style-name="P48">b) Błąd walidacji danych wylotu:</text:p>
          <text:list>
            <text:list-item>
              <text:p text:style-name="P48">Kierownik wprowadza błędne dane (np. godzina z przeszłości).</text:p>
            </text:list-item>
            <text:list-item>
              <text:p text:style-name="P48">System wyświetla komunikat o błędzie i prosi o poprawę parametrów przed przejściem do przypisywania skoczków.</text:p>
            </text:list-item>
          </text:list>
        </text:list-item>
      </text:list>
      <text:p text:style-name="P24">4. Zależności czasowe:</text:p>
      <text:list xml:id="list1412347006" text:style-name="WWNum28">
        <text:list-item text:start-value="0">
          <text:p text:style-name="P49">Częstotliwość wykonania: Od 5 do 30 razy dziennie (zależnie od intensywności skoków).</text:p>
        </text:list-item>
        <text:list-item>
          <text:p text:style-name="P49">Przewidywane spiętrzenia: Poranek oraz okresy po przerwach pogodowych.</text:p>
        </text:list-item>
        <text:list-item>
          <text:p text:style-name="P49">Typowy czas realizacji: 1-2 minuty.</text:p>
        </text:list-item>
        <text:list-item>
          <text:p text:style-name="P49">Maksymalny czas realizacji: 5-10 minut.</text:p>
        </text:list-item>
      </text:list>
      <text:list xml:id="list185203773627418" text:style-name="WWNum29">
        <text:list-item>
          <text:p text:style-name="P27">Wartości uzyskiwane przez aktorów:</text:p>
        </text:list-item>
      </text:list>
      <text:list xml:id="list185202236780106" text:style-name="WWNum28">
        <text:list-item>
          <text:p text:style-name="P49">Gwarancja zarejestrowania każdego wylotu w systemie</text:p>
        </text:list-item>
        <text:list-item>
          <text:p text:style-name="P49">Możliwość łatwego sprawdzenia składu danego wylotu</text:p>
        </text:list-item>
        <text:list-item>
          <text:p text:style-name="P49">Sprawne uaktualnianie listy planowanych lotów</text:p>
        </text:list-item>
      </text:list>
      <text:p text:style-name="P57"/>
      <text:p text:style-name="P58">wykonał: Hubert Milewski</text:p>
      <text:p text:style-name="P58"/>
      <text:p text:style-name="P59"/>
      <text:p text:style-name="P70">3) GEAR CHECK (KONTROLA SPADOCHRONU)</text:p>
      <text:p text:style-name="P70">1. Uczestniczący aktorzy:</text:p>
      <text:list xml:id="list4093236917" text:style-name="WWNum30">
        <text:list-item text:start-value="0">
          <text:p text:style-name="P12"><text:span text:style-name="Domyślna_20_czcionka_20_akapitu"><text:span text:style-name="T25">Aktor główny:</text:span></text:span><text:span text:style-name="Domyślna_20_czcionka_20_akapitu"><text:span text:style-name="T27"> Kierownik skoków</text:span></text:span></text:p>
        </text:list-item>
        <text:list-item>
          <text:p text:style-name="P12"><text:span text:style-name="Domyślna_20_czcionka_20_akapitu"><text:span text:style-name="T25">Aktorzy wspierający:</text:span></text:span><text:span text:style-name="Domyślna_20_czcionka_20_akapitu"><text:span text:style-name="T27"> Skoczek, Rigger, Układacz</text:span></text:span></text:p>
        </text:list-item>
      </text:list>
      <text:p text:style-name="P70">2. Podstawowy ciąg zdarzeń:</text:p>
      <text:list xml:id="list2216273860" text:style-name="WWNum31">
        <text:list-item text:start-value="0">
          <text:p text:style-name="P76">Skoczek zgłasza się do kontroli sprzętu przed planowanym wylotem.</text:p>
        </text:list-item>
        <text:list-item>
          <text:p text:style-name="P76">Kierownik skoków inicjuje funkcję Gear Check w systemie.</text:p>
        </text:list-item>
        <text:list-item>
          <text:p text:style-name="P76">Kierownik skoków dokonuje fizycznego sprawdzenia: kompletności wyposażenia (spadochron, wysokościomierz, kask, nóż), ustawienia automatu AAD, poprawności zapięć i regulacji uprzęży oraz aktualności przeglądu.</text:p>
        </text:list-item>
        <text:list-item>
          <text:p text:style-name="P76">System rejestruje fakt wykonania kontroli w bazie danych.</text:p>
        </text:list-item>
        <text:list-item>
          <text:p text:style-name="P76">W przypadku pozytywnego wyniku weryfikacji – Gear Check zostaje zakończony sukcesem i dopuszczeniem skoczka.</text:p>
        </text:list-item>
      </text:list>
      <text:p text:style-name="P70">3. Alternatywne ciągi zdarzeń:</text:p>
      <text:p text:style-name="P71"><text:soft-page-break/>a) Wykrycie nieprawidłowości:</text:p>
      <text:list xml:id="list759304970" text:style-name="WWNum32">
        <text:list-item>
          <text:list>
            <text:list-item>
              <text:p text:style-name="P77">Kierownik wykrywa usterkę podczas kontroli.</text:p>
            </text:list-item>
            <text:list-item>
              <text:p text:style-name="P77">System uruchamia rozszerzenie przypadku „Zgłaszanie usterki spadochronu”.</text:p>
            </text:list-item>
            <text:list-item>
              <text:p text:style-name="P77">Sprzęt zostaje oznaczony jako niedopuszczony do skoku, a skoczek skierowany do Riggera lub Układacza.</text:p>
            </text:list-item>
            <text:list-item>
              <text:p text:style-name="P77">Po usunięciu usterki ponawiany jest scenariusz podstawowy.</text:p>
            </text:list-item>
          </text:list>
        </text:list-item>
      </text:list>
      <text:p text:style-name="P71">b) Brak ważnego przeglądu:</text:p>
      <text:list xml:id="list170208188985605" text:continue-numbering="true" text:style-name="WWNum32">
        <text:list-item>
          <text:list>
            <text:list-item>
              <text:p text:style-name="P77">Kierownik zauważa brak ważności przeglądu sprzętu.</text:p>
            </text:list-item>
            <text:list-item>
              <text:p text:style-name="P77">Sprzęt zostaje oznaczony jako niedopuszczony do skoku.</text:p>
            </text:list-item>
            <text:list-item>
              <text:p text:style-name="P77">Skoczek zostaje skierowany do Riggera lub Układacza.</text:p>
            </text:list-item>
            <text:list-item>
              <text:p text:style-name="P77">Po wykonaniu przeglądu ponawiany jest scenariusz podstawowy.</text:p>
            </text:list-item>
          </text:list>
        </text:list-item>
      </text:list>
      <text:p text:style-name="P71">c) Awaria systemu:</text:p>
      <text:list xml:id="list170208807695100" text:continue-numbering="true" text:style-name="WWNum32">
        <text:list-item>
          <text:list>
            <text:list-item>
              <text:p text:style-name="P77">Podczas rejestracji występuje błąd systemu.</text:p>
            </text:list-item>
            <text:list-item>
              <text:p text:style-name="P77">Kontrola zostaje przeprowadzona manualnie.</text:p>
            </text:list-item>
            <text:list-item>
              <text:p text:style-name="P77">Dane są wprowadzane do systemu po jego przywróceniu, po czym następuje powrót do scenariusza podstawowego.</text:p>
            </text:list-item>
          </text:list>
        </text:list-item>
      </text:list>
      <text:p text:style-name="P70">4. Zależności czasowe:</text:p>
      <text:list xml:id="list1968580082" text:style-name="WWNum33">
        <text:list-item text:start-value="0">
          <text:p text:style-name="P13"><text:span text:style-name="Domyślna_20_czcionka_20_akapitu"><text:span text:style-name="T25">Częstotliwość wykonania:</text:span></text:span><text:span text:style-name="Domyślna_20_czcionka_20_akapitu"><text:span text:style-name="T27"> Od 1 do 300 operacji dziennie (przed każdym skokiem każdego skoczka).</text:span></text:span></text:p>
        </text:list-item>
        <text:list-item>
          <text:p text:style-name="P13"><text:span text:style-name="Domyślna_20_czcionka_20_akapitu"><text:span text:style-name="T25">Przewidywane spiętrzenia:</text:span></text:span><text:span text:style-name="Domyślna_20_czcionka_20_akapitu"><text:span text:style-name="T27"> Przed każdym wylotem, podczas wydarzeń oraz przy działaniu więcej niż jednego samolotu.</text:span></text:span></text:p>
        </text:list-item>
        <text:list-item>
          <text:p text:style-name="P13"><text:span text:style-name="Domyślna_20_czcionka_20_akapitu"><text:span text:style-name="T25">Typowy czas realizacji:</text:span></text:span><text:span text:style-name="Domyślna_20_czcionka_20_akapitu"><text:span text:style-name="T27"> 2 minuty na osobę.</text:span></text:span></text:p>
        </text:list-item>
        <text:list-item>
          <text:p text:style-name="P13"><text:span text:style-name="Domyślna_20_czcionka_20_akapitu"><text:span text:style-name="T25">Maksymalny czas realizacji:</text:span></text:span><text:span text:style-name="Domyślna_20_czcionka_20_akapitu"><text:span text:style-name="T27"> 10 minut na osobę (w przypadku usterki czas zależny od naprawy).</text:span></text:span></text:p>
        </text:list-item>
      </text:list>
      <text:p text:style-name="P70">5. Wartości uzyskiwane przez aktorów:</text:p>
      <text:list xml:id="list580309163" text:style-name="WWNum34">
        <text:list-item text:start-value="0">
          <text:p text:style-name="P78">Pewność procedur bezpieczeństwa i minimalizacja ryzyka wypadków (Kierownik skoków).</text:p>
        </text:list-item>
        <text:list-item>
          <text:p text:style-name="P78">Udokumentowanie wykonania kontroli oraz formalne dopuszczenie do skoku (Kierownik skoków, Skoczek).</text:p>
        </text:list-item>
        <text:list-item>
          <text:p text:style-name="P78">Pewność poprawnego przygotowania sprzętu i zwiększone bezpieczeństwo (Skoczek).</text:p>
        </text:list-item>
        <text:list-item>
          <text:p text:style-name="P78">Informacja o stanie technicznym sprzętu i możliwość szybkiej reakcji na usterki (Rigger/Układacz).</text:p>
        </text:list-item>
      </text:list>
      <text:p text:style-name="P86"/>
      <text:p text:style-name="P87">wykonał: Patryk Wojtkielewicz</text:p>
      <text:p text:style-name="P88"><text:soft-page-break/></text:p>
      <text:p text:style-name="P55"><draw:connector text:anchor-type="paragraph" draw:z-index="0" draw:name="Łącznik prosty 2" draw:style-name="gr1" draw:text-style-name="P94" draw:type="line" svg:x1="-0.7311in" svg:y1="0.1654in" svg:x2="7.9642in" svg:y2="0.1654in" svg:d="M-1857 420h22086" svg:viewBox="0 0 22087 2"><text:p/></draw:connector></text:p>
      <text:p text:style-name="P55"/>
      <text:p text:style-name="P51">DIAGRAM KLAS</text:p>
      <text:p text:style-name="P51"/>
      <text:p text:style-name="P51"/>
      <text:p text:style-name="Text_20_body_20__28_user_29_"><draw:frame draw:style-name="fr2" draw:name="Image1" text:anchor-type="paragraph" svg:width="7.2681in" style:rel-width="scale" svg:height="5.7929in" style:rel-height="scale" draw:z-index="1"><draw:image xlink:href="Pictures/100000010000050B00000405AC9ACFCC5196A552.png" xlink:type="simple" xlink:show="embed" xlink:actuate="onLoad" draw:mime-type="image/png"/></draw:frame><text:span text:style-name="Domyślna_20_czcionka_20_akapitu"><text:span text:style-name="T22"/></text:span></text:p>
      <text:list xml:id="list246796514" text:style-name="L1">
        <text:list-item>
          <text:p text:style-name="P14"><text:span text:style-name="Domyślna_20_czcionka_20_akapitu"><text:span text:style-name="T25">GearCheck - </text:span></text:span><text:span text:style-name="Domyślna_20_czcionka_20_akapitu"><text:span text:style-name="T27">Reprezentuje kontrolę techniczną spadochronu.</text:span></text:span></text:p>
        </text:list-item>
      </text:list>
      <text:p text:style-name="P79">Atrybuty:</text:p>
      <text:list xml:id="list1213812085" text:style-name="L2">
        <text:list-item>
          <text:p text:style-name="P80">id: int </text:p>
        </text:list-item>
        <text:list-item>
          <text:p text:style-name="P80">data: Date </text:p>
        </text:list-item>
        <text:list-item>
          <text:p text:style-name="P80">wynik: String</text:p>
        </text:list-item>
      </text:list>
      <text:p text:style-name="P2"><text:span text:style-name="Domyślna_20_czcionka_20_akapitu"><text:span text:style-name="T27">Metody</text:span></text:span><text:span text:style-name="Domyślna_20_czcionka_20_akapitu"><text:span text:style-name="T25">:</text:span></text:span></text:p>
      <text:list xml:id="list1423479793" text:style-name="L3">
        <text:list-item>
          <text:p text:style-name="P82">wykonajCheck(): void – przeprowadza kontrolę spadochronu</text:p>
        </text:list-item>
      </text:list>
      <text:p text:style-name="P84"/>
      <text:list xml:id="list185202285427806" text:style-name="L1">
        <text:list-header>
          <text:p text:style-name="P15"><text:soft-page-break/><text:span text:style-name="Domyślna_20_czcionka_20_akapitu"><text:span text:style-name="T26">2. </text:span></text:span><text:span text:style-name="Domyślna_20_czcionka_20_akapitu"><text:span text:style-name="T25">Grafik - </text:span></text:span><text:span text:style-name="Domyślna_20_czcionka_20_akapitu"><text:span text:style-name="T27">Reprezentuje harmonogram przypisań użytkowników.</text:span></text:span></text:p>
        </text:list-header>
      </text:list>
      <text:p text:style-name="P79">Atrybuty:</text:p>
      <text:list xml:id="list185203841759606" text:style-name="L2">
        <text:list-item>
          <text:p text:style-name="P80">id: int </text:p>
        </text:list-item>
        <text:list-item>
          <text:p text:style-name="P81">data: Date </text:p>
        </text:list-item>
      </text:list>
      <text:p text:style-name="P2"><text:span text:style-name="Domyślna_20_czcionka_20_akapitu"><text:span text:style-name="T27">Metody</text:span></text:span><text:span text:style-name="Domyślna_20_czcionka_20_akapitu"><text:span text:style-name="T25">:</text:span></text:span></text:p>
      <text:list xml:id="list185202214292591" text:style-name="L3">
        <text:list-item>
          <text:p text:style-name="P17"><text:span text:style-name="Domyślna_20_czcionka_20_akapitu"><text:span text:style-name="T28">przypiszUżytkownika(użytkownik: Użytkownik): void</text:span></text:span></text:p>
        </text:list-item>
        <text:list-item>
          <text:p text:style-name="P17"><text:span text:style-name="Domyślna_20_czcionka_20_akapitu"><text:span text:style-name="T28">usuńUżytkownika(użytkownik: Użytkownik): void</text:span></text:span></text:p>
        </text:list-item>
      </text:list>
      <text:list xml:id="list185203656020928" text:style-name="L1">
        <text:list-item>
          <text:p text:style-name="P15"><text:span text:style-name="Domyślna_20_czcionka_20_akapitu"><text:span text:style-name="T25">KierownikSkoków - </text:span></text:span><text:span text:style-name="Domyślna_20_czcionka_20_akapitu"><text:span text:style-name="T27">Odpowiada za zarządzanie operacjami skoków.</text:span></text:span></text:p>
        </text:list-item>
      </text:list>
      <text:p text:style-name="P3"><text:span text:style-name="Domyślna_20_czcionka_20_akapitu"><text:span text:style-name="T27">Metody</text:span></text:span><text:span text:style-name="Domyślna_20_czcionka_20_akapitu"><text:span text:style-name="T25">:</text:span></text:span></text:p>
      <text:list xml:id="list185202131768687" text:style-name="L3">
        <text:list-item>
          <text:p text:style-name="P82">zarządzajGrafikiem(): void</text:p>
        </text:list-item>
        <text:list-item>
          <text:p text:style-name="P82">planujWylot(data: Date): Wylot</text:p>
        </text:list-item>
        <text:list-item>
          <text:p text:style-name="P82">przypiszSkoczka(wylot: Wylot, skoczek: Skoczek): void</text:p>
        </text:list-item>
        <text:list-item>
          <text:p text:style-name="P82">monitorujWylot(wylot: Wylot): void</text:p>
        </text:list-item>
      </text:list>
      <text:list xml:id="list185203172094393" text:style-name="L1">
        <text:list-item>
          <text:p text:style-name="P19"><text:span text:style-name="Domyślna_20_czcionka_20_akapitu"><text:span text:style-name="T25">Pilot - </text:span></text:span><text:span text:style-name="Domyślna_20_czcionka_20_akapitu"><text:span text:style-name="T27">Użytkownik odpowiedzialny za wykonanie lotu</text:span></text:span></text:p>
        </text:list-item>
      </text:list>
      <text:p text:style-name="P79">Atrybuty:</text:p>
      <text:list xml:id="list185203312387612" text:style-name="L2">
        <text:list-item>
          <text:p text:style-name="P18"><text:span text:style-name="Domyślna_20_czcionka_20_akapitu"><text:span text:style-name="T28">licencja: String – numer licencji pilota</text:span></text:span></text:p>
        </text:list-item>
      </text:list>
      <text:p text:style-name="P2"><text:span text:style-name="Domyślna_20_czcionka_20_akapitu"><text:span text:style-name="T27">Metody</text:span></text:span><text:span text:style-name="Domyślna_20_czcionka_20_akapitu"><text:span text:style-name="T25">:</text:span></text:span></text:p>
      <text:list xml:id="list185203148043388" text:style-name="L3">
        <text:list-item>
          <text:p text:style-name="P83">wykonajWylot(wylot: Wylot):</text:p>
        </text:list-item>
      </text:list>
      <text:list xml:id="list185202064596219" text:style-name="L1">
        <text:list-item>
          <text:p text:style-name="P15"><text:span text:style-name="Domyślna_20_czcionka_20_akapitu"><text:span text:style-name="T25">PlanWylotu - </text:span></text:span><text:span text:style-name="Domyślna_20_czcionka_20_akapitu"><text:span text:style-name="T27">Zarządza planowaniem wylotów</text:span></text:span></text:p>
        </text:list-item>
      </text:list>
      <text:p text:style-name="P79">Atrybuty:</text:p>
      <text:list xml:id="list185202863726221" text:style-name="L2">
        <text:list-item>
          <text:p text:style-name="P80">id: int </text:p>
        </text:list-item>
        <text:list-item>
          <text:p text:style-name="P80">dataUtworzenia: Date </text:p>
        </text:list-item>
        <text:list-item>
          <text:p text:style-name="P80">wynik: String</text:p>
        </text:list-item>
      </text:list>
      <text:p text:style-name="P2"><text:span text:style-name="Domyślna_20_czcionka_20_akapitu"><text:span text:style-name="T27">Metody</text:span></text:span><text:span text:style-name="Domyślna_20_czcionka_20_akapitu"><text:span text:style-name="T25">:</text:span></text:span></text:p>
      <text:list xml:id="list185202070464222" text:style-name="L3">
        <text:list-item>
          <text:p text:style-name="P82">utwórzWylot(data: Date): Wylot</text:p>
        </text:list-item>
        <text:list-item>
          <text:p text:style-name="P82">usuńWylot</text:p>
        </text:list-item>
      </text:list>
      <text:list xml:id="list185203318486997" text:style-name="L1">
        <text:list-item>
          <text:p text:style-name="P15"><text:span text:style-name="Domyślna_20_czcionka_20_akapitu"><text:span text:style-name="T25">Rejestracja - </text:span></text:span><text:span text:style-name="Domyślna_20_czcionka_20_akapitu"><text:span text:style-name="T27">Reprezentuje zapis skoczka na szkolenie</text:span></text:span></text:p>
        </text:list-item>
      </text:list>
      <text:p text:style-name="P79">Atrybuty:</text:p>
      <text:list xml:id="list185201921728560" text:style-name="L2">
        <text:list-item>
          <text:p text:style-name="P80">id: int </text:p>
        </text:list-item>
        <text:list-item>
          <text:p text:style-name="P80">dataRejestracji: Date</text:p>
        </text:list-item>
      </text:list>
      <text:p text:style-name="P2"><text:span text:style-name="Domyślna_20_czcionka_20_akapitu"><text:span text:style-name="T27">Metody</text:span></text:span><text:span text:style-name="Domyślna_20_czcionka_20_akapitu"><text:span text:style-name="T25">:</text:span></text:span></text:p>
      <text:list xml:id="list185203449195630" text:style-name="L3">
        <text:list-item>
          <text:p text:style-name="P82">anuluj(): void</text:p>
        </text:list-item>
      </text:list>
      <text:list xml:id="list185202596572998" text:style-name="L1">
        <text:list-item>
          <text:p text:style-name="P15"><text:span text:style-name="Domyślna_20_czcionka_20_akapitu"><text:span text:style-name="T25">Rigger - </text:span></text:span><text:span text:style-name="Domyślna_20_czcionka_20_akapitu"><text:span text:style-name="T27">Odpowiada za kontrolę i przygotowanie spadochronów</text:span></text:span></text:p>
        </text:list-item>
      </text:list>
      <text:p text:style-name="P2"><text:span text:style-name="Domyślna_20_czcionka_20_akapitu"><text:span text:style-name="T27">Metody</text:span></text:span><text:span text:style-name="Domyślna_20_czcionka_20_akapitu"><text:span text:style-name="T25">:</text:span></text:span></text:p>
      <text:list xml:id="list185202974517806" text:style-name="L3">
        <text:list-item>
          <text:p text:style-name="P82">sprawdźSpadochron(spadochron: Spadochron): GearCheck</text:p>
        </text:list-item>
        <text:list-item>
          <text:p text:style-name="P82">potwierdźZłożenie(spadochron: Spadochron): void</text:p>
        </text:list-item>
      </text:list>
      <text:p text:style-name="P85"/>
      <text:p text:style-name="P85"/>
      <text:p text:style-name="P85"/>
      <text:list xml:id="list185203217052466" text:style-name="L1">
        <text:list-item>
          <text:p text:style-name="P15"><text:span text:style-name="Domyślna_20_czcionka_20_akapitu"><text:span text:style-name="T29">Skoczek - </text:span></text:span><text:span text:style-name="Domyślna_20_czcionka_20_akapitu"><text:span text:style-name="T28">Użytkownik wykonujący skok</text:span></text:span></text:p>
        </text:list-item>
      </text:list>
      <text:p text:style-name="P79"><text:soft-page-break/>Atrybuty:</text:p>
      <text:list xml:id="list185203893937402" text:style-name="L2">
        <text:list-item>
          <text:p text:style-name="P80">licencja: String</text:p>
        </text:list-item>
        <text:list-item>
          <text:p text:style-name="P80">statusUprawnień: String – określa czy skoczek może wykonywać skoki</text:p>
        </text:list-item>
      </text:list>
      <text:p text:style-name="P2"><text:span text:style-name="Domyślna_20_czcionka_20_akapitu"><text:span text:style-name="T27">Metody</text:span></text:span><text:span text:style-name="Domyślna_20_czcionka_20_akapitu"><text:span text:style-name="T25">:</text:span></text:span></text:p>
      <text:list xml:id="list185202021440111" text:style-name="L3">
        <text:list-item>
          <text:p text:style-name="P82">zapiszNaSzkolenie(szkolenie: Szkolenie): void</text:p>
        </text:list-item>
        <text:list-item>
          <text:p text:style-name="P82">sprawdźUprawnienia(): boolean</text:p>
        </text:list-item>
      </text:list>
      <text:list xml:id="list185203104151416" text:style-name="L1">
        <text:list-item>
          <text:p text:style-name="P16"><text:span text:style-name="Domyślna_20_czcionka_20_akapitu"><text:span text:style-name="T25">Spadochron - </text:span></text:span><text:span text:style-name="Domyślna_20_czcionka_20_akapitu"><text:span text:style-name="T27">Reprezentuje sprzęt do skoków</text:span></text:span></text:p>
        </text:list-item>
      </text:list>
      <text:p text:style-name="P79">Atrybuty:</text:p>
      <text:list xml:id="list185203130173517" text:style-name="L2">
        <text:list-item>
          <text:p text:style-name="P80">id: int </text:p>
        </text:list-item>
        <text:list-item>
          <text:p text:style-name="P80">typ: String</text:p>
        </text:list-item>
        <text:list-item>
          <text:p text:style-name="P80">stan: StatusSpadochronu</text:p>
        </text:list-item>
        <text:list-item>
          <text:p text:style-name="P80">dataOstatniejKontroli: Date</text:p>
        </text:list-item>
      </text:list>
      <text:p text:style-name="P2"><text:span text:style-name="Domyślna_20_czcionka_20_akapitu"><text:span text:style-name="T27">Metody</text:span></text:span><text:span text:style-name="Domyślna_20_czcionka_20_akapitu"><text:span text:style-name="T25">:</text:span></text:span></text:p>
      <text:list xml:id="list185203303352810" text:style-name="L3">
        <text:list-item>
          <text:p text:style-name="P82">sprawdźStan(): StatusSpadochronu</text:p>
        </text:list-item>
        <text:list-item>
          <text:p text:style-name="P82">oznaczJakoUszkodzony(): void</text:p>
        </text:list-item>
      </text:list>
      <text:list xml:id="list185202250886892" text:style-name="L1">
        <text:list-item>
          <text:p text:style-name="P16"><text:span text:style-name="Domyślna_20_czcionka_20_akapitu"><text:span text:style-name="T25">SystemWyświetlania - </text:span></text:span><text:span text:style-name="Domyślna_20_czcionka_20_akapitu"><text:span text:style-name="T27">Odpowiada za wyświetlanie danych o wylotach</text:span></text:span></text:p>
        </text:list-item>
      </text:list>
      <text:p text:style-name="P2"><text:span text:style-name="Domyślna_20_czcionka_20_akapitu"><text:span text:style-name="T27">Metody</text:span></text:span><text:span text:style-name="Domyślna_20_czcionka_20_akapitu"><text:span text:style-name="T25">:</text:span></text:span></text:p>
      <text:list xml:id="list185203241632641" text:style-name="L3">
        <text:list-item>
          <text:p text:style-name="P82">wyświetlWyloty(wyloty: List&lt;Wylot&gt;): void</text:p>
        </text:list-item>
      </text:list>
      <text:list xml:id="list185203942233127" text:style-name="L1">
        <text:list-item>
          <text:p text:style-name="P16"><text:span text:style-name="Domyślna_20_czcionka_20_akapitu"><text:span text:style-name="T25">Szkolenie - </text:span></text:span><text:span text:style-name="Domyślna_20_czcionka_20_akapitu"><text:span text:style-name="T27">Reprezentuje szkolenie dla skoczków</text:span></text:span></text:p>
        </text:list-item>
      </text:list>
      <text:p text:style-name="P79">Atrybuty:</text:p>
      <text:list xml:id="list185202006201229" text:style-name="L2">
        <text:list-item>
          <text:p text:style-name="P80">id: int </text:p>
        </text:list-item>
        <text:list-item>
          <text:p text:style-name="P80">nazwa: string</text:p>
        </text:list-item>
        <text:list-item>
          <text:p text:style-name="P80">data: Date </text:p>
        </text:list-item>
        <text:list-item>
          <text:p text:style-name="P80">opis: String</text:p>
        </text:list-item>
      </text:list>
      <text:p text:style-name="P2"><text:span text:style-name="Domyślna_20_czcionka_20_akapitu"><text:span text:style-name="T27">Metody</text:span></text:span><text:span text:style-name="Domyślna_20_czcionka_20_akapitu"><text:span text:style-name="T25">:</text:span></text:span></text:p>
      <text:list xml:id="list185202209370961" text:style-name="L3">
        <text:list-item>
          <text:p text:style-name="P82">dodajUczestnika(skoczek: Skoczek): void</text:p>
        </text:list-item>
        <text:list-item>
          <text:p text:style-name="P82">usuńUczestnika(skoczek: Skoczek): void</text:p>
        </text:list-item>
      </text:list>
      <text:list xml:id="list185203873832307" text:style-name="L1">
        <text:list-item>
          <text:p text:style-name="P16"><text:span text:style-name="Domyślna_20_czcionka_20_akapitu"><text:span text:style-name="T25">Układacz - </text:span></text:span><text:span text:style-name="Domyślna_20_czcionka_20_akapitu"><text:span text:style-name="T27">Odpowiada za składanie spadochronów</text:span></text:span></text:p>
        </text:list-item>
      </text:list>
      <text:p text:style-name="P2"><text:span text:style-name="Domyślna_20_czcionka_20_akapitu"><text:span text:style-name="T27">Metody</text:span></text:span><text:span text:style-name="Domyślna_20_czcionka_20_akapitu"><text:span text:style-name="T25">:</text:span></text:span></text:p>
      <text:list xml:id="list185203230743263" text:style-name="L3">
        <text:list-item>
          <text:p text:style-name="P82">ułóżSpadochron(spadochron: Spadochron): void</text:p>
        </text:list-item>
      </text:list>
      <text:p text:style-name="P85"/>
      <text:list xml:id="list185202790826055" text:style-name="L1">
        <text:list-item>
          <text:p text:style-name="P15"><text:span text:style-name="Domyślna_20_czcionka_20_akapitu"><text:span text:style-name="T29">Usterka - </text:span></text:span><text:span text:style-name="Domyślna_20_czcionka_20_akapitu"><text:span text:style-name="T28">Reprezentuje problem techniczny sprzętu</text:span></text:span></text:p>
        </text:list-item>
      </text:list>
      <text:p text:style-name="P79">Atrybuty:</text:p>
      <text:list xml:id="list185202423760048" text:style-name="L2">
        <text:list-item>
          <text:p text:style-name="P80">id: int </text:p>
        </text:list-item>
        <text:list-item>
          <text:p text:style-name="P80">opis: String</text:p>
        </text:list-item>
        <text:list-item>
          <text:p text:style-name="P80">status: StatusUsterki</text:p>
        </text:list-item>
      </text:list>
      <text:p text:style-name="P2"><text:span text:style-name="Domyślna_20_czcionka_20_akapitu"><text:span text:style-name="T27">Metody</text:span></text:span><text:span text:style-name="Domyślna_20_czcionka_20_akapitu"><text:span text:style-name="T25">:</text:span></text:span></text:p>
      <text:list xml:id="list185203106711566" text:style-name="L3">
        <text:list-item>
          <text:p text:style-name="P82">zgłoś(): void</text:p>
        </text:list-item>
        <text:list-item>
          <text:p text:style-name="P82">oznaczJakoNaprawiona(): void</text:p>
        </text:list-item>
      </text:list>
      <text:list xml:id="list185202409375306" text:style-name="L1">
        <text:list-item>
          <text:p text:style-name="P15"><text:soft-page-break/><text:span text:style-name="Domyślna_20_czcionka_20_akapitu"><text:span text:style-name="T25">Użytkownik - </text:span></text:span><text:span text:style-name="Domyślna_20_czcionka_20_akapitu"><text:span text:style-name="T27">Klasa bazowa dla wszystkich użytkowników systemu</text:span></text:span></text:p>
        </text:list-item>
      </text:list>
      <text:p text:style-name="P79">Atrybuty:</text:p>
      <text:list xml:id="list185202089139138" text:style-name="L2">
        <text:list-item>
          <text:p text:style-name="P80">id: int </text:p>
        </text:list-item>
        <text:list-item>
          <text:p text:style-name="P80">imię: String</text:p>
        </text:list-item>
        <text:list-item>
          <text:p text:style-name="P80">nazwisko: String</text:p>
        </text:list-item>
        <text:list-item>
          <text:p text:style-name="P80">login: String</text:p>
        </text:list-item>
        <text:list-item>
          <text:p text:style-name="P80">hashHasła: String – przechowuje zaszyfrowane hasło</text:p>
        </text:list-item>
      </text:list>
      <text:p text:style-name="P2"><text:span text:style-name="Domyślna_20_czcionka_20_akapitu"><text:span text:style-name="T27">Metody</text:span></text:span><text:span text:style-name="Domyślna_20_czcionka_20_akapitu"><text:span text:style-name="T25">:</text:span></text:span></text:p>
      <text:list xml:id="list185202428526646" text:style-name="L3">
        <text:list-item>
          <text:p text:style-name="P89">zaloguj(login: String, hashHasła: String): boolean</text:p>
        </text:list-item>
        <text:list-item>
          <text:p text:style-name="P82">wyloguj(): void</text:p>
        </text:list-item>
      </text:list>
      <text:list xml:id="list185202000800398" text:style-name="L1">
        <text:list-item>
          <text:p text:style-name="P15"><text:span text:style-name="Domyślna_20_czcionka_20_akapitu"><text:span text:style-name="T25">Wylot - </text:span></text:span><text:span text:style-name="Domyślna_20_czcionka_20_akapitu"><text:span text:style-name="T28">Reprezentuje pojedynczy lot/skok</text:span></text:span></text:p>
        </text:list-item>
      </text:list>
      <text:p text:style-name="P79">Atrybuty:</text:p>
      <text:list xml:id="list185203564954102" text:style-name="L2">
        <text:list-item>
          <text:p text:style-name="P80">id: int </text:p>
        </text:list-item>
        <text:list-item>
          <text:p text:style-name="P80">data: Date </text:p>
        </text:list-item>
        <text:list-item>
          <text:p text:style-name="P80">status: StatusWylotu</text:p>
        </text:list-item>
      </text:list>
      <text:p text:style-name="P2"><text:span text:style-name="Domyślna_20_czcionka_20_akapitu"><text:span text:style-name="T27">Metody</text:span></text:span><text:span text:style-name="Domyślna_20_czcionka_20_akapitu"><text:span text:style-name="T25">:</text:span></text:span></text:p>
      <text:list xml:id="list185203760416270" text:style-name="L3">
        <text:list-item>
          <text:p text:style-name="P82">dodajSkoczka(skoczek: Skoczek): void</text:p>
        </text:list-item>
        <text:list-item>
          <text:p text:style-name="P82">usuńSkoczka(skoczek: Skoczek): void</text:p>
        </text:list-item>
        <text:list-item>
          <text:p text:style-name="P17"><text:span text:style-name="Domyślna_20_czcionka_20_akapitu"><text:span text:style-name="T27">zmieńStatus(status: StatusWylotu): void</text:span></text:span></text:p>
        </text:list-item>
      </text:list>
      <text:p text:style-name="P4"><text:span text:style-name="Domyślna_20_czcionka_20_akapitu"><text:span text:style-name="T27"/></text:span></text:p>
      <text:p text:style-name="P90"/>
      <text:p text:style-name="P90"/>
      <text:p text:style-name="P72">Diagram czynności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><text:soft-page-break/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5"><text:span text:style-name="T33">wykonał: Patryk Wojtkielewicz</text:span></text:p>
      <text:p text:style-name="P68"/>
      <text:p text:style-name="P68"/>
      <text:p text:style-name="P72">Diagram interakcji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text:soft-page-break/></text:p>
      <text:p text:style-name="P52"/>
      <text:p text:style-name="P52"/>
      <text:p text:style-name="P52"/>
      <text:p text:style-name="P1"><text:span text:style-name="Domyślna_20_czcionka_20_akapitu"><text:span text:style-name="T2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/>
    <style:font-face style:name="Aptos1" svg:font-family="Aptos" style:font-family-generic="swiss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Nagłówek_20_1" style:display-name="Nagłówek 1" style:family="paragraph" style:parent-style-name="Heading" style:next-style-name="Text_20_body_20__28_user_29_" style:default-outline-level="1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Nagłówek_20_2" style:display-name="Nagłówek 2" style:family="paragraph" style:parent-style-name="Heading" style:next-style-name="Text_20_body_20__28_user_29_" style:default-outline-level="2">
      <style:paragraph-properties fo:margin-top="0.139in" fo:margin-bottom="0in" style:contextual-spacing="false"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Nagłówek_20_3" style:display-name="Nagłówek 3" style:family="paragraph" style:parent-style-name="Heading" style:next-style-name="Text_20_body_20__28_user_29_" style:default-outline-level="3">
      <style:paragraph-properties fo:margin-top="0.0972in" fo:margin-bottom="0in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Normalny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" style:font-family-complex="'Liberation Sans'" style:font-family-generic-complex="roman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a" style:family="paragraph" style:parent-style-name="Text_20_body_20__28_user_29_">
      <style:paragraph-properties fo:hyphenation-ladder-count="no-limit"/>
      <style:text-properties fo:hyphenate="false" loext:hyphenation-no-caps="false"/>
    </style:style>
    <style:style style:name="Legenda" style:family="paragraph" style:parent-style-name="Standard_20__28_user_29_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_20__28_user_29_" style:class="index">
      <style:paragraph-properties fo:hyphenation-ladder-count="no-limit" text:number-lines="false" text:line-number="0"/>
      <style:text-properties fo:hyphenate="false" loext:hyphenation-no-caps="false"/>
    </style:style>
    <style:style style:name="Standard_20__28_user_29_" style:display-name="Standard (user)" style:family="paragraph">
      <style:paragraph-properties fo:orphans="2" fo:widows="2" fo:hyphenation-ladder-count="no-limit"/>
      <style:text-properties fo:hyphenate="false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Akapit_20_z_20_listą" style:display-name="Akapit z listą" style:family="paragraph" style:parent-style-name="Standard">
      <style:paragraph-properties fo:margin-left="0.5in" fo:margin-right="0in" fo:margin-top="0in" fo:margin-bottom="0.111in" style:contextual-spacing="true" fo:line-height="115%" fo:hyphenation-ladder-count="no-limit" fo:text-indent="0in" style:auto-text-indent="false" style:vertical-align="auto">
        <style:tab-stops/>
      </style:paragraph-properties>
      <style:text-properties style:font-name="Aptos1" fo:font-family="Aptos" style:font-family-generic="swiss" style:font-pitch="variable" fo:language="pl" fo:country="PL" style:font-name-asian="Aptos1" style:font-family-asian="Aptos" style:font-family-generic-asian="swiss" style:font-pitch-asian="variable" style:language-asian="en" style:country-asian="US" style:language-complex="ar" style:country-complex="SA" fo:hyphenate="true" loext:hyphenation-no-caps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omyślna_20_czcionka_20_akapitu" style:display-name="Domyślna czcionka akapitu" style:family="text"/>
    <style:style style:name="Bullet_20_Symbols" style:display-name="Bullet Symbols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10" style:display-name="ListLabel 10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11" style:display-name="ListLabel 11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12" style:display-name="ListLabel 12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13" style:display-name="ListLabel 13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14" style:display-name="ListLabel 14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15" style:display-name="ListLabel 15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16" style:display-name="ListLabel 16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17" style:display-name="ListLabel 17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18" style:display-name="ListLabel 18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19" style:display-name="ListLabel 19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20" style:display-name="ListLabel 20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21" style:display-name="ListLabel 21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22" style:display-name="ListLabel 22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23" style:display-name="ListLabel 23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24" style:display-name="ListLabel 24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25" style:display-name="ListLabel 25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26" style:display-name="ListLabel 26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27" style:display-name="ListLabel 27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28" style:display-name="ListLabel 28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29" style:display-name="ListLabel 29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30" style:display-name="ListLabel 30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31" style:display-name="ListLabel 31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32" style:display-name="ListLabel 32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33" style:display-name="ListLabel 33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34" style:display-name="ListLabel 34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35" style:display-name="ListLabel 35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36" style:display-name="ListLabel 36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37" style:display-name="ListLabel 37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38" style:display-name="ListLabel 38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39" style:display-name="ListLabel 39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40" style:display-name="ListLabel 40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41" style:display-name="ListLabel 41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42" style:display-name="ListLabel 42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43" style:display-name="ListLabel 43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44" style:display-name="ListLabel 44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45" style:display-name="ListLabel 45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46" style:display-name="ListLabel 46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47" style:display-name="ListLabel 47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48" style:display-name="ListLabel 48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49" style:display-name="ListLabel 49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50" style:display-name="ListLabel 50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51" style:display-name="ListLabel 51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52" style:display-name="ListLabel 52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53" style:display-name="ListLabel 53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54" style:display-name="ListLabel 54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55" style:display-name="ListLabel 55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56" style:display-name="ListLabel 56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57" style:display-name="ListLabel 57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58" style:display-name="ListLabel 58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59" style:display-name="ListLabel 59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60" style:display-name="ListLabel 60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61" style:display-name="ListLabel 61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62" style:display-name="ListLabel 62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63" style:display-name="ListLabel 63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64" style:display-name="ListLabel 64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65" style:display-name="ListLabel 65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66" style:display-name="ListLabel 66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67" style:display-name="ListLabel 67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68" style:display-name="ListLabel 68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69" style:display-name="ListLabel 69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70" style:display-name="ListLabel 70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71" style:display-name="ListLabel 71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72" style:display-name="ListLabel 72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73" style:display-name="ListLabel 73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74" style:display-name="ListLabel 74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75" style:display-name="ListLabel 75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76" style:display-name="ListLabel 76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77" style:display-name="ListLabel 77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78" style:display-name="ListLabel 78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79" style:display-name="ListLabel 79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80" style:display-name="ListLabel 80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81" style:display-name="ListLabel 81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82" style:display-name="ListLabel 82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83" style:display-name="ListLabel 83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84" style:display-name="ListLabel 84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85" style:display-name="ListLabel 85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86" style:display-name="ListLabel 86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87" style:display-name="ListLabel 87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88" style:display-name="ListLabel 88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89" style:display-name="ListLabel 89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90" style:display-name="ListLabel 90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91" style:display-name="ListLabel 91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92" style:display-name="ListLabel 92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93" style:display-name="ListLabel 93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94" style:display-name="ListLabel 94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95" style:display-name="ListLabel 95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96" style:display-name="ListLabel 96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97" style:display-name="ListLabel 97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98" style:display-name="ListLabel 98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99" style:display-name="ListLabel 99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100" style:display-name="ListLabel 100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101" style:display-name="ListLabel 101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102" style:display-name="ListLabel 102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103" style:display-name="ListLabel 103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104" style:display-name="ListLabel 104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105" style:display-name="ListLabel 105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106" style:display-name="ListLabel 106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107" style:display-name="ListLabel 107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108" style:display-name="ListLabel 108" style:family="text">
      <style:text-properties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99" style:display-name="ListLabel 199" style:family="text">
      <style:text-properties fo:font-size="10pt" style:font-size-asian="10pt"/>
    </style:style>
    <style:style style:name="ListLabel_20_200" style:display-name="ListLabel 200" style:family="text">
      <style:text-properties fo:font-size="10pt" style:font-size-asian="10pt"/>
    </style:style>
    <style:style style:name="ListLabel_20_201" style:display-name="ListLabel 201" style:family="text">
      <style:text-properties fo:font-size="10pt" style:font-size-asian="10pt"/>
    </style:style>
    <style:style style:name="ListLabel_20_202" style:display-name="ListLabel 202" style:family="text">
      <style:text-properties fo:font-size="10pt" style:font-size-asian="10pt"/>
    </style:style>
    <style:style style:name="ListLabel_20_203" style:display-name="ListLabel 203" style:family="text">
      <style:text-properties fo:font-size="10pt" style:font-size-asian="10pt"/>
    </style:style>
    <style:style style:name="ListLabel_20_204" style:display-name="ListLabel 204" style:family="text">
      <style:text-properties fo:font-size="10pt" style:font-size-asian="10pt"/>
    </style:style>
    <style:style style:name="ListLabel_20_205" style:display-name="ListLabel 205" style:family="text">
      <style:text-properties fo:font-size="10pt" style:font-size-asian="10pt"/>
    </style:style>
    <style:style style:name="ListLabel_20_206" style:display-name="ListLabel 206" style:family="text">
      <style:text-properties fo:font-size="10pt" style:font-size-asian="10pt"/>
    </style:style>
    <style:style style:name="ListLabel_20_207" style:display-name="ListLabel 207" style:family="text">
      <style:text-properties fo:font-size="10pt" style:font-size-asian="10pt"/>
    </style:style>
    <style:style style:name="ListLabel_20_208" style:display-name="ListLabel 208" style:family="text">
      <style:text-properties fo:font-size="10pt" style:font-size-asian="10pt"/>
    </style:style>
    <style:style style:name="ListLabel_20_209" style:display-name="ListLabel 209" style:family="text"/>
    <style:style style:name="ListLabel_20_210" style:display-name="ListLabel 210" style:family="text">
      <style:text-properties fo:font-size="10pt" style:font-size-asian="10pt"/>
    </style:style>
    <style:style style:name="ListLabel_20_211" style:display-name="ListLabel 211" style:family="text">
      <style:text-properties fo:font-size="10pt" style:font-size-asian="10pt"/>
    </style:style>
    <style:style style:name="ListLabel_20_212" style:display-name="ListLabel 212" style:family="text">
      <style:text-properties fo:font-size="10pt" style:font-size-asian="10pt"/>
    </style:style>
    <style:style style:name="ListLabel_20_213" style:display-name="ListLabel 213" style:family="text">
      <style:text-properties fo:font-size="10pt" style:font-size-asian="10pt"/>
    </style:style>
    <style:style style:name="ListLabel_20_214" style:display-name="ListLabel 214" style:family="text">
      <style:text-properties fo:font-size="10pt" style:font-size-asian="10pt"/>
    </style:style>
    <style:style style:name="ListLabel_20_215" style:display-name="ListLabel 215" style:family="text">
      <style:text-properties fo:font-size="10pt" style:font-size-asian="10pt"/>
    </style:style>
    <style:style style:name="ListLabel_20_216" style:display-name="ListLabel 216" style:family="text">
      <style:text-properties fo:font-size="10pt" style:font-size-asian="10pt"/>
    </style:style>
    <style:style style:name="ListLabel_20_217" style:display-name="ListLabel 217" style:family="text">
      <style:text-properties fo:font-size="10pt" style:font-size-asian="10pt"/>
    </style:style>
    <style:style style:name="ListLabel_20_218" style:display-name="ListLabel 218" style:family="text">
      <style:text-properties fo:font-size="10pt" style:font-size-asian="10pt" style:font-name-complex="Times New Roman" style:font-family-complex="'Times New Roman'" style:font-family-generic-complex="roman" style:font-pitch-complex="variable"/>
    </style:style>
    <style:style style:name="ListLabel_20_219" style:display-name="ListLabel 219" style:family="text">
      <style:text-properties fo:font-size="10pt" style:font-size-asian="10pt"/>
    </style:style>
    <style:style style:name="ListLabel_20_220" style:display-name="ListLabel 220" style:family="text">
      <style:text-properties fo:font-size="10pt" style:font-size-asian="10pt"/>
    </style:style>
    <style:style style:name="ListLabel_20_221" style:display-name="ListLabel 221" style:family="text">
      <style:text-properties fo:font-size="10pt" style:font-size-asian="10pt"/>
    </style:style>
    <style:style style:name="ListLabel_20_222" style:display-name="ListLabel 222" style:family="text">
      <style:text-properties fo:font-size="10pt" style:font-size-asian="10pt"/>
    </style:style>
    <style:style style:name="ListLabel_20_223" style:display-name="ListLabel 223" style:family="text">
      <style:text-properties fo:font-size="10pt" style:font-size-asian="10pt"/>
    </style:style>
    <style:style style:name="ListLabel_20_224" style:display-name="ListLabel 224" style:family="text">
      <style:text-properties fo:font-size="10pt" style:font-size-asian="10pt"/>
    </style:style>
    <style:style style:name="ListLabel_20_225" style:display-name="ListLabel 225" style:family="text">
      <style:text-properties fo:font-size="10pt" style:font-size-asian="10pt"/>
    </style:style>
    <style:style style:name="ListLabel_20_226" style:display-name="ListLabel 226" style:family="text">
      <style:text-properties fo:font-size="10pt" style:font-size-asian="10pt"/>
    </style:style>
    <style:style style:name="ListLabel_20_227" style:display-name="ListLabel 227" style:family="text">
      <style:text-properties fo:font-size="10pt" style:font-size-asian="10pt" style:font-name-complex="Times New Roman" style:font-family-complex="'Times New Roman'" style:font-family-generic-complex="roman" style:font-pitch-complex="variable"/>
    </style:style>
    <style:style style:name="ListLabel_20_228" style:display-name="ListLabel 228" style:family="text">
      <style:text-properties fo:font-size="10pt" style:font-size-asian="10pt"/>
    </style:style>
    <style:style style:name="ListLabel_20_229" style:display-name="ListLabel 229" style:family="text">
      <style:text-properties fo:font-size="10pt" style:font-size-asian="10pt"/>
    </style:style>
    <style:style style:name="ListLabel_20_230" style:display-name="ListLabel 230" style:family="text">
      <style:text-properties fo:font-size="10pt" style:font-size-asian="10pt"/>
    </style:style>
    <style:style style:name="ListLabel_20_231" style:display-name="ListLabel 231" style:family="text">
      <style:text-properties fo:font-size="10pt" style:font-size-asian="10pt"/>
    </style:style>
    <style:style style:name="ListLabel_20_232" style:display-name="ListLabel 232" style:family="text">
      <style:text-properties fo:font-size="10pt" style:font-size-asian="10pt"/>
    </style:style>
    <style:style style:name="ListLabel_20_233" style:display-name="ListLabel 233" style:family="text">
      <style:text-properties fo:font-size="10pt" style:font-size-asian="10pt"/>
    </style:style>
    <style:style style:name="ListLabel_20_234" style:display-name="ListLabel 234" style:family="text">
      <style:text-properties fo:font-size="10pt" style:font-size-asian="10pt"/>
    </style:style>
    <style:style style:name="ListLabel_20_235" style:display-name="ListLabel 235" style:family="text">
      <style:text-properties fo:font-size="10pt" style:font-size-asian="10pt"/>
    </style:style>
    <style:style style:name="ListLabel_20_236" style:display-name="ListLabel 236" style:family="text">
      <style:text-properties fo:font-size="10pt" style:font-size-asian="10pt" style:font-name-complex="Times New Roman" style:font-family-complex="'Times New Roman'" style:font-family-generic-complex="roman" style:font-pitch-complex="variable"/>
    </style:style>
    <style:style style:name="ListLabel_20_237" style:display-name="ListLabel 237" style:family="text">
      <style:text-properties fo:font-size="10pt" style:font-size-asian="10pt"/>
    </style:style>
    <style:style style:name="ListLabel_20_238" style:display-name="ListLabel 238" style:family="text">
      <style:text-properties fo:font-size="10pt" style:font-size-asian="10pt"/>
    </style:style>
    <style:style style:name="ListLabel_20_239" style:display-name="ListLabel 239" style:family="text">
      <style:text-properties fo:font-size="10pt" style:font-size-asian="10pt"/>
    </style:style>
    <style:style style:name="ListLabel_20_240" style:display-name="ListLabel 240" style:family="text">
      <style:text-properties fo:font-size="10pt" style:font-size-asian="10pt"/>
    </style:style>
    <style:style style:name="ListLabel_20_241" style:display-name="ListLabel 241" style:family="text">
      <style:text-properties fo:font-size="10pt" style:font-size-asian="10pt"/>
    </style:style>
    <style:style style:name="ListLabel_20_242" style:display-name="ListLabel 242" style:family="text">
      <style:text-properties fo:font-size="10pt" style:font-size-asian="10pt"/>
    </style:style>
    <style:style style:name="ListLabel_20_243" style:display-name="ListLabel 243" style:family="text">
      <style:text-properties fo:font-size="10pt" style:font-size-asian="10pt"/>
    </style:style>
    <style:style style:name="ListLabel_20_244" style:display-name="ListLabel 244" style:family="text">
      <style:text-properties fo:font-size="10pt" style:font-size-asian="10pt"/>
    </style:style>
    <style:style style:name="ListLabel_20_245" style:display-name="ListLabel 245" style:family="text">
      <style:text-properties fo:font-size="10pt" style:font-size-asian="10pt" style:font-name-complex="Times New Roman" style:font-family-complex="'Times New Roman'" style:font-family-generic-complex="roman" style:font-pitch-complex="variable"/>
    </style:style>
    <style:style style:name="ListLabel_20_246" style:display-name="ListLabel 246" style:family="text">
      <style:text-properties fo:font-size="10pt" style:font-size-asian="10pt"/>
    </style:style>
    <style:style style:name="ListLabel_20_247" style:display-name="ListLabel 247" style:family="text">
      <style:text-properties fo:font-size="10pt" style:font-size-asian="10pt"/>
    </style:style>
    <style:style style:name="ListLabel_20_248" style:display-name="ListLabel 248" style:family="text">
      <style:text-properties fo:font-size="10pt" style:font-size-asian="10pt"/>
    </style:style>
    <style:style style:name="ListLabel_20_249" style:display-name="ListLabel 249" style:family="text">
      <style:text-properties fo:font-size="10pt" style:font-size-asian="10pt"/>
    </style:style>
    <style:style style:name="ListLabel_20_250" style:display-name="ListLabel 250" style:family="text">
      <style:text-properties fo:font-size="10pt" style:font-size-asian="10pt"/>
    </style:style>
    <style:style style:name="ListLabel_20_251" style:display-name="ListLabel 251" style:family="text">
      <style:text-properties fo:font-size="10pt" style:font-size-asian="10pt"/>
    </style:style>
    <style:style style:name="ListLabel_20_252" style:display-name="ListLabel 252" style:family="text">
      <style:text-properties fo:font-size="10pt" style:font-size-asian="10pt"/>
    </style:style>
    <style:style style:name="ListLabel_20_253" style:display-name="ListLabel 253" style:family="text">
      <style:text-properties fo:font-weight="bold" style:font-weight-asian="bold" style:font-weight-complex="bold"/>
    </style:style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>
      <style:text-properties fo:font-size="10pt" style:font-size-asian="10pt"/>
    </style:style>
    <style:style style:name="ListLabel_20_263" style:display-name="ListLabel 263" style:family="text">
      <style:text-properties fo:font-size="10pt" style:font-size-asian="10pt"/>
    </style:style>
    <style:style style:name="ListLabel_20_264" style:display-name="ListLabel 264" style:family="text">
      <style:text-properties fo:font-size="10pt" style:font-size-asian="10pt"/>
    </style:style>
    <style:style style:name="ListLabel_20_265" style:display-name="ListLabel 265" style:family="text">
      <style:text-properties fo:font-size="10pt" style:font-size-asian="10pt"/>
    </style:style>
    <style:style style:name="ListLabel_20_266" style:display-name="ListLabel 266" style:family="text">
      <style:text-properties fo:font-size="10pt" style:font-size-asian="10pt"/>
    </style:style>
    <style:style style:name="ListLabel_20_267" style:display-name="ListLabel 267" style:family="text">
      <style:text-properties fo:font-size="10pt" style:font-size-asian="10pt"/>
    </style:style>
    <style:style style:name="ListLabel_20_268" style:display-name="ListLabel 268" style:family="text">
      <style:text-properties fo:font-size="10pt" style:font-size-asian="10pt"/>
    </style:style>
    <style:style style:name="ListLabel_20_269" style:display-name="ListLabel 269" style:family="text">
      <style:text-properties fo:font-size="10pt" style:font-size-asian="10pt"/>
    </style:style>
    <style:style style:name="ListLabel_20_270" style:display-name="ListLabel 270" style:family="text">
      <style:text-properties fo:font-size="10pt" style:font-size-asian="10pt"/>
    </style:style>
    <style:style style:name="ListLabel_20_271" style:display-name="ListLabel 271" style:family="text">
      <style:text-properties fo:font-size="10pt" style:font-size-asian="10pt"/>
    </style:style>
    <style:style style:name="ListLabel_20_272" style:display-name="ListLabel 272" style:family="text">
      <style:text-properties fo:font-size="10pt" style:font-size-asian="10pt"/>
    </style:style>
    <style:style style:name="ListLabel_20_273" style:display-name="ListLabel 273" style:family="text">
      <style:text-properties fo:font-size="10pt" style:font-size-asian="10pt"/>
    </style:style>
    <style:style style:name="ListLabel_20_274" style:display-name="ListLabel 274" style:family="text">
      <style:text-properties fo:font-size="10pt" style:font-size-asian="10pt"/>
    </style:style>
    <style:style style:name="ListLabel_20_275" style:display-name="ListLabel 275" style:family="text">
      <style:text-properties fo:font-size="10pt" style:font-size-asian="10pt"/>
    </style:style>
    <style:style style:name="ListLabel_20_276" style:display-name="ListLabel 276" style:family="text">
      <style:text-properties fo:font-size="10pt" style:font-size-asian="10pt"/>
    </style:style>
    <style:style style:name="ListLabel_20_277" style:display-name="ListLabel 277" style:family="text">
      <style:text-properties fo:font-size="10pt" style:font-size-asian="10pt"/>
    </style:style>
    <style:style style:name="ListLabel_20_278" style:display-name="ListLabel 278" style:family="text">
      <style:text-properties fo:font-size="10pt" style:font-size-asian="10pt"/>
    </style:style>
    <style:style style:name="ListLabel_20_279" style:display-name="ListLabel 279" style:family="text">
      <style:text-properties fo:font-size="10pt" style:font-size-asian="10pt"/>
    </style:style>
    <style:style style:name="ListLabel_20_280" style:display-name="ListLabel 280" style:family="text">
      <style:text-properties fo:font-size="10pt" style:font-size-asian="10pt"/>
    </style:style>
    <style:style style:name="ListLabel_20_281" style:display-name="ListLabel 281" style:family="text">
      <style:text-properties fo:font-size="10pt" style:font-size-asian="10pt"/>
    </style:style>
    <style:style style:name="ListLabel_20_282" style:display-name="ListLabel 282" style:family="text">
      <style:text-properties fo:font-size="10pt" style:font-size-asian="10pt"/>
    </style:style>
    <style:style style:name="ListLabel_20_283" style:display-name="ListLabel 283" style:family="text">
      <style:text-properties fo:font-size="10pt" style:font-size-asian="10pt"/>
    </style:style>
    <style:style style:name="ListLabel_20_284" style:display-name="ListLabel 284" style:family="text">
      <style:text-properties fo:font-size="10pt" style:font-size-asian="10pt"/>
    </style:style>
    <style:style style:name="ListLabel_20_285" style:display-name="ListLabel 285" style:family="text">
      <style:text-properties fo:font-size="10pt" style:font-size-asian="10pt"/>
    </style:style>
    <style:style style:name="ListLabel_20_286" style:display-name="ListLabel 286" style:family="text">
      <style:text-properties fo:font-size="10pt" style:font-size-asian="10pt"/>
    </style:style>
    <style:style style:name="ListLabel_20_287" style:display-name="ListLabel 287" style:family="text">
      <style:text-properties fo:font-size="10pt" style:font-size-asian="10pt"/>
    </style:style>
    <style:style style:name="ListLabel_20_288" style:display-name="ListLabel 288" style:family="text">
      <style:text-properties fo:font-size="10pt" style:font-size-asian="10pt"/>
    </style:style>
    <style:style style:name="ListLabel_20_289" style:display-name="ListLabel 289" style:family="text">
      <style:text-properties fo:font-size="10pt" style:font-size-asian="10pt"/>
    </style:style>
    <style:style style:name="ListLabel_20_290" style:display-name="ListLabel 290" style:family="text">
      <style:text-properties fo:font-size="10pt" style:font-size-asian="10pt"/>
    </style:style>
    <style:style style:name="ListLabel_20_291" style:display-name="ListLabel 291" style:family="text">
      <style:text-properties fo:font-size="10pt" style:font-size-asian="10pt"/>
    </style:style>
    <style:style style:name="ListLabel_20_292" style:display-name="ListLabel 292" style:family="text">
      <style:text-properties fo:font-size="10pt" style:font-size-asian="10pt"/>
    </style:style>
    <style:style style:name="ListLabel_20_293" style:display-name="ListLabel 293" style:family="text">
      <style:text-properties fo:font-size="10pt" style:font-size-asian="10pt"/>
    </style:style>
    <style:style style:name="ListLabel_20_294" style:display-name="ListLabel 294" style:family="text">
      <style:text-properties fo:font-size="10pt" style:font-size-asian="10pt"/>
    </style:style>
    <style:style style:name="ListLabel_20_295" style:display-name="ListLabel 295" style:family="text">
      <style:text-properties fo:font-size="10pt" style:font-size-asian="10pt"/>
    </style:style>
    <style:style style:name="ListLabel_20_296" style:display-name="ListLabel 296" style:family="text">
      <style:text-properties fo:font-size="10pt" style:font-size-asian="10pt"/>
    </style:style>
    <style:style style:name="ListLabel_20_297" style:display-name="ListLabel 297" style:family="text">
      <style:text-properties fo:font-size="10pt" style:font-size-asian="10pt"/>
    </style:style>
    <style:style style:name="ListLabel_20_298" style:display-name="ListLabel 298" style:family="text">
      <style:text-properties fo:font-size="10pt" style:font-size-asian="10pt"/>
    </style:style>
    <style:style style:name="ListLabel_20_299" style:display-name="ListLabel 299" style:family="text">
      <style:text-properties fo:font-size="10pt" style:font-size-asian="10pt"/>
    </style:style>
    <style:style style:name="ListLabel_20_300" style:display-name="ListLabel 300" style:family="text">
      <style:text-properties fo:font-size="10pt" style:font-size-asian="10pt"/>
    </style:style>
    <style:style style:name="ListLabel_20_301" style:display-name="ListLabel 301" style:family="text">
      <style:text-properties fo:font-size="10pt" style:font-size-asian="10pt"/>
    </style:style>
    <style:style style:name="ListLabel_20_302" style:display-name="ListLabel 302" style:family="text">
      <style:text-properties fo:font-size="10pt" style:font-size-asian="10pt"/>
    </style:style>
    <style:style style:name="ListLabel_20_303" style:display-name="ListLabel 303" style:family="text">
      <style:text-properties fo:font-size="10pt" style:font-size-asian="10pt"/>
    </style:style>
    <style:style style:name="ListLabel_20_304" style:display-name="ListLabel 304" style:family="text">
      <style:text-properties fo:font-size="10pt" style:font-size-asian="10pt"/>
    </style:style>
    <style:style style:name="ListLabel_20_305" style:display-name="ListLabel 305" style:family="text">
      <style:text-properties fo:font-size="10pt" style:font-size-asian="10pt"/>
    </style:style>
    <style:style style:name="ListLabel_20_306" style:display-name="ListLabel 306" style:family="text">
      <style:text-properties fo:font-size="10pt" style:font-size-asian="10pt"/>
    </style:style>
    <style:style style:name="WW_5f_CharLFO2LVL1" style:display-name="WW_CharLFO2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LVL2" style:display-name="WW_CharLFO2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LVL3" style:display-name="WW_CharLFO2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LVL5" style:display-name="WW_CharLFO2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LVL6" style:display-name="WW_CharLFO2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LVL8" style:display-name="WW_CharLFO2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LVL9" style:display-name="WW_CharLFO2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LVL1" style:display-name="WW_CharLFO3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LVL2" style:display-name="WW_CharLFO3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LVL3" style:display-name="WW_CharLFO3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LVL5" style:display-name="WW_CharLFO3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LVL6" style:display-name="WW_CharLFO3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LVL8" style:display-name="WW_CharLFO3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LVL9" style:display-name="WW_CharLFO3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LVL1" style:display-name="WW_CharLFO4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LVL2" style:display-name="WW_CharLFO4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LVL3" style:display-name="WW_CharLFO4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LVL5" style:display-name="WW_CharLFO4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LVL6" style:display-name="WW_CharLFO4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LVL8" style:display-name="WW_CharLFO4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LVL9" style:display-name="WW_CharLFO4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LVL2" style:display-name="WW_CharLFO5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LVL3" style:display-name="WW_CharLFO5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LVL4" style:display-name="WW_CharLFO5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LVL5" style:display-name="WW_CharLFO5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LVL6" style:display-name="WW_CharLFO5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LVL7" style:display-name="WW_CharLFO5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LVL8" style:display-name="WW_CharLFO5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LVL9" style:display-name="WW_CharLFO5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6LVL1" style:display-name="WW_CharLFO6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6LVL2" style:display-name="WW_CharLFO6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6LVL3" style:display-name="WW_CharLFO6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6LVL4" style:display-name="WW_CharLFO6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6LVL5" style:display-name="WW_CharLFO6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6LVL6" style:display-name="WW_CharLFO6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6LVL7" style:display-name="WW_CharLFO6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6LVL8" style:display-name="WW_CharLFO6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6LVL9" style:display-name="WW_CharLFO6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7LVL1" style:display-name="WW_CharLFO7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7LVL2" style:display-name="WW_CharLFO7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7LVL3" style:display-name="WW_CharLFO7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7LVL4" style:display-name="WW_CharLFO7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7LVL5" style:display-name="WW_CharLFO7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7LVL6" style:display-name="WW_CharLFO7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7LVL7" style:display-name="WW_CharLFO7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7LVL8" style:display-name="WW_CharLFO7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7LVL9" style:display-name="WW_CharLFO7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8LVL1" style:display-name="WW_CharLFO8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8LVL2" style:display-name="WW_CharLFO8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8LVL3" style:display-name="WW_CharLFO8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8LVL4" style:display-name="WW_CharLFO8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8LVL5" style:display-name="WW_CharLFO8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8LVL6" style:display-name="WW_CharLFO8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8LVL7" style:display-name="WW_CharLFO8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8LVL8" style:display-name="WW_CharLFO8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8LVL9" style:display-name="WW_CharLFO8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9LVL1" style:display-name="WW_CharLFO9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9LVL2" style:display-name="WW_CharLFO9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9LVL3" style:display-name="WW_CharLFO9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9LVL4" style:display-name="WW_CharLFO9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9LVL5" style:display-name="WW_CharLFO9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9LVL6" style:display-name="WW_CharLFO9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9LVL7" style:display-name="WW_CharLFO9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9LVL8" style:display-name="WW_CharLFO9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9LVL9" style:display-name="WW_CharLFO9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0LVL1" style:display-name="WW_CharLFO10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0LVL2" style:display-name="WW_CharLFO10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0LVL3" style:display-name="WW_CharLFO10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0LVL4" style:display-name="WW_CharLFO10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0LVL5" style:display-name="WW_CharLFO10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0LVL6" style:display-name="WW_CharLFO10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0LVL7" style:display-name="WW_CharLFO10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0LVL8" style:display-name="WW_CharLFO10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0LVL9" style:display-name="WW_CharLFO10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1LVL1" style:display-name="WW_CharLFO11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1LVL2" style:display-name="WW_CharLFO11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1LVL3" style:display-name="WW_CharLFO11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1LVL4" style:display-name="WW_CharLFO11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1LVL5" style:display-name="WW_CharLFO11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1LVL6" style:display-name="WW_CharLFO11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1LVL7" style:display-name="WW_CharLFO11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1LVL8" style:display-name="WW_CharLFO11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1LVL9" style:display-name="WW_CharLFO11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2LVL1" style:display-name="WW_CharLFO12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2LVL2" style:display-name="WW_CharLFO12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2LVL3" style:display-name="WW_CharLFO12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2LVL4" style:display-name="WW_CharLFO12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2LVL5" style:display-name="WW_CharLFO12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2LVL6" style:display-name="WW_CharLFO12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2LVL7" style:display-name="WW_CharLFO12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2LVL8" style:display-name="WW_CharLFO12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2LVL9" style:display-name="WW_CharLFO12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3LVL1" style:display-name="WW_CharLFO13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3LVL2" style:display-name="WW_CharLFO13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3LVL3" style:display-name="WW_CharLFO13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3LVL4" style:display-name="WW_CharLFO13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3LVL5" style:display-name="WW_CharLFO13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3LVL6" style:display-name="WW_CharLFO13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3LVL7" style:display-name="WW_CharLFO13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3LVL8" style:display-name="WW_CharLFO13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3LVL9" style:display-name="WW_CharLFO13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4LVL2" style:display-name="WW_CharLFO14LVL2" style:family="text">
      <style:text-properties fo:font-size="10pt" style:font-size-asian="10pt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4" style:display-name="WW_CharLFO14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5" style:display-name="WW_CharLFO14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7" style:display-name="WW_CharLFO1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8" style:display-name="WW_CharLFO1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5LVL2" style:display-name="WW_CharLFO15LVL2" style:family="text">
      <style:text-properties fo:font-size="10pt" style:font-size-asian="10pt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4" style:display-name="WW_CharLFO15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5" style:display-name="WW_CharLFO15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7" style:display-name="WW_CharLFO15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8" style:display-name="WW_CharLFO15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6LVL2" style:display-name="WW_CharLFO16LVL2" style:family="text">
      <style:text-properties fo:font-size="10pt" style:font-size-asian="10pt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4" style:display-name="WW_CharLFO16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5" style:display-name="WW_CharLFO16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7" style:display-name="WW_CharLFO16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8" style:display-name="WW_CharLFO16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7LVL2" style:display-name="WW_CharLFO17LVL2" style:family="text">
      <style:text-properties fo:font-size="10pt" style:font-size-asian="10pt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7LVL4" style:display-name="WW_CharLFO17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7LVL5" style:display-name="WW_CharLFO17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7LVL7" style:display-name="WW_CharLFO17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7LVL8" style:display-name="WW_CharLFO17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8LVL2" style:display-name="WW_CharLFO18LVL2" style:family="text">
      <style:text-properties fo:font-size="10pt" style:font-size-asian="10pt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8LVL4" style:display-name="WW_CharLFO18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8LVL5" style:display-name="WW_CharLFO18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8LVL7" style:display-name="WW_CharLFO18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8LVL8" style:display-name="WW_CharLFO18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9LVL2" style:display-name="WW_CharLFO19LVL2" style:family="text">
      <style:text-properties fo:font-size="10pt" style:font-size-asian="10pt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4" style:display-name="WW_CharLFO19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5" style:display-name="WW_CharLFO19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7" style:display-name="WW_CharLFO19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8" style:display-name="WW_CharLFO19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1LVL2" style:display-name="WW_CharLFO21LVL2" style:family="text">
      <style:text-properties fo:font-size="10pt" style:font-size-asian="10pt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4" style:display-name="WW_CharLFO2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5" style:display-name="WW_CharLFO2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7" style:display-name="WW_CharLFO2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8" style:display-name="WW_CharLFO2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1" style:display-name="WW_CharLFO2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3LVL2" style:display-name="WW_CharLFO23LVL2" style:family="text">
      <style:text-properties fo:font-size="10pt" style:font-size-asian="10pt"/>
    </style:style>
    <style:style style:name="WW_5f_CharLFO23LVL3" style:display-name="WW_CharLFO2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4" style:display-name="WW_CharLFO2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5" style:display-name="WW_CharLFO2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6" style:display-name="WW_CharLFO2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7" style:display-name="WW_CharLFO2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8" style:display-name="WW_CharLFO2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9" style:display-name="WW_CharLFO2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4LVL1" style:display-name="WW_CharLFO24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4LVL2" style:display-name="WW_CharLFO24LVL2" style:family="text">
      <style:text-properties fo:font-size="10pt" style:font-size-asian="10pt"/>
    </style:style>
    <style:style style:name="WW_5f_CharLFO24LVL3" style:display-name="WW_CharLFO2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4LVL4" style:display-name="WW_CharLFO24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4LVL5" style:display-name="WW_CharLFO24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4LVL6" style:display-name="WW_CharLFO2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4LVL7" style:display-name="WW_CharLFO2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4LVL8" style:display-name="WW_CharLFO2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4LVL9" style:display-name="WW_CharLFO2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5LVL1" style:display-name="WW_CharLFO2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5LVL3" style:display-name="WW_CharLFO25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5LVL4" style:display-name="WW_CharLFO25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5LVL5" style:display-name="WW_CharLFO25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5LVL6" style:display-name="WW_CharLFO25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5LVL7" style:display-name="WW_CharLFO25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5LVL8" style:display-name="WW_CharLFO25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5LVL9" style:display-name="WW_CharLFO25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6LVL1" style:display-name="WW_CharLFO2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6LVL2" style:display-name="WW_CharLFO26LVL2" style:family="text">
      <style:text-properties fo:font-size="10pt" style:font-size-asian="10pt" style:font-name-complex="Times New Roman" style:font-family-complex="'Times New Roman'" style:font-family-generic-complex="roman" style:font-pitch-complex="variable"/>
    </style:style>
    <style:style style:name="WW_5f_CharLFO26LVL3" style:display-name="WW_CharLFO26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6LVL4" style:display-name="WW_CharLFO26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6LVL5" style:display-name="WW_CharLFO26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6LVL6" style:display-name="WW_CharLFO26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6LVL7" style:display-name="WW_CharLFO26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6LVL8" style:display-name="WW_CharLFO26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6LVL9" style:display-name="WW_CharLFO26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1" style:display-name="WW_CharLFO27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7LVL2" style:display-name="WW_CharLFO27LVL2" style:family="text">
      <style:text-properties fo:font-size="10pt" style:font-size-asian="10pt" style:font-name-complex="Times New Roman" style:font-family-complex="'Times New Roman'" style:font-family-generic-complex="roman" style:font-pitch-complex="variable"/>
    </style:style>
    <style:style style:name="WW_5f_CharLFO27LVL3" style:display-name="WW_CharLFO27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4" style:display-name="WW_CharLFO27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5" style:display-name="WW_CharLFO27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6" style:display-name="WW_CharLFO27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7" style:display-name="WW_CharLFO27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8" style:display-name="WW_CharLFO27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9" style:display-name="WW_CharLFO27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8LVL1" style:display-name="WW_CharLFO28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8LVL2" style:display-name="WW_CharLFO28LVL2" style:family="text">
      <style:text-properties fo:font-size="10pt" style:font-size-asian="10pt" style:font-name-complex="Times New Roman" style:font-family-complex="'Times New Roman'" style:font-family-generic-complex="roman" style:font-pitch-complex="variable"/>
    </style:style>
    <style:style style:name="WW_5f_CharLFO28LVL3" style:display-name="WW_CharLFO28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8LVL4" style:display-name="WW_CharLFO28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8LVL5" style:display-name="WW_CharLFO28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8LVL6" style:display-name="WW_CharLFO28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8LVL7" style:display-name="WW_CharLFO28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8LVL8" style:display-name="WW_CharLFO28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8LVL9" style:display-name="WW_CharLFO28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9LVL1" style:display-name="WW_CharLFO29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9LVL2" style:display-name="WW_CharLFO29LVL2" style:family="text">
      <style:text-properties fo:font-size="10pt" style:font-size-asian="10pt" style:font-name-complex="Times New Roman" style:font-family-complex="'Times New Roman'" style:font-family-generic-complex="roman" style:font-pitch-complex="variable"/>
    </style:style>
    <style:style style:name="WW_5f_CharLFO29LVL3" style:display-name="WW_CharLFO29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9LVL4" style:display-name="WW_CharLFO29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9LVL5" style:display-name="WW_CharLFO29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9LVL6" style:display-name="WW_CharLFO29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9LVL7" style:display-name="WW_CharLFO29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9LVL8" style:display-name="WW_CharLFO29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9LVL9" style:display-name="WW_CharLFO29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0LVL1" style:display-name="WW_CharLFO30LVL1" style:family="text">
      <style:text-properties fo:font-weight="bold" style:font-weight-asian="bold" style:font-weight-complex="bold"/>
    </style:style>
    <style:style style:name="WW_5f_CharLFO31LVL1" style:display-name="WW_CharLFO3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1LVL2" style:display-name="WW_CharLFO31LVL2" style:family="text">
      <style:text-properties fo:font-size="10pt" style:font-size-asian="10pt"/>
    </style:style>
    <style:style style:name="WW_5f_CharLFO31LVL3" style:display-name="WW_CharLFO3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1LVL4" style:display-name="WW_CharLFO3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1LVL5" style:display-name="WW_CharLFO3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1LVL6" style:display-name="WW_CharLFO3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1LVL7" style:display-name="WW_CharLFO3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1LVL8" style:display-name="WW_CharLFO3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1LVL9" style:display-name="WW_CharLFO3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2LVL1" style:display-name="WW_CharLFO3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2LVL2" style:display-name="WW_CharLFO32LVL2" style:family="text">
      <style:text-properties fo:font-size="10pt" style:font-size-asian="10pt"/>
    </style:style>
    <style:style style:name="WW_5f_CharLFO32LVL3" style:display-name="WW_CharLFO3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2LVL4" style:display-name="WW_CharLFO3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2LVL5" style:display-name="WW_CharLFO3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2LVL6" style:display-name="WW_CharLFO3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2LVL7" style:display-name="WW_CharLFO3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2LVL8" style:display-name="WW_CharLFO3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2LVL9" style:display-name="WW_CharLFO3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3LVL1" style:display-name="WW_CharLFO3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3LVL2" style:display-name="WW_CharLFO33LVL2" style:family="text">
      <style:text-properties fo:font-size="10pt" style:font-size-asian="10pt"/>
    </style:style>
    <style:style style:name="WW_5f_CharLFO33LVL3" style:display-name="WW_CharLFO3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3LVL4" style:display-name="WW_CharLFO3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3LVL5" style:display-name="WW_CharLFO3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3LVL6" style:display-name="WW_CharLFO3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3LVL7" style:display-name="WW_CharLFO3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3LVL8" style:display-name="WW_CharLFO3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3LVL9" style:display-name="WW_CharLFO3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4LVL1" style:display-name="WW_CharLFO34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4LVL2" style:display-name="WW_CharLFO34LVL2" style:family="text">
      <style:text-properties fo:font-size="10pt" style:font-size-asian="10pt"/>
    </style:style>
    <style:style style:name="WW_5f_CharLFO34LVL3" style:display-name="WW_CharLFO3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4LVL4" style:display-name="WW_CharLFO34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4LVL5" style:display-name="WW_CharLFO34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4LVL6" style:display-name="WW_CharLFO3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4LVL7" style:display-name="WW_CharLFO3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4LVL8" style:display-name="WW_CharLFO3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4LVL9" style:display-name="WW_CharLFO3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5LVL1" style:display-name="WW_CharLFO3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5LVL2" style:display-name="WW_CharLFO35LVL2" style:family="text">
      <style:text-properties fo:font-size="10pt" style:font-size-asian="10pt"/>
    </style:style>
    <style:style style:name="WW_5f_CharLFO35LVL3" style:display-name="WW_CharLFO35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5LVL4" style:display-name="WW_CharLFO35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5LVL5" style:display-name="WW_CharLFO35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5LVL6" style:display-name="WW_CharLFO35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5LVL7" style:display-name="WW_CharLFO35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5LVL8" style:display-name="WW_CharLFO35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5LVL9" style:display-name="WW_CharLFO35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0LVL1" style:display-name="WW_CharLFO70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70LVL2" style:display-name="WW_CharLFO70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70LVL3" style:display-name="WW_CharLFO70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0LVL4" style:display-name="WW_CharLFO70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0LVL5" style:display-name="WW_CharLFO70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0LVL6" style:display-name="WW_CharLFO70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0LVL7" style:display-name="WW_CharLFO70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0LVL8" style:display-name="WW_CharLFO70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0LVL9" style:display-name="WW_CharLFO70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1LVL1" style:display-name="WW_CharLFO7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71LVL2" style:display-name="WW_CharLFO7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71LVL3" style:display-name="WW_CharLFO7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1LVL4" style:display-name="WW_CharLFO7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1LVL5" style:display-name="WW_CharLFO7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1LVL6" style:display-name="WW_CharLFO7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1LVL7" style:display-name="WW_CharLFO7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1LVL8" style:display-name="WW_CharLFO7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1LVL9" style:display-name="WW_CharLFO7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3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3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3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WW_5f_CharLFO4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4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4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4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4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4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4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WW_5f_CharLFO5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5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5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5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5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5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WW_5f_CharLFO6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6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6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6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6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6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6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6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6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WW_5f_CharLFO7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7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7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7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7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7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7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7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7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WW_5f_CharLFO8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8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8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8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8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8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8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8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8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WW_5f_CharLFO9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9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9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9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9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9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9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9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9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WW_5f_CharLFO10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10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10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10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10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10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10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10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10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WW_5f_CharLFO11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11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11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11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11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11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11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11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11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WW_5f_CharLFO12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12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12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12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12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12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12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12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12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WW_5f_CharLFO13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13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13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13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13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13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13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13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13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WW_5f_CharLFO14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4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14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4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14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14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4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14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14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WW_5f_CharLFO15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5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15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5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15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15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5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15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15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WW_5f_CharLFO16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6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16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6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16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16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6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16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16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WW_5f_CharLFO17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7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17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7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17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17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7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17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17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WW_5f_CharLFO18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8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18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8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18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18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8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18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18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WW_5f_CharLFO19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9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19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9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19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19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9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19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19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WW_5f_CharLFO21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1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21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1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21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21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1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21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21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WW_5f_CharLFO23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3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23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3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23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23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3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23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23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WW_5f_CharLFO24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4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24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4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24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24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4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24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24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WW_5f_CharLFO25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 text:start-value="1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WW_5f_CharLFO25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5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25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25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5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25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25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WW_5f_CharLFO26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6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Times New Roman"/>
      </text:list-level-style-bullet>
      <text:list-level-style-bullet text:level="3" text:style-name="WW_5f_CharLFO26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6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26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26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6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26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26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WW_5f_CharLFO27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7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Times New Roman"/>
      </text:list-level-style-bullet>
      <text:list-level-style-bullet text:level="3" text:style-name="WW_5f_CharLFO27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7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27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27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7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27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27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WW_5f_CharLFO28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8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Times New Roman"/>
      </text:list-level-style-bullet>
      <text:list-level-style-bullet text:level="3" text:style-name="WW_5f_CharLFO28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8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28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28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8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28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28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WW_5f_CharLFO29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9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Times New Roman"/>
      </text:list-level-style-bullet>
      <text:list-level-style-bullet text:level="3" text:style-name="WW_5f_CharLFO29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9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29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29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9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29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29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WW_5f_CharLFO30LVL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WW_5f_CharLFO31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1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31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1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31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31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1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31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31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WW_5f_CharLFO32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2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32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2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32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32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2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32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32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WW_5f_CharLFO33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3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33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3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33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33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3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33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33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WW_5f_CharLFO34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4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34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4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34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34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4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34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34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WW_5f_CharLFO35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5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35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5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35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35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5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35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35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meta:initial-creator>Inga Dzieniszewska</meta:initial-creator>
    <meta:creation-date>2026-05-07T10:59:00Z</meta:creation-date>
    <dc:date>2026-05-20T17:02:07.050019861</dc:date>
    <meta:editing-cycles>35</meta:editing-cycles>
    <meta:editing-duration>PT1H27M42S</meta:editing-duration>
    <meta:document-statistic meta:table-count="0" meta:image-count="2" meta:object-count="0" meta:page-count="15" meta:paragraph-count="305" meta:word-count="2185" meta:character-count="15974" meta:non-whitespace-character-count="14249"/>
    <meta:user-defined meta:name="AppVersion">16.0000</meta:user-defined>
    <meta:template xlink:type="simple" xlink:actuate="onRequest" xlink:title="" xlink:href="../DiagramKlas.odt/Normal.dotm"/>
  </office:meta>
</office:document-meta>
</file>