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pl" fo:country="PL" officeooo:rsid="00137cb4" officeooo:paragraph-rsid="00137cb4"/>
    </style:style>
    <style:style style:name="P2" style:family="paragraph" style:parent-style-name="Text_20_body">
      <style:paragraph-properties fo:text-align="center" style:justify-single-word="false"/>
      <style:text-properties fo:language="pl" fo:country="PL" officeooo:paragraph-rsid="00137cb4"/>
    </style:style>
    <style:style style:name="P3" style:family="paragraph" style:parent-style-name="Text_20_body">
      <style:paragraph-properties fo:text-align="start" style:justify-single-word="false"/>
      <style:text-properties fo:language="pl" fo:country="PL" fo:font-weight="bold" officeooo:rsid="00147e46" officeooo:paragraph-rsid="00147e46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language="pl" fo:country="PL" fo:font-weight="bold" officeooo:rsid="00152aaf" officeooo:paragraph-rsid="00152aaf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language="pl" fo:country="PL" fo:font-weight="bold" officeooo:rsid="0018d76e" officeooo:paragraph-rsid="0018d76e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language="pl" fo:country="PL" fo:font-weight="bold" officeooo:rsid="001e9bdc" officeooo:paragraph-rsid="001e9bdc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pl" fo:country="PL" fo:font-weight="bold" officeooo:rsid="001fbcaf" officeooo:paragraph-rsid="001fbcaf" style:font-weight-asian="bold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fo:language="pl" fo:country="PL" fo:font-weight="normal" officeooo:rsid="00147e46" officeooo:paragraph-rsid="00147e46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language="pl" fo:country="PL" fo:font-weight="normal" officeooo:rsid="00147e46" officeooo:paragraph-rsid="00147e46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language="pl" fo:country="PL" fo:font-weight="normal" officeooo:rsid="00152aaf" officeooo:paragraph-rsid="00152aaf" style:font-weight-asian="normal" style:font-weight-complex="normal"/>
    </style:style>
    <style:style style:name="P11" style:family="paragraph" style:parent-style-name="Text_20_body" style:list-style-name="L2">
      <style:paragraph-properties fo:text-align="start" style:justify-single-word="false"/>
      <style:text-properties fo:language="pl" fo:country="PL" fo:font-weight="normal" officeooo:rsid="00152aaf" officeooo:paragraph-rsid="00152aaf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language="pl" fo:country="PL" fo:font-weight="normal" officeooo:rsid="00170837" officeooo:paragraph-rsid="00170837" style:font-weight-asian="normal" style:font-weight-complex="normal"/>
    </style:style>
    <style:style style:name="P13" style:family="paragraph" style:parent-style-name="Text_20_body" style:list-style-name="L3">
      <style:paragraph-properties fo:text-align="start" style:justify-single-word="false"/>
      <style:text-properties fo:language="pl" fo:country="PL" fo:font-weight="normal" officeooo:rsid="0018d76e" officeooo:paragraph-rsid="0018d76e" style:font-weight-asian="normal" style:font-weight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fo:language="pl" fo:country="PL" fo:font-weight="normal" officeooo:rsid="0018d76e" officeooo:paragraph-rsid="0018d76e" style:font-weight-asian="normal" style:font-weight-complex="normal"/>
    </style:style>
    <style:style style:name="P15" style:family="paragraph" style:parent-style-name="Text_20_body" style:list-style-name="L4">
      <style:paragraph-properties fo:text-align="start" style:justify-single-word="false"/>
      <style:text-properties fo:language="pl" fo:country="PL" fo:font-weight="normal" officeooo:rsid="001e9bdc" officeooo:paragraph-rsid="001e9bdc" style:font-weight-asian="normal" style:font-weight-complex="normal"/>
    </style:style>
    <style:style style:name="P16" style:family="paragraph" style:parent-style-name="Text_20_body" style:list-style-name="L4">
      <style:paragraph-properties fo:text-align="start" style:justify-single-word="false"/>
      <style:text-properties fo:language="pl" fo:country="PL" fo:font-weight="normal" officeooo:rsid="001fbcaf" officeooo:paragraph-rsid="001fbcaf" style:font-weight-asian="normal" style:font-weight-complex="normal"/>
    </style:style>
    <style:style style:name="P17" style:family="paragraph" style:parent-style-name="Text_20_body" style:list-style-name="L5">
      <style:paragraph-properties fo:text-align="start" style:justify-single-word="false"/>
      <style:text-properties fo:language="pl" fo:country="PL" fo:font-weight="normal" officeooo:rsid="001fbcaf" officeooo:paragraph-rsid="001fbcaf" style:font-weight-asian="normal" style:font-weight-complex="normal"/>
    </style:style>
    <style:style style:name="P18" style:family="paragraph" style:parent-style-name="Text_20_body" style:list-style-name="L5">
      <style:paragraph-properties fo:text-align="start" style:justify-single-word="false"/>
      <style:text-properties fo:language="pl" fo:country="PL" fo:font-weight="normal" officeooo:rsid="00218b8c" officeooo:paragraph-rsid="00218b8c" style:font-weight-asian="normal" style:font-weight-complex="normal"/>
    </style:style>
    <style:style style:name="T1" style:family="text">
      <style:text-properties officeooo:rsid="001afb7b"/>
    </style:style>
    <style:style style:name="T2" style:family="text">
      <style:text-properties officeooo:rsid="001d386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kySchool</text:h>
      <text:p text:style-name="P2"/>
      <text:p text:style-name="P3">Skład grupy:</text:p>
      <text:list xml:id="list709030969" text:style-name="L1">
        <text:list-item>
          <text:p text:style-name="P8">Sandra Dzieniszewska</text:p>
        </text:list-item>
        <text:list-item>
          <text:p text:style-name="P8">Hubert Milewski</text:p>
        </text:list-item>
        <text:list-item>
          <text:p text:style-name="P8">Patryk Wojtkielewicz</text:p>
        </text:list-item>
      </text:list>
      <text:p text:style-name="P9"/>
      <text:p text:style-name="P4">Opis projektu</text:p>
      <text:p text:style-name="P10"><text:span text:style-name="T2">Celem aplikacji </text:span>internetow<text:span text:style-name="T2">ej jest </text:span>zarządzani<text:span text:style-name="T2">e </text:span>sekcją spadochronową na lotnisku. Docelowo, każdy pracownik sekcji będzie miał dostęp do panelu w którym może zarządzać sekcją. Funkcjonalność aplikacji będzie pokrywać m.in.:</text:p>
      <text:list xml:id="list1170736265" text:style-name="L2">
        <text:list-item>
          <text:p text:style-name="P11">Grafik pracowników</text:p>
        </text:list-item>
        <text:list-item>
          <text:p text:style-name="P11">Zarządzanie wylotami</text:p>
        </text:list-item>
        <text:list-item>
          <text:p text:style-name="P11">Kontrola uprawnień skoczków oraz pilotów</text:p>
        </text:list-item>
        <text:list-item>
          <text:p text:style-name="P11">Organizacja wydarzeń</text:p>
        </text:list-item>
        <text:list-item>
          <text:p text:style-name="P11">Organizacja kursów i szkoleń</text:p>
        </text:list-item>
        <text:list-item>
          <text:p text:style-name="P14">Przechowywanie informacji dotyczących stanów spadochronów</text:p>
        </text:list-item>
      </text:list>
      <text:p text:style-name="P12">Dodatkowo, aplikacja będzie udostępniała interfejs który wyświetlony na układalni będzie informować skoczków o nadchodzących wylotach oraz przewidywanym czasie oczekiwania.</text:p>
      <text:p text:style-name="P5">Elementy interfesju</text:p>
      <text:list xml:id="list3438110168" text:style-name="L3">
        <text:list-item>
          <text:p text:style-name="P13">„Dashboard” – podsumowanie wszystkich kluczowych informacji na dzień ze skokami</text:p>
        </text:list-item>
        <text:list-item>
          <text:p text:style-name="P13">Dodawanie skoczków, wylotów, osób, kursów, szkoleń, <text:span text:style-name="T1">spadochronów</text:span> itd.</text:p>
        </text:list-item>
        <text:list-item>
          <text:p text:style-name="P13">Logowanie i rejestracja</text:p>
        </text:list-item>
        <text:list-item>
          <text:p text:style-name="P13">Interfejs podsumuwujący najbliższe wyloty do wyświetlenia w układalni</text:p>
        </text:list-item>
      </text:list>
      <text:p text:style-name="P6">Korzyści mierzalne</text:p>
      <text:list xml:id="list2268207771" text:style-name="L4">
        <text:list-item>
          <text:p text:style-name="P15">Lepsza organizacja czasem i pieniędzmi skoczków, pracowników oraz aeroklubu</text:p>
        </text:list-item>
        <text:list-item>
          <text:p text:style-name="P16">Sprawniejsze przygotowanie skoczków przed wylotem</text:p>
        </text:list-item>
      </text:list>
      <text:p text:style-name="P7">Korzyści niemierzalne</text:p>
      <text:list xml:id="list598458533" text:style-name="L5">
        <text:list-item>
          <text:p text:style-name="P17">Zwiększone bezpieczeństwo na strefie</text:p>
        </text:list-item>
        <text:list-item>
          <text:p text:style-name="P18">Ułatwione poruszanie się po strefie dla nowych skoczków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09:50:10.067765633</meta:creation-date>
    <meta:generator>LibreOffice/7.3.7.2$Linux_X86_64 LibreOffice_project/30$Build-2</meta:generator>
    <dc:date>2026-04-21T10:06:38.569726563</dc:date>
    <meta:editing-duration>PT16M23S</meta:editing-duration>
    <meta:editing-cycles>13</meta:editing-cycles>
    <meta:document-statistic meta:table-count="0" meta:image-count="0" meta:object-count="0" meta:page-count="1" meta:paragraph-count="25" meta:word-count="155" meta:character-count="1195" meta:non-whitespace-character-count="1081"/>
  </office:meta>
</office:document-meta>
</file>