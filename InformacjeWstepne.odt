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pl" fo:country="PL" officeooo:paragraph-rsid="00137cb4"/>
    </style:style>
    <style:style style:name="P2" style:family="paragraph" style:parent-style-name="Text_20_body">
      <style:paragraph-properties fo:text-align="start" style:justify-single-word="false"/>
      <style:text-properties fo:language="pl" fo:country="PL" fo:font-weight="bold" officeooo:rsid="00147e46" officeooo:paragraph-rsid="00147e46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language="pl" fo:country="PL" fo:font-weight="bold" officeooo:rsid="00152aaf" officeooo:paragraph-rsid="00152aaf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language="pl" fo:country="PL" fo:font-weight="bold" officeooo:rsid="0018d76e" officeooo:paragraph-rsid="0018d76e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language="pl" fo:country="PL" fo:font-weight="bold" officeooo:rsid="001e9bdc" officeooo:paragraph-rsid="001e9bdc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language="pl" fo:country="PL" fo:font-weight="bold" officeooo:rsid="001fbcaf" officeooo:paragraph-rsid="001fbcaf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language="pl" fo:country="PL" fo:font-weight="normal" officeooo:rsid="00147e46" officeooo:paragraph-rsid="00147e46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language="pl" fo:country="PL" fo:font-weight="normal" officeooo:rsid="00152aaf" officeooo:paragraph-rsid="00152aaf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language="pl" fo:country="PL" fo:font-weight="normal" officeooo:rsid="00170837" officeooo:paragraph-rsid="00170837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language="pl" fo:country="PL" fo:font-weight="normal" officeooo:rsid="00218b8c" officeooo:paragraph-rsid="00218b8c" style:font-weight-asian="normal" style:font-weight-complex="normal"/>
    </style:style>
    <style:style style:name="P11" style:family="paragraph" style:parent-style-name="Text_20_body">
      <style:text-properties fo:language="pl" fo:country="PL"/>
    </style:style>
    <style:style style:name="P12" style:family="paragraph" style:parent-style-name="Heading_20_1">
      <style:paragraph-properties fo:text-align="center" style:justify-single-word="false"/>
      <style:text-properties fo:language="pl" fo:country="PL" officeooo:rsid="00137cb4" officeooo:paragraph-rsid="00137cb4"/>
    </style:style>
    <style:style style:name="P13" style:family="paragraph" style:parent-style-name="Heading_20_2">
      <style:text-properties fo:language="pl" fo:country="PL" officeooo:rsid="00246afb" officeooo:paragraph-rsid="00246afb"/>
    </style:style>
    <style:style style:name="P14" style:family="paragraph" style:parent-style-name="Heading_20_3">
      <style:text-properties fo:language="pl" fo:country="PL" officeooo:rsid="0024a91a" officeooo:paragraph-rsid="0024a91a"/>
    </style:style>
    <style:style style:name="P15" style:family="paragraph" style:parent-style-name="Heading_20_3">
      <style:text-properties fo:language="pl" fo:country="PL" officeooo:rsid="00246afb" officeooo:paragraph-rsid="00246afb"/>
    </style:style>
    <style:style style:name="P16" style:family="paragraph" style:parent-style-name="Heading_20_3">
      <style:text-properties fo:language="pl" fo:country="PL"/>
    </style:style>
    <style:style style:name="P17" style:family="paragraph" style:parent-style-name="Text_20_body" style:list-style-name="L1">
      <style:paragraph-properties fo:text-align="start" style:justify-single-word="false"/>
      <style:text-properties fo:language="pl" fo:country="PL" fo:font-weight="normal" officeooo:rsid="00147e46" officeooo:paragraph-rsid="00147e46" style:font-weight-asian="normal" style:font-weight-complex="normal"/>
    </style:style>
    <style:style style:name="P18" style:family="paragraph" style:parent-style-name="Text_20_body" style:list-style-name="L2">
      <style:paragraph-properties fo:text-align="start" style:justify-single-word="false"/>
      <style:text-properties fo:language="pl" fo:country="PL" fo:font-weight="normal" officeooo:rsid="00152aaf" officeooo:paragraph-rsid="00152aaf" style:font-weight-asian="normal" style:font-weight-complex="normal"/>
    </style:style>
    <style:style style:name="P19" style:family="paragraph" style:parent-style-name="Text_20_body" style:list-style-name="L2">
      <style:paragraph-properties fo:text-align="start" style:justify-single-word="false"/>
      <style:text-properties fo:language="pl" fo:country="PL" fo:font-weight="normal" officeooo:rsid="0018d76e" officeooo:paragraph-rsid="0018d76e" style:font-weight-asian="normal" style:font-weight-complex="normal"/>
    </style:style>
    <style:style style:name="P20" style:family="paragraph" style:parent-style-name="Text_20_body" style:list-style-name="L3">
      <style:paragraph-properties fo:text-align="start" style:justify-single-word="false"/>
      <style:text-properties fo:language="pl" fo:country="PL" fo:font-weight="normal" officeooo:rsid="0018d76e" officeooo:paragraph-rsid="0018d76e" style:font-weight-asian="normal" style:font-weight-complex="normal"/>
    </style:style>
    <style:style style:name="P21" style:family="paragraph" style:parent-style-name="Text_20_body" style:list-style-name="L4">
      <style:paragraph-properties fo:text-align="start" style:justify-single-word="false"/>
      <style:text-properties fo:language="pl" fo:country="PL" fo:font-weight="normal" officeooo:rsid="001e9bdc" officeooo:paragraph-rsid="001e9bdc" style:font-weight-asian="normal" style:font-weight-complex="normal"/>
    </style:style>
    <style:style style:name="P22" style:family="paragraph" style:parent-style-name="Text_20_body" style:list-style-name="L4">
      <style:paragraph-properties fo:text-align="start" style:justify-single-word="false"/>
      <style:text-properties fo:language="pl" fo:country="PL" fo:font-weight="normal" officeooo:rsid="001fbcaf" officeooo:paragraph-rsid="001fbcaf" style:font-weight-asian="normal" style:font-weight-complex="normal"/>
    </style:style>
    <style:style style:name="P23" style:family="paragraph" style:parent-style-name="Text_20_body" style:list-style-name="L5">
      <style:paragraph-properties fo:text-align="start" style:justify-single-word="false"/>
      <style:text-properties fo:language="pl" fo:country="PL" fo:font-weight="normal" officeooo:rsid="001fbcaf" officeooo:paragraph-rsid="001fbcaf" style:font-weight-asian="normal" style:font-weight-complex="normal"/>
    </style:style>
    <style:style style:name="P24" style:family="paragraph" style:parent-style-name="Text_20_body" style:list-style-name="L5">
      <style:paragraph-properties fo:text-align="start" style:justify-single-word="false"/>
      <style:text-properties fo:language="pl" fo:country="PL" fo:font-weight="normal" officeooo:rsid="00218b8c" officeooo:paragraph-rsid="00218b8c" style:font-weight-asian="normal" style:font-weight-complex="normal"/>
    </style:style>
    <style:style style:name="P25" style:family="paragraph" style:parent-style-name="Text_20_body" style:list-style-name="L6">
      <style:text-properties fo:language="pl" fo:country="PL" officeooo:rsid="0024a91a" officeooo:paragraph-rsid="0024a91a"/>
    </style:style>
    <style:style style:name="P26" style:family="paragraph" style:parent-style-name="Text_20_body" style:list-style-name="L8">
      <style:text-properties fo:language="pl" fo:country="PL" officeooo:rsid="0024a91a" officeooo:paragraph-rsid="0024a91a"/>
    </style:style>
    <style:style style:name="P27" style:family="paragraph" style:parent-style-name="Text_20_body" style:list-style-name="L11">
      <style:text-properties fo:language="pl" fo:country="PL" officeooo:rsid="0024a91a" officeooo:paragraph-rsid="0024a91a"/>
    </style:style>
    <style:style style:name="P28" style:family="paragraph" style:parent-style-name="Text_20_body" style:list-style-name="L7">
      <style:text-properties fo:language="pl" fo:country="PL" officeooo:rsid="00246afb" officeooo:paragraph-rsid="00246afb"/>
    </style:style>
    <style:style style:name="P29" style:family="paragraph" style:parent-style-name="Text_20_body" style:list-style-name="L10">
      <style:text-properties fo:language="pl" fo:country="PL" officeooo:rsid="00246afb" officeooo:paragraph-rsid="00246afb"/>
    </style:style>
    <style:style style:name="P30" style:family="paragraph" style:parent-style-name="Text_20_body" style:list-style-name="L9">
      <style:text-properties fo:language="pl" fo:country="PL"/>
    </style:style>
    <style:style style:name="P31" style:family="paragraph" style:parent-style-name="Text_20_body" style:list-style-name="L9">
      <style:text-properties fo:language="pl" fo:country="PL" officeooo:paragraph-rsid="002697d9"/>
    </style:style>
    <style:style style:name="P32" style:family="paragraph" style:parent-style-name="Text_20_body" style:list-style-name="L12">
      <style:text-properties fo:language="pl" fo:country="PL"/>
    </style:style>
    <style:style style:name="T1" style:family="text">
      <style:text-properties officeooo:rsid="001afb7b"/>
    </style:style>
    <style:style style:name="T2" style:family="text">
      <style:text-properties officeooo:rsid="001d3862"/>
    </style:style>
    <style:style style:name="T3" style:family="text">
      <style:text-properties officeooo:rsid="002697d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kySchool</text:h>
      <text:p text:style-name="P1"/>
      <text:p text:style-name="P2">Skład grupy:</text:p>
      <text:list xml:id="list3248274765" text:style-name="L1">
        <text:list-item>
          <text:p text:style-name="P17">Sandra Dzieniszewska</text:p>
        </text:list-item>
        <text:list-item>
          <text:p text:style-name="P17">Hubert Milewski</text:p>
        </text:list-item>
        <text:list-item>
          <text:p text:style-name="P17">Patryk Wojtkielewicz</text:p>
        </text:list-item>
      </text:list>
      <text:p text:style-name="P7"/>
      <text:p text:style-name="P3">Opis projektu</text:p>
      <text:p text:style-name="P8"><text:span text:style-name="T2">Celem aplikacji </text:span>internetow<text:span text:style-name="T2">ej jest </text:span>zarządzani<text:span text:style-name="T2">e </text:span>sekcją spadochronową na lotnisku. Docelowo, każdy pracownik sekcji będzie miał dostęp do panelu w którym może zarządzać sekcją. Funkcjonalność aplikacji będzie pokrywać m.in.:</text:p>
      <text:list xml:id="list444299038" text:style-name="L2">
        <text:list-item>
          <text:p text:style-name="P18">Grafik pracowników</text:p>
        </text:list-item>
        <text:list-item>
          <text:p text:style-name="P18">Zarządzanie wylotami</text:p>
        </text:list-item>
        <text:list-item>
          <text:p text:style-name="P18">Kontrola uprawnień skoczków oraz pilotów</text:p>
        </text:list-item>
        <text:list-item>
          <text:p text:style-name="P18">Organizacja wydarzeń</text:p>
        </text:list-item>
        <text:list-item>
          <text:p text:style-name="P18">Organizacja kursów i szkoleń</text:p>
        </text:list-item>
        <text:list-item>
          <text:p text:style-name="P19">Przechowywanie informacji dotyczących stanów spadochronów</text:p>
        </text:list-item>
      </text:list>
      <text:p text:style-name="P9">Dodatkowo, aplikacja będzie udostępniała interfejs który wyświetlony na układalni będzie informować skoczków o nadchodzących wylotach oraz przewidywanym czasie oczekiwania.</text:p>
      <text:p text:style-name="P4">Elementy interfesju</text:p>
      <text:list xml:id="list2694254699" text:style-name="L3">
        <text:list-item>
          <text:p text:style-name="P20">„Dashboard” – podsumowanie wszystkich kluczowych informacji na dzień ze skokami</text:p>
        </text:list-item>
        <text:list-item>
          <text:p text:style-name="P20">Dodawanie skoczków, wylotów, osób, kursów, szkoleń, <text:span text:style-name="T1">spadochronów</text:span> itd.</text:p>
        </text:list-item>
        <text:list-item>
          <text:p text:style-name="P20">Logowanie i rejestracja</text:p>
        </text:list-item>
        <text:list-item>
          <text:p text:style-name="P20">Interfejs podsumuwujący najbliższe wyloty do wyświetlenia w układalni</text:p>
        </text:list-item>
      </text:list>
      <text:p text:style-name="P5">Korzyści mierzalne</text:p>
      <text:list xml:id="list1118144493" text:style-name="L4">
        <text:list-item>
          <text:p text:style-name="P21">Lepsza organizacja czasem i pieniędzmi skoczków, pracowników oraz aeroklubu</text:p>
        </text:list-item>
        <text:list-item>
          <text:p text:style-name="P22">Sprawniejsze przygotowanie skoczków przed wylotem</text:p>
        </text:list-item>
      </text:list>
      <text:p text:style-name="P6">Korzyści niemierzalne</text:p>
      <text:list xml:id="list349161852" text:style-name="L5">
        <text:list-item>
          <text:p text:style-name="P23">Zwiększone bezpieczeństwo na strefie</text:p>
        </text:list-item>
        <text:list-item>
          <text:p text:style-name="P24">Ułatwione poruszanie się po strefie dla nowych skoczków</text:p>
        </text:list-item>
      </text:list>
      <text:p text:style-name="P10"/>
      <text:h text:style-name="P13" text:outline-level="2"><text:soft-page-break/>Słownik pojęć</text:h>
      <text:h text:style-name="P14" text:outline-level="3">Organizacja skoków</text:h>
      <text:list xml:id="list3141871183" text:style-name="L6">
        <text:list-item>
          <text:p text:style-name="P25">Skok – opuszczenie statku powietrznego</text:p>
        </text:list-item>
        <text:list-item>
          <text:p text:style-name="P25">Wysokość skoku – wysokość z której wyskakujemy</text:p>
        </text:list-item>
        <text:list-item>
          <text:p text:style-name="P25">Wysokość otwarcia – wysokość na jakiej rozpoczynamy otwarcie spadochronu</text:p>
        </text:list-item>
        <text:list-item>
          <text:p text:style-name="P25">Wysokość zawiśnięcia – wysokość na jakiej spadochron w pełni się otworzy</text:p>
        </text:list-item>
        <text:list-item>
          <text:p text:style-name="P25">Wysokość awaryjna – wysokość na jakiej decydujemy, czy lądujemy na spadochronie jaki mamy nad główą czy przesiadamy się na zapasowy</text:p>
        </text:list-item>
        <text:list-item>
          <text:p text:style-name="P25">Separacja – czas liczony w sekundach pomiędzy wyskokiem poszczególnych skoczków / grup skoczków</text:p>
        </text:list-item>
        <text:list-item>
          <text:p text:style-name="P25">Strefa zrzutu (Drop zone, DZ) – miejsce przeznaczone do lądowania</text:p>
        </text:list-item>
        <text:list-item>
          <text:p text:style-name="P25">Strefa oczekiwania – miejsce w którym zbijamy wysokość po pomyślnym otwarciu spadochronu</text:p>
        </text:list-item>
        <text:list-item>
          <text:p text:style-name="P25">Runda – “pattern” który wykonujemy przed lądowaniem. Na 300, 200 oraz 100m wykonujemy zakręt 90 stopni w lewo / prawo w celu ustawienia się pod wiatr I uniknięcia kolizji z innymi skoczkami</text:p>
        </text:list-item>
      </text:list>
      <text:h text:style-name="P15" text:outline-level="3">Budowa spadochronu</text:h>
      <text:list xml:id="list1581276772" text:style-name="L7">
        <text:list-item>
          <text:p text:style-name="P28">Czasza – materiał służący do spowolnienia upadku spadochroniarza</text:p>
        </text:list-item>
        <text:list-item>
          <text:p text:style-name="P28">Spadochron główny – czasza używana w 99% przypadków</text:p>
        </text:list-item>
        <text:list-item>
          <text:p text:style-name="P28">Spadochron zapasowy – czasza używana w 1% przypadków</text:p>
        </text:list-item>
        <text:list-item>
          <text:p text:style-name="P28">Paczka – opakowanie do którego chowamy czaszę</text:p>
        </text:list-item>
        <text:list-item>
          <text:p text:style-name="P28">Kontener – opakowanie do którego chowamy paczkę</text:p>
        </text:list-item>
        <text:list-item>
          <text:p text:style-name="P28">Uprząż – uprząż którą nakłada skoczek, do niej przyszyty jest kontener</text:p>
        </text:list-item>
        <text:list-item>
          <text:p text:style-name="P28">Pilocik – “spadochronik” służący do wyciągnięcia paczki z kontenera. Uchwyt pilocika znajduje się na plecach z prawej strony, w okolicach bioder</text:p>
        </text:list-item>
        <text:list-item>
          <text:p text:style-name="P28">Linki – łączą taśmy nośne z czaszą</text:p>
        </text:list-item>
        <text:list-item>
          <text:p text:style-name="P28">Taśmy nośne – łączą linki z systemem 3 kółek</text:p>
        </text:list-item>
        <text:list-item>
          <text:p text:style-name="P28">System 3 kółek – sposób mocowania czaszy spadochronu głównego pozwalający na łatwe niezawodne wypięcie go w razie awarii.</text:p>
        </text:list-item>
        <text:list-item>
          <text:p text:style-name="P28">Uchwyty – znajdują się w okolicach brzucha, prawy służy do wypięcia czaszy głównej, lewy służy do otwarcia czaszy zapasowej</text:p>
        </text:list-item>
      </text:list>
      <text:h text:style-name="P14" text:outline-level="3"><text:soft-page-break/></text:h>
      <text:h text:style-name="P14" text:outline-level="3">Rodzaje skoków</text:h>
      <text:list xml:id="list2520450574" text:style-name="L8">
        <text:list-item>
          <text:p text:style-name="P26">Tandem – skok z instruktorem</text:p>
        </text:list-item>
        <text:list-item>
          <text:p text:style-name="P26">Solo – skok w pojedynkę</text:p>
        </text:list-item>
        <text:list-item>
          <text:p text:style-name="P26">RW – skok w grupie, wszyscy spadają na brzuchu</text:p>
        </text:list-item>
        <text:list-item>
          <text:p text:style-name="P26">FF – skok w grupie, wszyscy spadają na siedząco lub głową do dołu</text:p>
        </text:list-item>
        <text:list-item>
          <text:p text:style-name="P26">TRACK – skok w grupie, wszyscy przemieszczają się w danym kierunku</text:p>
        </text:list-item>
        <text:list-item>
          <text:p text:style-name="P26">Wingsuit – skok solo / w grupie, skoczkowie ubrani są w Wingsuity</text:p>
        </text:list-item>
        <text:list-item>
          <text:p text:style-name="P26">Static line – skok solo z natychmiastowym otwarciem zainicijowanym przez linę zamocowaną do statku powietrznego</text:p>
        </text:list-item>
      </text:list>
      <text:h text:style-name="P16" text:outline-level="3">Role na lotnisku</text:h>
      <text:list xml:id="list3959990513" text:style-name="L9">
        <text:list-item>
          <text:p text:style-name="P30">Kierownik skoków – odpowiedzialny za poprawny przebieg skoków</text:p>
        </text:list-item>
        <text:list-item>
          <text:p text:style-name="P30">Układacz – osoba układająca spadochrony główne</text:p>
        </text:list-item>
        <text:list-item>
          <text:p text:style-name="P30">Rigger – mechanik spadochronowy, odpowiedzialny za układanie spadochronu zapasowego oraz naprawy</text:p>
        </text:list-item>
        <text:list-item>
          <text:p text:style-name="P30">Instruktor AFF – instruktor z uprawnieniami na szkolenie <text:span text:style-name="T3">przeprowadzanie szkoleń </text:span>AFF</text:p>
        </text:list-item>
        <text:list-item>
          <text:p text:style-name="P31">Instruktor <text:span text:style-name="T3">SL </text:span>– instruktor z uprawnieniami na szkolenie <text:span text:style-name="T3">przeprowadzanie szkoleń SL</text:span></text:p>
        </text:list-item>
        <text:list-item>
          <text:p text:style-name="P31">Instruktor – osoba w uprawnieniami instruktora</text:p>
        </text:list-item>
        <text:list-item>
          <text:p text:style-name="P31">Kamerzysta – skoczek wyskakujący obok tandemu, nagrywając go</text:p>
        </text:list-item>
        <text:list-item>
          <text:p text:style-name="P31">Spotter – wyznaczony skoczek w samolocie odpowiedzialny za upewnienie się, czy znajdujemy się w miejscu zrzutu</text:p>
        </text:list-item>
        <text:list-item>
          <text:p text:style-name="P31">Wyrzucający – wyznaczony skoczek odpowiedzialny za prawidłowe opuszczenie statku powietrznego przez skoczków</text:p>
        </text:list-item>
      </text:list>
      <text:h text:style-name="P15" text:outline-level="3">Procedury</text:h>
      <text:list xml:id="list1747589385" text:style-name="L10">
        <text:list-item>
          <text:p text:style-name="P29">Otwarcie – proces otwarcia głównego spadochronu</text:p>
        </text:list-item>
        <text:list-item>
          <text:p text:style-name="P29">Cutaway – proces odczepienia głównego spadochronu</text:p>
        </text:list-item>
        <text:list-item>
          <text:p text:style-name="P29">RSL – system otwierający spadochron zapasowy przy pomocy spadochronu głównego</text:p>
        </text:list-item>
        <text:list-item>
          <text:p text:style-name="P29">MARD – modyfikacja RSL</text:p>
        </text:list-item>
        <text:list-item>
          <text:p text:style-name="P29">Automat – (ang. Automatic Activation Device) komputer umieszczony w kontenerze który bada prędkość opadania skoczka I aktualną wysokość. W razie wykrycia nie otwarcia spadochronu poniżej podanej wysokości automat samodzielnie otwiera spadochron zapasowy</text:p>
        </text:list-item>
        <text:list-item>
          <text:p text:style-name="P29">Procedura awayjna – proces postępowania w przypadku wystąpienia awarii.</text:p>
        </text:list-item>
        <text:list-item>
          <text:p text:style-name="P29"><text:soft-page-break/>Gear check – kontrola przed skokiem</text:p>
        </text:list-item>
        <text:list-item>
          <text:p text:style-name="P29">Briefing – omówienie wylotu</text:p>
        </text:list-item>
      </text:list>
      <text:h text:style-name="P14" text:outline-level="3">Parametry</text:h>
      <text:list xml:id="list2168762578" text:style-name="L11">
        <text:list-item>
          <text:p text:style-name="P27">Wysokość – wysokość nad poziomem ziemi (AGL) mierzona w metrach</text:p>
        </text:list-item>
        <text:list-item>
          <text:p text:style-name="P27">Prędkość opadania – prędkość z jaką się spada. Po osiągnięciu prędkości krytycznej, dla skoczka na brzuchu wynosi około 50 m/s, w przypadku skoku FF może być bliższa 80 m/s</text:p>
        </text:list-item>
        <text:list-item>
          <text:p text:style-name="P27">Wing Loading (WL) – stosunek masy skoczka (masa osoby + ubrań + sprzętu + spadochronu) do powierzchni czaszy spadochronu głównego, wyrażony w proporcji funtów do stóp kwadratowych (lbs/ft sq)</text:p>
        </text:list-item>
      </text:list>
      <text:h text:style-name="P16" text:outline-level="3">Inne</text:h>
      <text:list xml:id="list1133830061" text:style-name="L12">
        <text:list-item>
          <text:p text:style-name="P32">Książka skoków – miejsce w którym dokumentujemy skoki</text:p>
        </text:list-item>
        <text:list-item>
          <text:p text:style-name="P32">Licencja – uprawnienia skoczka, w Polsce PJ, w USA USPA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09:50:10.067765633</meta:creation-date>
    <meta:generator>LibreOffice/7.3.7.2$Linux_X86_64 LibreOffice_project/30$Build-2</meta:generator>
    <dc:date>2026-05-05T10:30:24.871891204</dc:date>
    <meta:editing-duration>PT40M18S</meta:editing-duration>
    <meta:editing-cycles>18</meta:editing-cycles>
    <meta:document-statistic meta:table-count="0" meta:image-count="0" meta:object-count="0" meta:page-count="4" meta:paragraph-count="82" meta:word-count="733" meta:character-count="5148" meta:non-whitespace-character-count="4513"/>
  </office:meta>
</office:document-meta>
</file>