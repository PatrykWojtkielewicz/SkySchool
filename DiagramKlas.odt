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B00000405AC9ACFCC5196A552.png" manifest:media-type="image/png"/>
  <manifest:file-entry manifest:full-path="Pictures/1000000000000450000002D2B06A4AAE0A85BB10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ptos" fo:font-size="16pt" fo:language="pl" fo:country="PL" fo:font-weight="bold" style:letter-kerning="true" style:font-name-asian="Aptos1" style:font-size-asian="16pt" style:language-asian="en" style:country-asian="US" style:font-weight-asian="bold" style:font-size-complex="16pt" style:language-complex="ar" style:country-complex="SA" style:font-weight-complex="bold"/>
    </style:style>
    <style:style style:name="P2" style:family="paragraph" style:parent-style-name="Text_20_body_20__28_user_29_">
      <style:text-properties style:font-name="Aptos" fo:font-size="16pt" fo:language="pl" fo:country="PL" fo:font-weight="bold" style:font-size-asian="16pt" style:font-weight-asian="bold" style:font-size-complex="16pt" style:font-weight-complex="bold"/>
    </style:style>
    <style:style style:name="P3" style:family="paragraph" style:parent-style-name="Text_20_body_20__28_user_29_">
      <style:paragraph-properties fo:text-align="center" style:justify-single-word="false"/>
      <style:text-properties style:font-name="Aptos" fo:language="pl" fo:country="PL"/>
    </style:style>
    <style:style style:name="P4" style:family="paragraph" style:parent-style-name="Text_20_body_20__28_user_29_">
      <style:text-properties style:font-name="Aptos" fo:language="pl" fo:country="PL"/>
    </style:style>
    <style:style style:name="P5" style:family="paragraph" style:parent-style-name="Text_20_body_20__28_user_29_">
      <style:text-properties style:font-name="Aptos" fo:font-size="14pt" fo:language="pl" fo:country="PL" fo:font-weight="bold" style:font-size-asian="14pt" style:font-weight-asian="bold" style:font-size-complex="14pt" style:font-weight-complex="bold"/>
    </style:style>
    <style:style style:name="P6" style:family="paragraph" style:parent-style-name="Text_20_body_20__28_user_29_">
      <style:text-properties style:font-name="Aptos" fo:font-size="14pt" fo:language="pl" fo:country="PL" fo:font-style="italic" style:font-size-asian="14pt" style:font-style-asian="italic" style:font-size-complex="14pt" style:font-style-complex="italic"/>
    </style:style>
    <style:style style:name="P7" style:family="paragraph" style:parent-style-name="Text_20_body_20__28_user_29_">
      <style:paragraph-properties fo:margin-left="3.939in" fo:margin-right="0in" fo:text-indent="0.4925in" style:auto-text-indent="false"/>
      <style:text-properties style:font-name="Aptos" fo:font-size="14pt" fo:language="pl" fo:country="PL" fo:font-style="italic" style:font-size-asian="14pt" style:font-style-asian="italic" style:font-size-complex="14pt" style:font-style-complex="italic"/>
    </style:style>
    <style:style style:name="P8" style:family="paragraph" style:parent-style-name="Standard">
      <style:paragraph-properties fo:text-align="center" style:justify-single-word="false"/>
      <style:text-properties style:font-name="Aptos" fo:font-size="16pt" fo:language="pl" fo:country="PL" fo:font-weight="bold" style:letter-kerning="true" style:font-name-asian="Aptos1" style:font-size-asian="16pt" style:language-asian="en" style:country-asian="US" style:font-weight-asian="bold" style:font-size-complex="16pt" style:language-complex="ar" style:country-complex="SA" style:font-weight-complex="bold"/>
    </style:style>
    <style:style style:name="P9" style:family="paragraph" style:parent-style-name="Heading_20_1">
      <style:paragraph-properties fo:text-align="center" style:justify-single-word="false"/>
      <style:text-properties style:font-name="Aptos" fo:font-size="24pt" fo:language="pl" fo:country="PL" style:font-size-asian="24pt" style:font-size-complex="21pt"/>
    </style:style>
    <style:style style:name="P10" style:family="paragraph" style:parent-style-name="Heading_20_2">
      <style:text-properties style:font-name="Aptos" fo:language="pl" fo:country="PL"/>
    </style:style>
    <style:style style:name="P11" style:family="paragraph" style:parent-style-name="Heading_20_3">
      <style:text-properties style:font-name="Aptos" fo:language="pl" fo:country="PL"/>
    </style:style>
    <style:style style:name="P12" style:family="paragraph" style:parent-style-name="Text_20_body_20__28_user_29_">
      <style:text-properties style:font-name="Aptos" fo:language="pl" fo:country="PL" fo:font-weight="bold" style:font-weight-asian="bold" style:font-weight-complex="bold"/>
    </style:style>
    <style:style style:name="P13" style:family="paragraph" style:parent-style-name="Text_20_body_20__28_user_29_" style:list-style-name="WWNum29">
      <style:text-properties style:font-name="Aptos" fo:language="pl" fo:country="PL" fo:font-weight="bold" style:font-weight-asian="bold" style:font-weight-complex="bold"/>
    </style:style>
    <style:style style:name="P14" style:family="paragraph" style:parent-style-name="Text_20_body_20__28_user_29_" style:list-style-name="WWNum1">
      <style:text-properties style:font-name="Aptos" fo:language="pl" fo:country="PL"/>
    </style:style>
    <style:style style:name="P15" style:family="paragraph" style:parent-style-name="Text_20_body_20__28_user_29_">
      <style:text-properties style:font-name="Aptos" fo:language="pl" fo:country="PL"/>
    </style:style>
    <style:style style:name="P16" style:family="paragraph" style:parent-style-name="Text_20_body_20__28_user_29_" style:list-style-name="WWNum2">
      <style:text-properties style:font-name="Aptos" fo:language="pl" fo:country="PL"/>
    </style:style>
    <style:style style:name="P17" style:family="paragraph" style:parent-style-name="Text_20_body_20__28_user_29_" style:list-style-name="WWNum3">
      <style:text-properties style:font-name="Aptos" fo:language="pl" fo:country="PL"/>
    </style:style>
    <style:style style:name="P18" style:family="paragraph" style:parent-style-name="Text_20_body_20__28_user_29_" style:list-style-name="WWNum4">
      <style:text-properties style:font-name="Aptos" fo:language="pl" fo:country="PL"/>
    </style:style>
    <style:style style:name="P19" style:family="paragraph" style:parent-style-name="Text_20_body_20__28_user_29_" style:list-style-name="WWNum5">
      <style:text-properties style:font-name="Aptos" fo:language="pl" fo:country="PL"/>
    </style:style>
    <style:style style:name="P20" style:family="paragraph" style:parent-style-name="Text_20_body_20__28_user_29_" style:list-style-name="WWNum6">
      <style:text-properties style:font-name="Aptos" fo:language="pl" fo:country="PL"/>
    </style:style>
    <style:style style:name="P21" style:family="paragraph" style:parent-style-name="Text_20_body_20__28_user_29_" style:list-style-name="WWNum7">
      <style:text-properties style:font-name="Aptos" fo:language="pl" fo:country="PL"/>
    </style:style>
    <style:style style:name="P22" style:family="paragraph" style:parent-style-name="Text_20_body_20__28_user_29_" style:list-style-name="WWNum8">
      <style:text-properties style:font-name="Aptos" fo:language="pl" fo:country="PL"/>
    </style:style>
    <style:style style:name="P23" style:family="paragraph" style:parent-style-name="Text_20_body_20__28_user_29_" style:list-style-name="WWNum9">
      <style:text-properties style:font-name="Aptos" fo:language="pl" fo:country="PL"/>
    </style:style>
    <style:style style:name="P24" style:family="paragraph" style:parent-style-name="Text_20_body_20__28_user_29_" style:list-style-name="WWNum10">
      <style:text-properties style:font-name="Aptos" fo:language="pl" fo:country="PL"/>
    </style:style>
    <style:style style:name="P25" style:family="paragraph" style:parent-style-name="Text_20_body_20__28_user_29_" style:list-style-name="WWNum11">
      <style:text-properties style:font-name="Aptos" fo:language="pl" fo:country="PL"/>
    </style:style>
    <style:style style:name="P26" style:family="paragraph" style:parent-style-name="Text_20_body_20__28_user_29_" style:list-style-name="WWNum12">
      <style:text-properties style:font-name="Aptos" fo:language="pl" fo:country="PL"/>
    </style:style>
    <style:style style:name="P27" style:family="paragraph" style:parent-style-name="Text_20_body_20__28_user_29_" style:list-style-name="WWNum13">
      <style:text-properties style:font-name="Aptos" fo:language="pl" fo:country="PL"/>
    </style:style>
    <style:style style:name="P28" style:family="paragraph" style:parent-style-name="Text_20_body_20__28_user_29_" style:list-style-name="WWNum14">
      <style:text-properties style:font-name="Aptos" fo:language="pl" fo:country="PL"/>
    </style:style>
    <style:style style:name="P29" style:family="paragraph" style:parent-style-name="Text_20_body_20__28_user_29_" style:list-style-name="WWNum15">
      <style:text-properties style:font-name="Aptos" fo:language="pl" fo:country="PL"/>
    </style:style>
    <style:style style:name="P30" style:family="paragraph" style:parent-style-name="Text_20_body_20__28_user_29_" style:list-style-name="WWNum16">
      <style:text-properties style:font-name="Aptos" fo:language="pl" fo:country="PL"/>
    </style:style>
    <style:style style:name="P31" style:family="paragraph" style:parent-style-name="Text_20_body_20__28_user_29_" style:list-style-name="WWNum17">
      <style:text-properties style:font-name="Aptos" fo:language="pl" fo:country="PL"/>
    </style:style>
    <style:style style:name="P32" style:family="paragraph" style:parent-style-name="Text_20_body_20__28_user_29_" style:list-style-name="WWNum18">
      <style:text-properties style:font-name="Aptos" fo:language="pl" fo:country="PL"/>
    </style:style>
    <style:style style:name="P33" style:family="paragraph" style:parent-style-name="Text_20_body_20__28_user_29_" style:list-style-name="WWNum25">
      <style:text-properties style:font-name="Aptos" fo:language="pl" fo:country="PL"/>
    </style:style>
    <style:style style:name="P34" style:family="paragraph" style:parent-style-name="Text_20_body_20__28_user_29_" style:list-style-name="WWNum26">
      <style:text-properties style:font-name="Aptos" fo:language="pl" fo:country="PL"/>
    </style:style>
    <style:style style:name="P35" style:family="paragraph" style:parent-style-name="Text_20_body_20__28_user_29_" style:list-style-name="WWNum27">
      <style:text-properties style:font-name="Aptos" fo:language="pl" fo:country="PL"/>
    </style:style>
    <style:style style:name="P36" style:family="paragraph" style:parent-style-name="Text_20_body_20__28_user_29_" style:list-style-name="WWNum28">
      <style:text-properties style:font-name="Aptos" fo:language="pl" fo:country="PL"/>
    </style:style>
    <style:style style:name="P37" style:family="paragraph" style:parent-style-name="Text_20_body_20__28_user_29_">
      <style:paragraph-properties fo:text-align="center" style:justify-single-word="false"/>
      <style:text-properties style:font-name="Aptos" fo:font-size="16pt" fo:language="pl" fo:country="PL" fo:font-weight="bold" style:font-size-asian="16pt" style:font-weight-asian="bold" style:font-size-complex="16pt" style:font-weight-complex="bold"/>
    </style:style>
    <style:style style:name="P38" style:family="paragraph" style:parent-style-name="Text_20_body_20__28_user_29_">
      <style:paragraph-properties fo:margin-left="0in" fo:margin-right="0in" fo:text-align="center" style:justify-single-word="false" fo:text-indent="0in" style:auto-text-indent="false"/>
      <style:text-properties style:font-name="Aptos" fo:font-size="16pt" fo:language="pl" fo:country="PL" fo:font-weight="bold" officeooo:rsid="0002bea5" officeooo:paragraph-rsid="0002bea5" style:font-size-asian="16pt" style:font-weight-asian="bold" style:font-size-complex="16pt" style:font-weight-complex="bold"/>
    </style:style>
    <style:style style:name="P39" style:family="paragraph" style:parent-style-name="Text_20_body_20__28_user_29_" style:list-style-name="WWNum19">
      <style:text-properties style:font-name="Aptos" fo:font-size="14pt" fo:language="pl" fo:country="PL" fo:font-weight="bold" style:font-size-asian="14pt" style:font-weight-asian="bold" style:font-size-complex="14pt" style:font-weight-complex="bold"/>
    </style:style>
    <style:style style:name="P40" style:family="paragraph" style:parent-style-name="Text_20_body_20__28_user_29_">
      <style:text-properties style:font-name="Aptos" fo:font-size="14pt" fo:language="pl" fo:country="PL" fo:font-weight="bold" style:font-size-asian="14pt" style:font-weight-asian="bold" style:font-size-complex="14pt" style:font-weight-complex="bold"/>
    </style:style>
    <style:style style:name="P41" style:family="paragraph" style:parent-style-name="Text_20_body_20__28_user_29_">
      <style:paragraph-properties fo:margin-left="0.5in" fo:margin-right="0in" fo:text-indent="0in" style:auto-text-indent="false"/>
      <style:text-properties style:font-name="Aptos" fo:font-size="14pt" fo:language="pl" fo:country="PL" fo:font-weight="bold" style:font-size-asian="14pt" style:font-weight-asian="bold" style:font-size-complex="14pt" style:font-weight-complex="bold"/>
    </style:style>
    <style:style style:name="P42" style:family="paragraph" style:parent-style-name="Text_20_body_20__28_user_29_">
      <style:paragraph-properties fo:margin-left="3.939in" fo:margin-right="0in" fo:text-indent="0.4925in" style:auto-text-indent="false"/>
      <style:text-properties style:font-name="Aptos" fo:font-size="14pt" fo:language="pl" fo:country="PL" fo:font-style="italic" style:font-size-asian="14pt" style:font-style-asian="italic" style:font-size-complex="14pt" style:font-style-complex="italic"/>
    </style:style>
    <style:style style:name="P43" style:family="paragraph" style:parent-style-name="Text_20_body_20__28_user_29_" style:list-style-name="WWNum31">
      <style:text-properties style:font-name="Aptos" fo:font-size="14pt" fo:language="pl" fo:country="PL" style:font-size-asian="14pt" style:font-size-complex="14pt"/>
    </style:style>
    <style:style style:name="P44" style:family="paragraph" style:parent-style-name="Text_20_body_20__28_user_29_" style:list-style-name="WWNum32">
      <style:text-properties style:font-name="Aptos" fo:font-size="14pt" fo:language="pl" fo:country="PL" style:font-size-asian="14pt" style:font-size-complex="14pt"/>
    </style:style>
    <style:style style:name="P45" style:family="paragraph" style:parent-style-name="Text_20_body_20__28_user_29_" style:list-style-name="WWNum34">
      <style:text-properties style:font-name="Aptos" fo:font-size="14pt" fo:language="pl" fo:country="PL" style:font-size-asian="14pt" style:font-size-complex="14pt"/>
    </style:style>
    <style:style style:name="P46" style:family="paragraph" style:parent-style-name="Text_20_body_20__28_user_29_" style:list-style-name="WWNum29">
      <style:text-properties style:font-name="Aptos" fo:font-size="11pt" fo:language="pl" fo:country="PL" fo:font-weight="bold" style:font-size-asian="11pt" style:font-weight-asian="bold" style:font-size-complex="11pt" style:font-weight-complex="bold"/>
    </style:style>
    <style:style style:name="P47" style:family="paragraph" style:parent-style-name="Text_20_body_20__28_user_29_" style:list-style-name="WWNum20">
      <style:text-properties style:font-name="Aptos" fo:font-size="11pt" fo:language="pl" fo:country="PL" style:font-size-asian="11pt" style:font-size-complex="11pt"/>
    </style:style>
    <style:style style:name="P48" style:family="paragraph" style:parent-style-name="Text_20_body_20__28_user_29_" style:list-style-name="WWNum21">
      <style:text-properties style:font-name="Aptos" fo:font-size="11pt" fo:language="pl" fo:country="PL" style:font-size-asian="11pt" style:font-size-complex="11pt"/>
    </style:style>
    <style:style style:name="P49" style:family="paragraph" style:parent-style-name="Text_20_body_20__28_user_29_" style:list-style-name="WWNum22">
      <style:text-properties style:font-name="Aptos" fo:font-size="11pt" fo:language="pl" fo:country="PL" style:font-size-asian="11pt" style:font-size-complex="11pt"/>
    </style:style>
    <style:style style:name="P50" style:family="paragraph" style:parent-style-name="Text_20_body_20__28_user_29_" style:list-style-name="WWNum23">
      <style:text-properties style:font-name="Aptos" fo:font-size="11pt" fo:language="pl" fo:country="PL" style:font-size-asian="11pt" style:font-size-complex="11pt"/>
    </style:style>
    <style:style style:name="P51" style:family="paragraph" style:parent-style-name="Text_20_body_20__28_user_29_" style:list-style-name="WWNum24">
      <style:text-properties style:font-name="Aptos" fo:font-size="11pt" fo:language="pl" fo:country="PL" style:font-size-asian="11pt" style:font-size-complex="11pt"/>
    </style:style>
    <style:style style:name="P52" style:family="paragraph" style:parent-style-name="Text_20_body_20__28_user_29_" style:list-style-name="WWNum23"/>
    <style:style style:name="P53" style:family="paragraph" style:parent-style-name="Text_20_body_20__28_user_29_" style:list-style-name="WWNum23">
      <style:text-properties officeooo:paragraph-rsid="0002b0cf"/>
    </style:style>
    <style:style style:name="P54" style:family="paragraph" style:parent-style-name="Text_20_body_20__28_user_29_" style:list-style-name="WWNum30"/>
    <style:style style:name="P55" style:family="paragraph" style:parent-style-name="Text_20_body_20__28_user_29_" style:list-style-name="WWNum33"/>
    <style:style style:name="P56" style:family="paragraph" style:parent-style-name="Text_20_body_20__28_user_29_">
      <style:paragraph-properties fo:margin-left="3.939in" fo:margin-right="0in" fo:text-indent="0.4925in" style:auto-text-indent="false"/>
    </style:style>
    <style:style style:name="P57" style:family="paragraph" style:parent-style-name="Text_20_body_20__28_user_29_">
      <style:paragraph-properties fo:margin-left="0in" fo:margin-right="0in" fo:text-indent="0in" style:auto-text-indent="false"/>
      <style:text-properties officeooo:paragraph-rsid="0002bea5"/>
    </style:style>
    <style:style style:name="P58" style:family="paragraph" style:parent-style-name="Text_20_body_20__28_user_29_">
      <style:paragraph-properties fo:margin-left="0in" fo:margin-right="0in" fo:text-indent="0in" style:auto-text-indent="false"/>
      <style:text-properties officeooo:rsid="0002bea5" officeooo:paragraph-rsid="0002bea5"/>
    </style:style>
    <style:style style:name="P5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ptos" fo:font-size="14pt" fo:language="pl" fo:country="PL" fo:font-weight="bold" style:font-size-asian="14pt" style:font-weight-asian="bold" style:font-size-complex="14pt" style:font-weight-complex="bold"/>
    </style:style>
    <style:style style:name="T2" style:family="text">
      <style:text-properties style:font-name="Aptos" fo:font-size="14pt" fo:language="pl" fo:country="PL" style:font-size-asian="14pt" style:font-size-complex="14pt"/>
    </style:style>
    <style:style style:name="T3" style:family="text">
      <style:text-properties style:font-name="Aptos" fo:font-size="11pt" fo:language="pl" fo:country="PL" style:font-size-asian="11pt" style:font-size-complex="11pt"/>
    </style:style>
    <style:style style:name="T4" style:family="text">
      <style:text-properties style:font-name="Aptos" fo:font-size="11pt" style:font-size-asian="11pt" style:font-size-complex="11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09in" svg:stroke-color="#000000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SkySchool</text:h>
      <text:p text:style-name="P3"/>
      <text:p text:style-name="P12">Skład grupy:</text:p>
      <text:list xml:id="list2867138073" text:style-name="WWNum1">
        <text:list-item>
          <text:p text:style-name="P14">Sandra Dzieniszewska</text:p>
        </text:list-item>
        <text:list-item>
          <text:p text:style-name="P14">Hubert Milewski</text:p>
        </text:list-item>
        <text:list-item>
          <text:p text:style-name="P14">Patryk Wojtkielewicz</text:p>
        </text:list-item>
      </text:list>
      <text:p text:style-name="P12">Opis projektu</text:p>
      <text:p text:style-name="P4">Celem aplikacji internetowej jest zarządzanie sekcją spadochronową na lotnisku. Docelowo, każdy pracownik sekcji będzie miał dostęp do panelu w którym może zarządzać sekcją. Funkcjonalność aplikacji będzie pokrywać m.in.:</text:p>
      <text:list xml:id="list774777874" text:style-name="WWNum2">
        <text:list-item>
          <text:p text:style-name="P16">Grafik pracowników</text:p>
        </text:list-item>
        <text:list-item>
          <text:p text:style-name="P16">Zarządzanie wylotami</text:p>
        </text:list-item>
        <text:list-item>
          <text:p text:style-name="P16">Kontrola uprawnień skoczków oraz pilotów</text:p>
        </text:list-item>
        <text:list-item>
          <text:p text:style-name="P16">Organizacja wydarzeń</text:p>
        </text:list-item>
        <text:list-item>
          <text:p text:style-name="P16">Organizacja kursów i szkoleń</text:p>
        </text:list-item>
        <text:list-item>
          <text:p text:style-name="P16">Przechowywanie informacji dotyczących stanów spadochronów</text:p>
        </text:list-item>
      </text:list>
      <text:p text:style-name="P4">Dodatkowo, aplikacja będzie udostępniała interfejs który wyświetlony na układalni będzie informować skoczków o nadchodzących wylotach oraz przewidywanym czasie oczekiwania.</text:p>
      <text:p text:style-name="P12">Elementy interfesju</text:p>
      <text:list xml:id="list2931880999" text:style-name="WWNum3">
        <text:list-item>
          <text:p text:style-name="P17">„Dashboard” – podsumowanie wszystkich kluczowych informacji na dzień ze skokami</text:p>
        </text:list-item>
        <text:list-item>
          <text:p text:style-name="P17">Dodawanie skoczków, wylotów, osób, kursów, szkoleń, spadochronów itd.</text:p>
        </text:list-item>
        <text:list-item>
          <text:p text:style-name="P17">Logowanie i rejestracja</text:p>
        </text:list-item>
        <text:list-item>
          <text:p text:style-name="P17">Interfejs podsumuwujący najbliższe wyloty do wyświetlenia w układalni</text:p>
        </text:list-item>
      </text:list>
      <text:p text:style-name="P12">Korzyści mierzalne</text:p>
      <text:list xml:id="list188668587" text:style-name="WWNum4">
        <text:list-item>
          <text:p text:style-name="P18">Lepsza organizacja czasem i pieniędzmi skoczków, pracowników oraz aeroklubu</text:p>
        </text:list-item>
        <text:list-item>
          <text:p text:style-name="P18">Sprawniejsze przygotowanie skoczków przed wylotem</text:p>
        </text:list-item>
      </text:list>
      <text:p text:style-name="P12">Korzyści niemierzalne</text:p>
      <text:list xml:id="list366504010" text:style-name="WWNum5">
        <text:list-item>
          <text:p text:style-name="P19">Zwiększone bezpieczeństwo na strefie</text:p>
        </text:list-item>
        <text:list-item>
          <text:p text:style-name="P19">Ułatwione poruszanie się po strefie dla nowych skoczków</text:p>
          <text:p text:style-name="P19"/>
        </text:list-item>
      </text:list>
      <text:h text:style-name="P10" text:outline-level="2"><text:soft-page-break/>SŁOWNIK POJĘĆ</text:h>
      <text:h text:style-name="P11" text:outline-level="3">Organizacja skoków</text:h>
      <text:list xml:id="list1437823685" text:style-name="WWNum6">
        <text:list-item>
          <text:p text:style-name="P20">Skok – opuszczenie statku powietrznego</text:p>
        </text:list-item>
        <text:list-item>
          <text:p text:style-name="P20">Wysokość skoku – wysokość z której wyskakujemy</text:p>
        </text:list-item>
        <text:list-item>
          <text:p text:style-name="P20">Wysokość otwarcia – wysokość na jakiej rozpoczynamy otwarcie spadochronu</text:p>
        </text:list-item>
        <text:list-item>
          <text:p text:style-name="P20">Wysokość zawiśnięcia – wysokość na jakiej spadochron w pełni się otworzy</text:p>
        </text:list-item>
        <text:list-item>
          <text:p text:style-name="P20">Wysokość awaryjna – wysokość na jakiej decydujemy, czy lądujemy na spadochronie jaki mamy nad główą czy przesiadamy się na zapasowy</text:p>
        </text:list-item>
        <text:list-item>
          <text:p text:style-name="P20">Separacja – czas liczony w sekundach pomiędzy wyskokiem poszczególnych skoczków / grup skoczków</text:p>
        </text:list-item>
        <text:list-item>
          <text:p text:style-name="P20">Strefa zrzutu (Drop zone, DZ) – miejsce przeznaczone do lądowania</text:p>
        </text:list-item>
        <text:list-item>
          <text:p text:style-name="P20">Strefa oczekiwania – miejsce w którym zbijamy wysokość po pomyślnym otwarciu spadochronu</text:p>
        </text:list-item>
        <text:list-item>
          <text:p text:style-name="P20">Runda – “pattern” który wykonujemy przed lądowaniem. Na 300, 200 oraz 100m wykonujemy zakręt 90 stopni w lewo / prawo w celu ustawienia się pod wiatr I uniknięcia kolizji z innymi skoczkami</text:p>
        </text:list-item>
      </text:list>
      <text:h text:style-name="P11" text:outline-level="3">Budowa spadochronu</text:h>
      <text:list xml:id="list551123038" text:style-name="WWNum7">
        <text:list-item>
          <text:p text:style-name="P21">Czasza – materiał służący do spowolnienia upadku spadochroniarza</text:p>
        </text:list-item>
        <text:list-item>
          <text:p text:style-name="P21">Spadochron główny – czasza używana w 99% przypadków</text:p>
        </text:list-item>
        <text:list-item>
          <text:p text:style-name="P21">Spadochron zapasowy – czasza używana w 1% przypadków</text:p>
        </text:list-item>
        <text:list-item>
          <text:p text:style-name="P21">Paczka – opakowanie do którego chowamy czaszę</text:p>
        </text:list-item>
        <text:list-item>
          <text:p text:style-name="P21">Kontener – opakowanie do którego chowamy paczkę</text:p>
        </text:list-item>
        <text:list-item>
          <text:p text:style-name="P21">Uprząż – uprząż którą nakłada skoczek, do niej przyszyty jest kontener</text:p>
        </text:list-item>
        <text:list-item>
          <text:p text:style-name="P21">Pilocik – “spadochronik” służący do wyciągnięcia paczki z kontenera. Uchwyt pilocika znajduje się na plecach z prawej strony, w okolicach bioder</text:p>
        </text:list-item>
        <text:list-item>
          <text:p text:style-name="P21">Linki – łączą taśmy nośne z czaszą</text:p>
        </text:list-item>
        <text:list-item>
          <text:p text:style-name="P21">Taśmy nośne – łączą linki z systemem 3 kółek</text:p>
        </text:list-item>
        <text:list-item>
          <text:p text:style-name="P21">System 3 kółek – sposób mocowania czaszy spadochronu głównego pozwalający na łatwe niezawodne wypięcie go w razie awarii.</text:p>
        </text:list-item>
        <text:list-item>
          <text:p text:style-name="P21">Uchwyty – znajdują się w okolicach brzucha, prawy służy do wypięcia czaszy głównej, lewy służy do otwarcia czaszy zapasowej</text:p>
        </text:list-item>
      </text:list>
      <text:p text:style-name="P4"/>
      <text:p text:style-name="P4"/>
      <text:h text:style-name="P11" text:outline-level="3">Rodzaje skoków</text:h>
      <text:list xml:id="list461928185" text:style-name="WWNum8">
        <text:list-item>
          <text:p text:style-name="P22">Tandem – skok z instruktorem</text:p>
        </text:list-item>
        <text:list-item>
          <text:p text:style-name="P22">Solo – skok w pojedynkę</text:p>
        </text:list-item>
        <text:list-item>
          <text:p text:style-name="P22"><text:soft-page-break/>RW – skok w grupie, wszyscy spadają na brzuchu</text:p>
        </text:list-item>
        <text:list-item>
          <text:p text:style-name="P22">FF – skok w grupie, wszyscy spadają na siedząco lub głową do dołu</text:p>
        </text:list-item>
        <text:list-item>
          <text:p text:style-name="P22">TRACK – skok w grupie, wszyscy przemieszczają się w danym kierunku</text:p>
        </text:list-item>
        <text:list-item>
          <text:p text:style-name="P22">Wingsuit – skok solo / w grupie, skoczkowie ubrani są w Wingsuity</text:p>
        </text:list-item>
        <text:list-item>
          <text:p text:style-name="P22">Static line – skok solo z natychmiastowym otwarciem zainicijowanym przez linę zamocowaną do statku powietrznego</text:p>
        </text:list-item>
      </text:list>
      <text:h text:style-name="P11" text:outline-level="3">Role na lotnisku</text:h>
      <text:list xml:id="list2902733506" text:style-name="WWNum9">
        <text:list-item>
          <text:p text:style-name="P23">Kierownik skoków – odpowiedzialny za poprawny przebieg skoków</text:p>
        </text:list-item>
        <text:list-item>
          <text:p text:style-name="P23">Układacz – osoba układająca spadochrony główne</text:p>
        </text:list-item>
        <text:list-item>
          <text:p text:style-name="P23">Rigger – mechanik spadochronowy, odpowiedzialny za układanie spadochronu zapasowego oraz naprawy</text:p>
        </text:list-item>
        <text:list-item>
          <text:p text:style-name="P23">Instruktor AFF – instruktor z uprawnieniami na szkolenie przeprowadzanie szkoleń AFF</text:p>
        </text:list-item>
        <text:list-item>
          <text:p text:style-name="P23">Instruktor SL – instruktor z uprawnieniami na szkolenie przeprowadzanie szkoleń SL</text:p>
        </text:list-item>
        <text:list-item>
          <text:p text:style-name="P23">Instruktor – osoba w uprawnieniami instruktora</text:p>
        </text:list-item>
        <text:list-item>
          <text:p text:style-name="P23">Kamerzysta – skoczek wyskakujący obok tandemu, nagrywając go</text:p>
        </text:list-item>
        <text:list-item>
          <text:p text:style-name="P23">Spotter – wyznaczony skoczek w samolocie odpowiedzialny za upewnienie się, czy znajdujemy się w miejscu zrzutu</text:p>
        </text:list-item>
        <text:list-item>
          <text:p text:style-name="P23">Wyrzucający – wyznaczony skoczek odpowiedzialny za prawidłowe opuszczenie statku powietrznego przez skoczków</text:p>
        </text:list-item>
      </text:list>
      <text:h text:style-name="P11" text:outline-level="3">Procedury</text:h>
      <text:list xml:id="list4109888359" text:style-name="WWNum10">
        <text:list-item>
          <text:p text:style-name="P24">Otwarcie – proces otwarcia głównego spadochronu</text:p>
        </text:list-item>
        <text:list-item>
          <text:p text:style-name="P24">Cutaway – proces odczepienia głównego spadochronu</text:p>
        </text:list-item>
        <text:list-item>
          <text:p text:style-name="P24">RSL – system otwierający spadochron zapasowy przy pomocy spadochronu głównego</text:p>
        </text:list-item>
        <text:list-item>
          <text:p text:style-name="P24">MARD – modyfikacja RSL</text:p>
        </text:list-item>
        <text:list-item>
          <text:p text:style-name="P24">Automat – (ang. Automatic Activation Device) komputer umieszczony w kontenerze który bada prędkość opadania skoczka I aktualną wysokość. W razie wykrycia nie otwarcia spadochronu poniżej podanej wysokości automat samodzielnie otwiera spadochron zapasowy</text:p>
        </text:list-item>
        <text:list-item>
          <text:p text:style-name="P24">Procedura awayjna – proces postępowania w przypadku wystąpienia awarii.</text:p>
        </text:list-item>
        <text:list-item>
          <text:p text:style-name="P24">Gear check – kontrola przed skokiem</text:p>
        </text:list-item>
        <text:list-item>
          <text:p text:style-name="P24">Briefing – omówienie wylotu</text:p>
          <text:p text:style-name="P24"/>
        </text:list-item>
      </text:list>
      <text:h text:style-name="P11" text:outline-level="3"><text:soft-page-break/>Parametry</text:h>
      <text:list xml:id="list1775296734" text:style-name="WWNum11">
        <text:list-item>
          <text:p text:style-name="P25">Wysokość – wysokość nad poziomem ziemi (AGL) mierzona w metrach</text:p>
        </text:list-item>
        <text:list-item>
          <text:p text:style-name="P25">Prędkość opadania – prędkość z jaką się spada. Po osiągnięciu prędkości krytycznej, dla skoczka na brzuchu wynosi około 50 m/s, w przypadku skoku FF może być bliższa 80 m/s</text:p>
        </text:list-item>
        <text:list-item>
          <text:p text:style-name="P25">Wing Loading (WL) – stosunek masy skoczka (masa osoby + ubrań + sprzętu + spadochronu) do powierzchni czaszy spadochronu głównego, wyrażony w proporcji funtów do stóp kwadratowych (lbs/ft sq)</text:p>
        </text:list-item>
      </text:list>
      <text:h text:style-name="P11" text:outline-level="3">Inne</text:h>
      <text:list xml:id="list1161100821" text:style-name="WWNum12">
        <text:list-item>
          <text:p text:style-name="P26">Książka skoków – miejsce w którym dokumentujemy skoki</text:p>
        </text:list-item>
        <text:list-item>
          <text:p text:style-name="P26">Licencja – uprawnienia skoczka, w Polsce PJ, w USA USPA</text:p>
        </text:list-item>
      </text:list>
      <text:p text:style-name="P4"><draw:line text:anchor-type="char" draw:z-index="1" draw:name="Łącznik prosty 1" draw:style-name="gr1" draw:text-style-name="P59" svg:x1="-0.7315in" svg:y1="0.1654in" svg:x2="7.9638in" svg:y2="0.1657in"><text:p/></draw:line></text:p>
      <text:p text:style-name="P37">OPIS AKTORÓW</text:p>
      <text:p text:style-name="P12">1. Kierownik skoków (Manifest / Jumpmaster)</text:p>
      <text:p text:style-name="P4">Jest to główny aktor systemu, posiadający najszerszy zakres uprawnień. Odpowiada za koordynację całości działań na strefie.</text:p>
      <text:list xml:id="list1440573271" text:style-name="WWNum13">
        <text:list-item>
          <text:p text:style-name="P27">Główne zadania: Zarządzanie grafikiem personelu, dodawanie nowych skoczków, planowanie i tworzenie wylotów, przypisywanie skoczków do konkretnych lotów oraz prowadzenie briefingów.</text:p>
        </text:list-item>
        <text:list-item>
          <text:p text:style-name="P27">Powiązania: Ma dostęp do modułów zarządzania personelem, wylotami oraz szkoleniami.</text:p>
        </text:list-item>
      </text:list>
      <text:p text:style-name="P12">2. Skoczek (Skydiver)</text:p>
      <text:p text:style-name="P4">Użytkownik końcowy, dla którego świadczone są usługi strefy.</text:p>
      <text:list xml:id="list2216653980" text:style-name="WWNum14">
        <text:list-item>
          <text:p text:style-name="P28">Główne zadania: Rejestracja na szkolenia oraz udział w kursach i szkoleniach organizowanych przez strefę.</text:p>
        </text:list-item>
        <text:list-item>
          <text:p text:style-name="P28">Ważna funkcja: Musi przejść proces Logowania, aby system zidentyfikował jego uprawnienia i status.</text:p>
        </text:list-item>
      </text:list>
      <text:p text:style-name="P12">3. Pilot</text:p>
      <text:p text:style-name="P4">Aktor operacyjny odpowiedzialny za techniczny aspekt wylotu.</text:p>
      <text:list xml:id="list417641475" text:style-name="WWNum15">
        <text:list-item>
          <text:p text:style-name="P29">Główne zadania: Interaguje z systemem w zakresie monitorowania stanu wylotu. Dzięki temu wie, kiedy wylot jest gotowy, ilu skoczków jest na pokładzie i jakie są parametry zrzutu.</text:p>
        </text:list-item>
      </text:list>
      <text:p text:style-name="P12">4. Rigger (Mechanik spadochronowy)</text:p>
      <text:p text:style-name="P4">Specjalista odpowiedzialny za bezpieczeństwo i stan techniczny sprzętu.</text:p>
      <text:list xml:id="list1293237299" text:style-name="WWNum16">
        <text:list-item>
          <text:p text:style-name="P30">Główne zadania: Wykonuje kontrolę stanu spadochronu oraz przeprowadza procedurę Gear check (sprawdzenie sprzętu przed skokiem). Może również zajmować się układaniem spadochronów (podobnie jak układacz).</text:p>
        </text:list-item>
      </text:list>
      <text:p text:style-name="P12"><text:soft-page-break/>5. Układacz (Packer)</text:p>
      <text:p text:style-name="P4">Osoba odpowiedzialna za przygotowanie spadochronów do ponownego użycia.</text:p>
      <text:list xml:id="list470517055" text:style-name="WWNum17">
        <text:list-item>
          <text:p text:style-name="P31">Główne zadania: Jego główną interakcją z systemem jest układanie spadochronu. Podobnie jak Rigger i Skoczek, może zgłaszać usterki sprzętu, co jest oznaczone relacją &lt;&lt;extend&gt;&gt;.</text:p>
        </text:list-item>
      </text:list>
      <text:p text:style-name="P12">6. System wyświetlania informacji</text:p>
      <text:p text:style-name="P4">Jest to aktor niebędący człowiekiem (system zewnętrzny, np. monitor w hangarze lub zewnętrzna aplikacja).</text:p>
      <text:list xml:id="list1340722823" text:style-name="WWNum18">
        <text:list-item>
          <text:p text:style-name="P32">Główne zadania: Odpowiada za wyświetlanie wylotów w układalni. Pobiera dane z modułu "Zarządzanie wylotami", aby informować skoczków i personel o zbliżających się startach.</text:p>
        </text:list-item>
      </text:list>
      <text:p text:style-name="P2"/>
      <text:p text:style-name="P37">DIAGRAM PRZYPADKÓW UŻYCIA</text:p>
      <text:p text:style-name="P2"/>
      <text:p text:style-name="Text_20_body_20__28_user_29_"><draw:frame draw:style-name="fr2" draw:name="Obraz 4" text:anchor-type="as-char" svg:width="7.2681in" svg:height="4.7535in" draw:z-index="0"><draw:image xlink:href="Pictures/1000000000000450000002D2B06A4AAE0A85BB10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1"><text:soft-page-break/>OPISY PRZYPADKÓW UŻYCIA</text:p>
      <text:p text:style-name="P1"/>
      <text:list xml:id="list3292509233" text:style-name="WWNum19">
        <text:list-item>
          <text:p text:style-name="P39">UKŁADANIE SPADOCHRONU</text:p>
        </text:list-item>
      </text:list>
      <text:list xml:id="list4081373775" text:style-name="WWNum29">
        <text:list-item>
          <text:p text:style-name="P46">Uczestniczący aktorzy:</text:p>
        </text:list-item>
      </text:list>
      <text:list xml:id="list3698756160" text:style-name="WWNum20">
        <text:list-item>
          <text:p text:style-name="P47">Układacz (inicjuje proces) – osoba odpowiedzialna za fizyczne złożenie czaszy i wprowadzenie danych do systemu.</text:p>
        </text:list-item>
        <text:list-item>
          <text:p text:style-name="P47">Rigger (aktor wspierający) – nadzoruje stan techniczny i interweniuje w sytuacjach wymagających naprawy.</text:p>
        </text:list-item>
      </text:list>
      <text:list xml:id="list101430414157234" text:continue-list="list4081373775" text:style-name="WWNum29">
        <text:list-item>
          <text:p text:style-name="P46">Podstawowy ciąg zdarzeń:</text:p>
        </text:list-item>
      </text:list>
      <text:list xml:id="list3991078173" text:style-name="WWNum21">
        <text:list-item>
          <text:p text:style-name="P48">Logowanie: Układacz loguje się do systemu (proces zawiera w sobie przypadek użycia "Logowanie").</text:p>
        </text:list-item>
        <text:list-item>
          <text:p text:style-name="P48">Wybór sprzętu: Układacz wybiera konkretny spadochron do ułożenia z listy dostępnego sprzętu.</text:p>
        </text:list-item>
        <text:list-item>
          <text:p text:style-name="P48">Weryfikacja: System automatycznie sprawdza, czy spadochron nie wymaga przeglądu technicznego (proces rozszerzony o przypadek "Kontrola stanu spadochronu").</text:p>
        </text:list-item>
        <text:list-item>
          <text:p text:style-name="P48">Praca fizyczna: Układacz przystępuje do fizycznego układania czaszy spadochronu.</text:p>
        </text:list-item>
        <text:list-item>
          <text:p text:style-name="P48">Potwierdzenie: Po zakończeniu układania, Układacz wprowadza do systemu potwierdzenie wykonania pracy.</text:p>
        </text:list-item>
        <text:list-item>
          <text:p text:style-name="P48">Rejestracja danych: System zapisuje datę, godzinę oraz identyfikator Układacza w karcie technicznej sprzętu.</text:p>
        </text:list-item>
        <text:list-item>
          <text:p text:style-name="P48">Aktualizacja statusu: System zmienia status spadochronu na "Gotowy do skoku".</text:p>
        </text:list-item>
      </text:list>
      <text:list xml:id="list101430907238125" text:continue-list="list101430414157234" text:style-name="WWNum29">
        <text:list-item>
          <text:p text:style-name="P46">Alternatywne ciągi zdarzeń:</text:p>
        </text:list-item>
      </text:list>
      <text:list xml:id="list1265462055" text:style-name="WWNum22">
        <text:list-item>
          <text:p text:style-name="P49">Wykrycie usterki (rozszerzenie kroku 4): Jeśli w trakcie układania Układacz stwierdzi uszkodzenie lub zużycie materiału, wywołuje przypadek "Zgłaszanie usterki spadochronu". System blokuje wtedy możliwość oznaczenia sprzętu jako gotowy i zmienia jego status na "W naprawie".</text:p>
        </text:list-item>
        <text:list-item>
          <text:p text:style-name="P49">Negatywny wynik kontroli (krok 3): Jeśli system stwierdzi przekroczenie terminu ważności przeglądu, odmawia rejestracji ułożenia i wyświetla komunikat o konieczności przekazania sprzętu Riggerowi.</text:p>
        </text:list-item>
      </text:list>
      <text:list xml:id="list101430069052775" text:continue-list="list101430907238125" text:style-name="WWNum29">
        <text:list-item>
          <text:p text:style-name="P46">Zależności czasowe:</text:p>
        </text:list-item>
      </text:list>
      <text:list xml:id="list2954803557" text:style-name="WWNum23">
        <text:list-item>
          <text:p text:style-name="P52"><text:span text:style-name="T3">Częstotliwość: </text:span><text:span text:style-name="T4">od 10 do 50 razy dziennie w zależności od intensywności skoków.</text:span></text:p>
        </text:list-item>
        <text:list-item>
          <text:p text:style-name="P52"><text:span text:style-name="T3">Przewidywane spiętrzenia: </text:span><text:span text:style-name="T4">dni weekendowe oraz podczas sprzyjających warunków atmosferycznych, bezpośrednio po zakończeniu serii skoków (wylotów)".</text:span></text:p>
        </text:list-item>
        <text:list-item>
          <text:p text:style-name="P50">Typowy czas realizacji: 15 – 20 minut</text:p>
        </text:list-item>
        <text:list-item>
          <text:p text:style-name="P53"><text:span text:style-name="T3">Maksymalny czas realizacji: </text:span><text:span text:style-name="T4">40 minut (w przypadku skomplikowanego układania lub problemów technicznych)</text:span></text:p>
        </text:list-item>
      </text:list>
      <text:list xml:id="list101430895271593" text:continue-list="list101430069052775" text:style-name="WWNum29">
        <text:list-item>
          <text:p text:style-name="P46">Wartości uzyskane przez aktorów:</text:p>
        </text:list-item>
      </text:list>
      <text:list xml:id="list1689773328" text:style-name="WWNum24">
        <text:list-item>
          <text:p text:style-name="P51">Gwarancja prawidłowego zarejestrowania przygotowania sprzętu w systemie.</text:p>
        </text:list-item>
        <text:list-item>
          <text:p text:style-name="P51">Możliwość przypisania spadochronu do konkretnego wylotu przez Kierownika skoków.</text:p>
        </text:list-item>
        <text:list-item>
          <text:p text:style-name="P51">Zachowanie pełnej i ciągłej dokumentacji technicznej spadochronu.</text:p>
        </text:list-item>
      </text:list>
      <text:p text:style-name="P7"><text:soft-page-break/>wykonała: Sandra Dzieniszewska</text:p>
      <text:list xml:id="list101430703653397" text:continue-list="list3292509233" text:style-name="WWNum19">
        <text:list-item>
          <text:p text:style-name="P39">PLANOWANIE I TWORZENIE WYLOTÓW.</text:p>
        </text:list-item>
      </text:list>
      <text:p text:style-name="P12">1. Uczestniczący aktorzy:</text:p>
      <text:list xml:id="list1139698434" text:style-name="WWNum25">
        <text:list-item>
          <text:p text:style-name="P33">Kierownik skoków</text:p>
        </text:list-item>
      </text:list>
      <text:p text:style-name="P12">2. Podstawowy ciąg zdarzeń:</text:p>
      <text:list xml:id="list1923417069" text:style-name="WWNum26">
        <text:list-item>
          <text:p text:style-name="P34">Kierownik skoków wybiera funkcję tworzenia nowego wylotu w module „Zarządzanie wylotami”.</text:p>
        </text:list-item>
        <text:list-item>
          <text:p text:style-name="P34">System otwiera formularz lotu.</text:p>
        </text:list-item>
        <text:list-item>
          <text:p text:style-name="P34">Kierownik definiuje parametry techniczne wylotu (np. numer lotu, godzina). </text:p>
        </text:list-item>
        <text:list-item>
          <text:p text:style-name="P34">Po zakończeniu przypisywania osób, Kierownik zatwierdza utworzenie wylotu.</text:p>
        </text:list-item>
        <text:list-item>
          <text:p text:style-name="P34">System zapisuje gotowy plan wylotu w bazie danych</text:p>
        </text:list-item>
        <text:list-item>
          <text:p text:style-name="P34">Kierownik skoków omawia ze skoczkami jak będzie przebiegać wylot (rozszerzenie przypadku „Prowadzenie briefingu”)</text:p>
        </text:list-item>
      </text:list>
      <text:p text:style-name="P12">3. Alternatywne ciągi zdarzeń:</text:p>
      <text:list xml:id="list686829022" text:style-name="WWNum27">
        <text:list-item>
          <text:p text:style-name="P35">a) Przerwanie tworzenia wylotu:</text:p>
          <text:list>
            <text:list-item>
              <text:p text:style-name="P35">Kierownik skoków rezygnuje z tworzenia lotu przed jego zatwierdzeniem.</text:p>
            </text:list-item>
            <text:list-item>
              <text:p text:style-name="P35">System usuwa wprowadzone dane i nie tworzy rekordu wylotu.</text:p>
            </text:list-item>
          </text:list>
        </text:list-item>
        <text:list-item>
          <text:p text:style-name="P35">b) Błąd walidacji danych wylotu:</text:p>
          <text:list>
            <text:list-item>
              <text:p text:style-name="P35">Kierownik wprowadza błędne dane (np. godzina z przeszłości).</text:p>
            </text:list-item>
            <text:list-item>
              <text:p text:style-name="P35">System wyświetla komunikat o błędzie i prosi o poprawę parametrów przed przejściem do przypisywania skoczków.</text:p>
            </text:list-item>
          </text:list>
        </text:list-item>
      </text:list>
      <text:p text:style-name="P12">4. Zależności czasowe:</text:p>
      <text:list xml:id="list2331119986" text:style-name="WWNum28">
        <text:list-item>
          <text:p text:style-name="P36">Częstotliwość wykonania: Od 5 do 30 razy dziennie (zależnie od intensywności skoków).</text:p>
        </text:list-item>
        <text:list-item>
          <text:p text:style-name="P36">Przewidywane spiętrzenia: Poranek oraz okresy po przerwach pogodowych.</text:p>
        </text:list-item>
        <text:list-item>
          <text:p text:style-name="P36">Typowy czas realizacji: 1-2 minuty.</text:p>
        </text:list-item>
        <text:list-item>
          <text:p text:style-name="P36">Maksymalny czas realizacji: 5-10 minut.</text:p>
        </text:list-item>
      </text:list>
      <text:list xml:id="list101430305378843" text:continue-list="list101430895271593" text:style-name="WWNum29">
        <text:list-item>
          <text:p text:style-name="P13">Wartości uzyskiwane przez aktorów:</text:p>
        </text:list-item>
      </text:list>
      <text:list xml:id="list101430935247951" text:continue-list="list2331119986" text:style-name="WWNum28">
        <text:list-item>
          <text:p text:style-name="P36">Gwarancja zarejestrowania każdego wylotu w systemie</text:p>
        </text:list-item>
        <text:list-item>
          <text:p text:style-name="P36">Możliwość łatwego sprawdzenia składu danego wylotu</text:p>
        </text:list-item>
        <text:list-item>
          <text:p text:style-name="P36">Sprawne uaktualnianie listy planowanych lotów</text:p>
        </text:list-item>
      </text:list>
      <text:p text:style-name="P5"/>
      <text:p text:style-name="P7">wykonał: Hubert Milewski</text:p>
      <text:p text:style-name="P7"><text:soft-page-break/></text:p>
      <text:p text:style-name="P6"/>
      <text:p text:style-name="P5">3) GEAR CHECK (KONTROLA SPADOCHRONU)</text:p>
      <text:p text:style-name="P5">1. Uczestniczący aktorzy:</text:p>
      <text:list xml:id="list1798887189" text:style-name="WWNum30">
        <text:list-item>
          <text:p text:style-name="P54"><text:span text:style-name="T1">Aktor główny:</text:span><text:span text:style-name="T2"> Kierownik skoków </text:span></text:p>
        </text:list-item>
        <text:list-item>
          <text:p text:style-name="P54"><text:span text:style-name="T1">Aktorzy wspierający:</text:span><text:span text:style-name="T2"> Skoczek, Rigger, Układacz </text:span></text:p>
        </text:list-item>
      </text:list>
      <text:p text:style-name="P5">2. Podstawowy ciąg zdarzeń:</text:p>
      <text:list xml:id="list1237993440" text:style-name="WWNum31">
        <text:list-item>
          <text:p text:style-name="P43">Skoczek zgłasza się do kontroli sprzętu przed planowanym wylotem. </text:p>
        </text:list-item>
        <text:list-item>
          <text:p text:style-name="P43">Kierownik skoków inicjuje funkcję Gear Check w systemie. </text:p>
        </text:list-item>
        <text:list-item>
          <text:p text:style-name="P43">Kierownik skoków dokonuje fizycznego sprawdzenia: kompletności wyposażenia (spadochron, wysokościomierz, kask, nóż), ustawienia automatu AAD, poprawności zapięć i regulacji uprzęży oraz aktualności przeglądu. </text:p>
        </text:list-item>
        <text:list-item>
          <text:p text:style-name="P43">System rejestruje fakt wykonania kontroli w bazie danych. </text:p>
        </text:list-item>
        <text:list-item>
          <text:p text:style-name="P43">W przypadku pozytywnego wyniku weryfikacji – Gear Check zostaje zakończony sukcesem i dopuszczeniem skoczka. </text:p>
        </text:list-item>
      </text:list>
      <text:p text:style-name="P5">3. Alternatywne ciągi zdarzeń:</text:p>
      <text:p text:style-name="P41">a) Wykrycie nieprawidłowości:</text:p>
      <text:list xml:id="list2050270423" text:style-name="WWNum32">
        <text:list-item>
          <text:list>
            <text:list-item>
              <text:p text:style-name="P44">Kierownik wykrywa usterkę podczas kontroli. </text:p>
            </text:list-item>
            <text:list-item>
              <text:p text:style-name="P44">System uruchamia rozszerzenie przypadku „Zgłaszanie usterki spadochronu”. </text:p>
            </text:list-item>
            <text:list-item>
              <text:p text:style-name="P44">Sprzęt zostaje oznaczony jako niedopuszczony do skoku, a skoczek skierowany do Riggera lub Układacza. </text:p>
            </text:list-item>
            <text:list-item>
              <text:p text:style-name="P44">Po usunięciu usterki ponawiany jest scenariusz podstawowy. </text:p>
            </text:list-item>
          </text:list>
        </text:list-item>
      </text:list>
      <text:p text:style-name="P41">b) Brak ważnego przeglądu:</text:p>
      <text:list xml:id="list101430650524765" text:continue-numbering="true" text:style-name="WWNum32">
        <text:list-item>
          <text:list>
            <text:list-item>
              <text:p text:style-name="P44">Kierownik zauważa brak ważności przeglądu sprzętu. </text:p>
            </text:list-item>
            <text:list-item>
              <text:p text:style-name="P44">Sprzęt zostaje oznaczony jako niedopuszczony do skoku. </text:p>
            </text:list-item>
            <text:list-item>
              <text:p text:style-name="P44">Skoczek zostaje skierowany do Riggera lub Układacza. </text:p>
            </text:list-item>
            <text:list-item>
              <text:p text:style-name="P44">Po wykonaniu przeglądu ponawiany jest scenariusz podstawowy. </text:p>
            </text:list-item>
          </text:list>
        </text:list-item>
      </text:list>
      <text:p text:style-name="P41">c) Awaria systemu:</text:p>
      <text:list xml:id="list101429335157214" text:continue-numbering="true" text:style-name="WWNum32">
        <text:list-item>
          <text:list>
            <text:list-item>
              <text:p text:style-name="P44">Podczas rejestracji występuje błąd systemu. </text:p>
            </text:list-item>
            <text:list-item>
              <text:p text:style-name="P44"><text:soft-page-break/>Kontrola zostaje przeprowadzona manualnie. </text:p>
            </text:list-item>
            <text:list-item>
              <text:p text:style-name="P44">Dane są wprowadzane do systemu po jego przywróceniu, po czym następuje powrót do scenariusza podstawowego. </text:p>
            </text:list-item>
          </text:list>
        </text:list-item>
      </text:list>
      <text:p text:style-name="P5">4. Zależności czasowe:</text:p>
      <text:list xml:id="list2230437328" text:style-name="WWNum33">
        <text:list-item>
          <text:p text:style-name="P55"><text:span text:style-name="T1">Częstotliwość wykonania:</text:span><text:span text:style-name="T2"> Od 1 do 300 operacji dziennie (przed każdym skokiem każdego skoczka). </text:span></text:p>
        </text:list-item>
        <text:list-item>
          <text:p text:style-name="P55"><text:span text:style-name="T1">Przewidywane spiętrzenia:</text:span><text:span text:style-name="T2"> Przed każdym wylotem, podczas wydarzeń oraz przy działaniu więcej niż jednego samolotu. </text:span></text:p>
        </text:list-item>
        <text:list-item>
          <text:p text:style-name="P55"><text:span text:style-name="T1">Typowy czas realizacji:</text:span><text:span text:style-name="T2"> 2 minuty na osobę. </text:span></text:p>
        </text:list-item>
        <text:list-item>
          <text:p text:style-name="P55"><text:span text:style-name="T1">Maksymalny czas realizacji:</text:span><text:span text:style-name="T2"> 10 minut na osobę (w przypadku usterki czas zależny od naprawy). </text:span></text:p>
        </text:list-item>
      </text:list>
      <text:p text:style-name="P5">5. Wartości uzyskiwane przez aktorów:</text:p>
      <text:list xml:id="list2088100701" text:style-name="WWNum34">
        <text:list-item>
          <text:p text:style-name="P45">Pewność procedur bezpieczeństwa i minimalizacja ryzyka wypadków (Kierownik skoków). </text:p>
        </text:list-item>
        <text:list-item>
          <text:p text:style-name="P45">Udokumentowanie wykonania kontroli oraz formalne dopuszczenie do skoku (Kierownik skoków, Skoczek). </text:p>
        </text:list-item>
        <text:list-item>
          <text:p text:style-name="P45">Pewność poprawnego przygotowania sprzętu i zwiększone bezpieczeństwo (Skoczek). </text:p>
        </text:list-item>
        <text:list-item>
          <text:p text:style-name="P45">Informacja o stanie technicznym sprzętu i możliwość szybkiej reakcji na usterki (Rigger/Układacz).</text:p>
        </text:list-item>
      </text:list>
      <text:p text:style-name="P6"/>
      <text:p text:style-name="P7">wykonał: Patryk Wojtkielewicz</text:p>
      <text:p text:style-name="P56"/>
      <text:p text:style-name="P57"><draw:line text:anchor-type="char" draw:z-index="2" draw:name="Łącznik prosty 2" draw:style-name="gr1" draw:text-style-name="P59" svg:x1="-0.7315in" svg:y1="0.1654in" svg:x2="7.9638in" svg:y2="0.1657in"><text:p/></draw:line></text:p>
      <text:p text:style-name="P58"/>
      <text:p text:style-name="P38"><text:soft-page-break/>DIAGRAM KLAS</text:p>
      <text:p text:style-name="P38"><draw:frame draw:style-name="fr1" draw:name="Image1" text:anchor-type="char" svg:width="7.2681in" svg:height="5.7929in" draw:z-index="3"><draw:image xlink:href="Pictures/100000010000050B00000405AC9ACFCC5196A55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_20__28_user_29_" style:default-outline-level="1" style:list-style-name="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_20__28_user_29_" style:default-outline-level="2" style:list-style-name="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_20__28_user_29_" style:default-outline-level="3" style:list-style-name="" style:class="text">
      <style:paragraph-properties fo:margin-top="0.0972in" fo:margin-bottom="0.0835in" style:contextual-spacing="false"/>
      <style:text-properties fo:font-weight="bold" style:font-weight-asian="bold" style:font-weight-complex="bold"/>
    </style:style>
    <style:style style:name="Standard_20__28_user_29_" style:display-name="Standard (user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in" fo:margin-bottom="0.0972in" style:contextual-spacing="false" fo:line-height="115%"/>
    </style:style>
    <style:style style:name="caption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15%" fo:hyphenation-ladder-count="no-limit" fo:text-indent="0in" style:auto-text-indent="false" style:vertical-align="auto"/>
      <style:text-properties style:font-name="Aptos" fo:font-family="Aptos" style:font-family-generic="roman" style:font-pitch="variable" fo:language="pl" fo:country="PL" style:letter-kerning="true" style:font-name-asian="Aptos1" style:font-family-asian="Aptos" style:font-family-generic-asian="system" style:font-pitch-asian="variable" style:language-asian="en" style:country-asian="US" style:font-name-complex="FreeSans1" style:font-family-complex="FreeSans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/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fo:font-size="10pt" style:font-size-asian="10pt"/>
    </style:style>
    <style:style style:name="ListLabel_20_218" style:display-name="ListLabel 218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fo:font-size="10pt" style:font-size-asian="10pt"/>
    </style:style>
    <style:style style:name="ListLabel_20_227" style:display-name="ListLabel 227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fo:font-size="10pt" style:font-size-asian="10pt"/>
    </style:style>
    <style:style style:name="ListLabel_20_236" style:display-name="ListLabel 236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>
      <style:text-properties fo:font-size="10pt" style:font-size-asian="10pt"/>
    </style:style>
    <style:style style:name="ListLabel_20_245" style:display-name="ListLabel 245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ListLabel_20_253" style:display-name="ListLabel 253" style:family="text">
      <style:text-properties fo:font-weight="bold" style:font-weight-asian="bold" style:font-weight-complex="bold"/>
    </style:style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>
      <style:text-properties fo:font-size="10pt" style:font-size-asian="10pt"/>
    </style:style>
    <style:style style:name="ListLabel_20_272" style:display-name="ListLabel 272" style:family="text">
      <style:text-properties fo:font-size="10pt" style:font-size-asian="10pt"/>
    </style:style>
    <style:style style:name="ListLabel_20_273" style:display-name="ListLabel 273" style:family="text">
      <style:text-properties fo:font-size="10pt" style:font-size-asian="10pt"/>
    </style:style>
    <style:style style:name="ListLabel_20_274" style:display-name="ListLabel 274" style:family="text">
      <style:text-properties fo:font-size="10pt" style:font-size-asian="10pt"/>
    </style:style>
    <style:style style:name="ListLabel_20_275" style:display-name="ListLabel 275" style:family="text">
      <style:text-properties fo:font-size="10pt" style:font-size-asian="10pt"/>
    </style:style>
    <style:style style:name="ListLabel_20_276" style:display-name="ListLabel 276" style:family="text">
      <style:text-properties fo:font-size="10pt" style:font-size-asian="10pt"/>
    </style:style>
    <style:style style:name="ListLabel_20_277" style:display-name="ListLabel 277" style:family="text">
      <style:text-properties fo:font-size="10pt" style:font-size-asian="10pt"/>
    </style:style>
    <style:style style:name="ListLabel_20_278" style:display-name="ListLabel 278" style:family="text">
      <style:text-properties fo:font-size="10pt" style:font-size-asian="10pt"/>
    </style:style>
    <style:style style:name="ListLabel_20_279" style:display-name="ListLabel 279" style:family="text">
      <style:text-properties fo:font-size="10pt" style:font-size-asian="10pt"/>
    </style:style>
    <style:style style:name="ListLabel_20_280" style:display-name="ListLabel 280" style:family="text">
      <style:text-properties fo:font-size="10pt" style:font-size-asian="10pt"/>
    </style:style>
    <style:style style:name="ListLabel_20_281" style:display-name="ListLabel 281" style:family="text">
      <style:text-properties fo:font-size="10pt" style:font-size-asian="10pt"/>
    </style:style>
    <style:style style:name="ListLabel_20_282" style:display-name="ListLabel 282" style:family="text">
      <style:text-properties fo:font-size="10pt" style:font-size-asian="10pt"/>
    </style:style>
    <style:style style:name="ListLabel_20_283" style:display-name="ListLabel 283" style:family="text">
      <style:text-properties fo:font-size="10pt" style:font-size-asian="10pt"/>
    </style:style>
    <style:style style:name="ListLabel_20_284" style:display-name="ListLabel 284" style:family="text">
      <style:text-properties fo:font-size="10pt" style:font-size-asian="10pt"/>
    </style:style>
    <style:style style:name="ListLabel_20_285" style:display-name="ListLabel 285" style:family="text">
      <style:text-properties fo:font-size="10pt" style:font-size-asian="10pt"/>
    </style:style>
    <style:style style:name="ListLabel_20_286" style:display-name="ListLabel 286" style:family="text">
      <style:text-properties fo:font-size="10pt" style:font-size-asian="10pt"/>
    </style:style>
    <style:style style:name="ListLabel_20_287" style:display-name="ListLabel 287" style:family="text">
      <style:text-properties fo:font-size="10pt" style:font-size-asian="10pt"/>
    </style:style>
    <style:style style:name="ListLabel_20_288" style:display-name="ListLabel 288" style:family="text">
      <style:text-properties fo:font-size="10pt" style:font-size-asian="10pt"/>
    </style:style>
    <style:style style:name="ListLabel_20_289" style:display-name="ListLabel 289" style:family="text">
      <style:text-properties fo:font-size="10pt" style:font-size-asian="10pt"/>
    </style:style>
    <style:style style:name="ListLabel_20_290" style:display-name="ListLabel 290" style:family="text">
      <style:text-properties fo:font-size="10pt" style:font-size-asian="10pt"/>
    </style:style>
    <style:style style:name="ListLabel_20_291" style:display-name="ListLabel 291" style:family="text">
      <style:text-properties fo:font-size="10pt" style:font-size-asian="10pt"/>
    </style:style>
    <style:style style:name="ListLabel_20_292" style:display-name="ListLabel 292" style:family="text">
      <style:text-properties fo:font-size="10pt" style:font-size-asian="10pt"/>
    </style:style>
    <style:style style:name="ListLabel_20_293" style:display-name="ListLabel 293" style:family="text">
      <style:text-properties fo:font-size="10pt" style:font-size-asian="10pt"/>
    </style:style>
    <style:style style:name="ListLabel_20_294" style:display-name="ListLabel 294" style:family="text">
      <style:text-properties fo:font-size="10pt" style:font-size-asian="10pt"/>
    </style:style>
    <style:style style:name="ListLabel_20_295" style:display-name="ListLabel 295" style:family="text">
      <style:text-properties fo:font-size="10pt" style:font-size-asian="10pt"/>
    </style:style>
    <style:style style:name="ListLabel_20_296" style:display-name="ListLabel 296" style:family="text">
      <style:text-properties fo:font-size="10pt" style:font-size-asian="10pt"/>
    </style:style>
    <style:style style:name="ListLabel_20_297" style:display-name="ListLabel 297" style:family="text">
      <style:text-properties fo:font-size="10pt" style:font-size-asian="10pt"/>
    </style:style>
    <style:style style:name="ListLabel_20_298" style:display-name="ListLabel 298" style:family="text">
      <style:text-properties fo:font-size="10pt" style:font-size-asian="10pt"/>
    </style:style>
    <style:style style:name="ListLabel_20_299" style:display-name="ListLabel 299" style:family="text">
      <style:text-properties fo:font-size="10pt" style:font-size-asian="10pt"/>
    </style:style>
    <style:style style:name="ListLabel_20_300" style:display-name="ListLabel 300" style:family="text">
      <style:text-properties fo:font-size="10pt" style:font-size-asian="10pt"/>
    </style:style>
    <style:style style:name="ListLabel_20_301" style:display-name="ListLabel 301" style:family="text">
      <style:text-properties fo:font-size="10pt" style:font-size-asian="10pt"/>
    </style:style>
    <style:style style:name="ListLabel_20_302" style:display-name="ListLabel 302" style:family="text">
      <style:text-properties fo:font-size="10pt" style:font-size-asian="10pt"/>
    </style:style>
    <style:style style:name="ListLabel_20_303" style:display-name="ListLabel 303" style:family="text">
      <style:text-properties fo:font-size="10pt" style:font-size-asian="10pt"/>
    </style:style>
    <style:style style:name="ListLabel_20_304" style:display-name="ListLabel 304" style:family="text">
      <style:text-properties fo:font-size="10pt" style:font-size-asian="10pt"/>
    </style:style>
    <style:style style:name="ListLabel_20_305" style:display-name="ListLabel 305" style:family="text">
      <style:text-properties fo:font-size="10pt" style:font-size-asian="10pt"/>
    </style:style>
    <style:style style:name="ListLabel_20_306" style:display-name="ListLabel 306" style:family="text">
      <style:text-properties fo:font-size="10pt" style:font-size-asian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74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7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77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7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0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8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8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8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101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10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10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104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10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10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107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10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ListLabel_20_209" loext:num-list-format="%2%." style:num-suffix="." style:num-format="1" text:start-value="1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nga Dzieniszewska</meta:initial-creator>
    <meta:editing-cycles>5</meta:editing-cycles>
    <meta:creation-date>2026-05-07T10:59:00</meta:creation-date>
    <dc:date>2026-05-09T10:14:28.574054458</dc:date>
    <meta:editing-duration>PT12M41S</meta:editing-duration>
    <meta:generator>LibreOffice/7.3.7.2$Linux_X86_64 LibreOffice_project/30$Build-2</meta:generator>
    <meta:document-statistic meta:table-count="0" meta:image-count="2" meta:object-count="0" meta:page-count="10" meta:paragraph-count="197" meta:word-count="1774" meta:character-count="12941" meta:non-whitespace-character-count="11429"/>
    <meta:user-defined meta:name="AppVersion">16.0000</meta:user-defined>
    <meta:template xlink:type="simple" xlink:actuate="onRequest" xlink:title="Normal.dotm" xlink:href=""/>
  </office:meta>
</office:document-meta>
</file>